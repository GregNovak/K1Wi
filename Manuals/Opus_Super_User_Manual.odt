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text-align="center" style:justify-single-word="false"/>
      <style:text-properties officeooo:paragraph-rsid="00225f9b"/>
    </style:style>
    <style:style style:name="P4" style:family="paragraph" style:parent-style-name="Text_20_body">
      <style:paragraph-properties fo:text-align="center" style:justify-single-word="false"/>
      <style:text-properties officeooo:paragraph-rsid="00225f9b"/>
    </style:style>
    <style:style style:name="P5" style:family="paragraph" style:parent-style-name="Heading_20_1">
      <style:paragraph-properties fo:break-before="page"/>
    </style:style>
    <style:style style:name="P6" style:family="paragraph" style:parent-style-name="Horizontal_20_Line">
      <style:text-properties fo:color="#bf819e" loext:opacity="100%"/>
    </style:style>
    <style:style style:name="P7" style:family="paragraph" style:parent-style-name="Text_20_body">
      <style:text-properties fo:color="#bf819e" loext:opacity="100%"/>
    </style:style>
    <style:style style:name="P8" style:family="paragraph" style:parent-style-name="Preformatted_20_Text">
      <style:paragraph-properties fo:line-height="200%" fo:text-align="center" style:justify-single-word="false"/>
      <style:text-properties officeooo:paragraph-rsid="0021f354"/>
    </style:style>
    <style:style style:name="P9" style:family="paragraph" style:parent-style-name="Preformatted_20_Text">
      <style:paragraph-properties fo:margin-top="0in" fo:margin-bottom="0.1965in" style:contextual-spacing="false" fo:line-height="200%" fo:text-align="center" style:justify-single-word="false"/>
      <style:text-properties officeooo:paragraph-rsid="0021f354"/>
    </style:style>
    <style:style style:name="P10" style:family="paragraph" style:parent-style-name="Text_20_body">
      <style:text-properties style:font-name="Arial" fo:font-size="11pt" style:font-size-asian="11pt" style:font-size-complex="11pt"/>
    </style:style>
    <style:style style:name="P11" style:family="paragraph" style:parent-style-name="Text_20_body">
      <style:text-properties fo:color="#000000" loext:opacity="100%"/>
    </style:style>
    <style:style style:name="P12" style:family="paragraph" style:parent-style-name="Preformatted_20_Text">
      <style:paragraph-properties fo:margin-top="0in" fo:margin-bottom="0.1965in" style:contextual-spacing="false"/>
    </style:style>
    <style:style style:name="P13" style:family="paragraph" style:parent-style-name="Text_20_body" style:list-style-name="L1">
      <style:text-properties style:font-name="Arial" fo:font-size="11pt" style:font-size-asian="11pt" style:font-size-complex="11pt"/>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24"/>
    <style:style style:name="P18" style:family="paragraph" style:parent-style-name="Text_20_body" style:list-style-name="L24">
      <style:paragraph-properties fo:margin-top="0in" fo:margin-bottom="0in" style:contextual-spacing="false"/>
    </style:style>
    <style:style style:name="P19" style:family="paragraph" style:parent-style-name="Text_20_body" style:list-style-name="L118"/>
    <style:style style:name="P20" style:family="paragraph" style:parent-style-name="Text_20_body" style:list-style-name="L118">
      <style:paragraph-properties fo:margin-top="0in" fo:margin-bottom="0in" style:contextual-spacing="false"/>
    </style:style>
    <style:style style:name="P21" style:family="paragraph" style:parent-style-name="Text_20_body" style:list-style-name="L119"/>
    <style:style style:name="P22" style:family="paragraph" style:parent-style-name="Text_20_body" style:list-style-name="L119">
      <style:paragraph-properties fo:margin-top="0in" fo:margin-bottom="0in" style:contextual-spacing="false"/>
    </style:style>
    <style:style style:name="P23" style:family="paragraph" style:parent-style-name="Text_20_body" style:list-style-name="L120"/>
    <style:style style:name="P24" style:family="paragraph" style:parent-style-name="Text_20_body" style:list-style-name="L120">
      <style:paragraph-properties fo:margin-top="0in" fo:margin-bottom="0in" style:contextual-spacing="false"/>
    </style:style>
    <style:style style:name="P25" style:family="paragraph" style:parent-style-name="Text_20_body" style:list-style-name="L121"/>
    <style:style style:name="P26" style:family="paragraph" style:parent-style-name="Text_20_body" style:list-style-name="L121">
      <style:paragraph-properties fo:margin-top="0in" fo:margin-bottom="0in" style:contextual-spacing="false"/>
    </style:style>
    <style:style style:name="P27" style:family="paragraph" style:parent-style-name="Text_20_body" style:list-style-name="L122"/>
    <style:style style:name="P28" style:family="paragraph" style:parent-style-name="Text_20_body" style:list-style-name="L122">
      <style:paragraph-properties fo:margin-top="0in" fo:margin-bottom="0in" style:contextual-spacing="false"/>
    </style:style>
    <style:style style:name="P29" style:family="paragraph" style:parent-style-name="Text_20_body" style:list-style-name="L123"/>
    <style:style style:name="P30" style:family="paragraph" style:parent-style-name="Text_20_body" style:list-style-name="L123">
      <style:paragraph-properties fo:margin-top="0in" fo:margin-bottom="0in" style:contextual-spacing="false"/>
    </style:style>
    <style:style style:name="P31" style:family="paragraph" style:parent-style-name="Text_20_body" style:list-style-name="L124"/>
    <style:style style:name="P32" style:family="paragraph" style:parent-style-name="Text_20_body" style:list-style-name="L124">
      <style:paragraph-properties fo:margin-top="0in" fo:margin-bottom="0in" style:contextual-spacing="false"/>
    </style:style>
    <style:style style:name="P33" style:family="paragraph" style:parent-style-name="Text_20_body" style:list-style-name="L125"/>
    <style:style style:name="P34" style:family="paragraph" style:parent-style-name="Text_20_body" style:list-style-name="L125">
      <style:paragraph-properties fo:margin-top="0in" fo:margin-bottom="0in" style:contextual-spacing="false"/>
    </style:style>
    <style:style style:name="P35" style:family="paragraph" style:parent-style-name="Text_20_body" style:list-style-name="L126"/>
    <style:style style:name="P36" style:family="paragraph" style:parent-style-name="Text_20_body" style:list-style-name="L126">
      <style:paragraph-properties fo:margin-top="0in" fo:margin-bottom="0in" style:contextual-spacing="false"/>
    </style:style>
    <style:style style:name="P37" style:family="paragraph" style:parent-style-name="Text_20_body" style:list-style-name="L127"/>
    <style:style style:name="P38" style:family="paragraph" style:parent-style-name="Text_20_body" style:list-style-name="L127">
      <style:paragraph-properties fo:margin-top="0in" fo:margin-bottom="0in" style:contextual-spacing="false"/>
    </style:style>
    <style:style style:name="P39" style:family="paragraph" style:parent-style-name="Text_20_body" style:list-style-name="L128"/>
    <style:style style:name="P40" style:family="paragraph" style:parent-style-name="Text_20_body" style:list-style-name="L128">
      <style:paragraph-properties fo:margin-top="0in" fo:margin-bottom="0in" style:contextual-spacing="false"/>
    </style:style>
    <style:style style:name="P41" style:family="paragraph" style:parent-style-name="Text_20_body" style:list-style-name="L129"/>
    <style:style style:name="P42" style:family="paragraph" style:parent-style-name="Text_20_body" style:list-style-name="L129">
      <style:paragraph-properties fo:margin-top="0in" fo:margin-bottom="0in" style:contextual-spacing="false"/>
    </style:style>
    <style:style style:name="P43" style:family="paragraph" style:parent-style-name="Text_20_body" style:list-style-name="L130"/>
    <style:style style:name="P44" style:family="paragraph" style:parent-style-name="Text_20_body" style:list-style-name="L130">
      <style:paragraph-properties fo:margin-top="0in" fo:margin-bottom="0in" style:contextual-spacing="false"/>
    </style:style>
    <style:style style:name="P45" style:family="paragraph" style:parent-style-name="Text_20_body" style:list-style-name="L131">
      <style:paragraph-properties fo:margin-top="0in" fo:margin-bottom="0in" style:contextual-spacing="false"/>
    </style:style>
    <style:style style:name="P46" style:family="paragraph" style:parent-style-name="Text_20_body" style:list-style-name="L132"/>
    <style:style style:name="P47" style:family="paragraph" style:parent-style-name="Text_20_body" style:list-style-name="L132">
      <style:paragraph-properties fo:margin-top="0in" fo:margin-bottom="0in" style:contextual-spacing="false"/>
    </style:style>
    <style:style style:name="P48" style:family="paragraph" style:parent-style-name="Text_20_body" style:list-style-name="L133"/>
    <style:style style:name="P49" style:family="paragraph" style:parent-style-name="Text_20_body" style:list-style-name="L133">
      <style:paragraph-properties fo:margin-top="0in" fo:margin-bottom="0in" style:contextual-spacing="false"/>
    </style:style>
    <style:style style:name="P50" style:family="paragraph" style:parent-style-name="Text_20_body" style:list-style-name="L134"/>
    <style:style style:name="P51" style:family="paragraph" style:parent-style-name="Text_20_body" style:list-style-name="L134">
      <style:paragraph-properties fo:margin-top="0in" fo:margin-bottom="0in" style:contextual-spacing="false"/>
    </style:style>
    <style:style style:name="P52" style:family="paragraph" style:parent-style-name="Text_20_body" style:list-style-name="L135"/>
    <style:style style:name="P53" style:family="paragraph" style:parent-style-name="Text_20_body" style:list-style-name="L135">
      <style:paragraph-properties fo:margin-top="0in" fo:margin-bottom="0in" style:contextual-spacing="false"/>
    </style:style>
    <style:style style:name="P54" style:family="paragraph" style:parent-style-name="Text_20_body" style:list-style-name="L136"/>
    <style:style style:name="P55" style:family="paragraph" style:parent-style-name="Text_20_body" style:list-style-name="L136">
      <style:paragraph-properties fo:margin-top="0in" fo:margin-bottom="0in" style:contextual-spacing="false"/>
    </style:style>
    <style:style style:name="P56" style:family="paragraph" style:parent-style-name="Text_20_body" style:list-style-name="L137"/>
    <style:style style:name="P57" style:family="paragraph" style:parent-style-name="Text_20_body" style:list-style-name="L137">
      <style:paragraph-properties fo:margin-top="0in" fo:margin-bottom="0in" style:contextual-spacing="false"/>
    </style:style>
    <style:style style:name="P58" style:family="paragraph" style:parent-style-name="Text_20_body" style:list-style-name="L138"/>
    <style:style style:name="P59" style:family="paragraph" style:parent-style-name="Text_20_body" style:list-style-name="L138">
      <style:paragraph-properties fo:margin-top="0in" fo:margin-bottom="0in" style:contextual-spacing="false"/>
    </style:style>
    <style:style style:name="P60" style:family="paragraph" style:parent-style-name="Text_20_body" style:list-style-name="L139"/>
    <style:style style:name="P61" style:family="paragraph" style:parent-style-name="Text_20_body" style:list-style-name="L139">
      <style:paragraph-properties fo:margin-top="0in" fo:margin-bottom="0in" style:contextual-spacing="false"/>
    </style:style>
    <style:style style:name="P62" style:family="paragraph" style:parent-style-name="Text_20_body" style:list-style-name="L140"/>
    <style:style style:name="P63" style:family="paragraph" style:parent-style-name="Text_20_body" style:list-style-name="L140">
      <style:paragraph-properties fo:margin-top="0in" fo:margin-bottom="0in" style:contextual-spacing="false"/>
    </style:style>
    <style:style style:name="P64" style:family="paragraph" style:parent-style-name="Text_20_body" style:list-style-name="L141"/>
    <style:style style:name="P65" style:family="paragraph" style:parent-style-name="Text_20_body" style:list-style-name="L141">
      <style:paragraph-properties fo:margin-top="0in" fo:margin-bottom="0in" style:contextual-spacing="false"/>
    </style:style>
    <style:style style:name="P66" style:family="paragraph" style:parent-style-name="Text_20_body" style:list-style-name="L142"/>
    <style:style style:name="P67" style:family="paragraph" style:parent-style-name="Text_20_body" style:list-style-name="L142">
      <style:paragraph-properties fo:margin-top="0in" fo:margin-bottom="0in" style:contextual-spacing="false"/>
    </style:style>
    <style:style style:name="P68" style:family="paragraph" style:parent-style-name="Text_20_body" style:list-style-name="L143"/>
    <style:style style:name="P69" style:family="paragraph" style:parent-style-name="Text_20_body" style:list-style-name="L143">
      <style:paragraph-properties fo:margin-top="0in" fo:margin-bottom="0in" style:contextual-spacing="false"/>
    </style:style>
    <style:style style:name="P70" style:family="paragraph" style:parent-style-name="Text_20_body" style:list-style-name="L144"/>
    <style:style style:name="P71" style:family="paragraph" style:parent-style-name="Text_20_body" style:list-style-name="L144">
      <style:paragraph-properties fo:margin-top="0in" fo:margin-bottom="0in" style:contextual-spacing="false"/>
    </style:style>
    <style:style style:name="P72" style:family="paragraph" style:parent-style-name="Text_20_body" style:list-style-name="L145"/>
    <style:style style:name="P73" style:family="paragraph" style:parent-style-name="Text_20_body" style:list-style-name="L145">
      <style:paragraph-properties fo:margin-top="0in" fo:margin-bottom="0in" style:contextual-spacing="false"/>
    </style:style>
    <style:style style:name="P74" style:family="paragraph" style:parent-style-name="Text_20_body" style:list-style-name="L146"/>
    <style:style style:name="P75" style:family="paragraph" style:parent-style-name="Text_20_body" style:list-style-name="L147"/>
    <style:style style:name="P76" style:family="paragraph" style:parent-style-name="Text_20_body" style:list-style-name="L147">
      <style:paragraph-properties fo:margin-top="0in" fo:margin-bottom="0in" style:contextual-spacing="false"/>
    </style:style>
    <style:style style:name="P77" style:family="paragraph" style:parent-style-name="Text_20_body" style:list-style-name="L148"/>
    <style:style style:name="P78" style:family="paragraph" style:parent-style-name="Text_20_body" style:list-style-name="L149"/>
    <style:style style:name="P79" style:family="paragraph" style:parent-style-name="Text_20_body" style:list-style-name="L149">
      <style:paragraph-properties fo:margin-top="0in" fo:margin-bottom="0in" style:contextual-spacing="false"/>
    </style:style>
    <style:style style:name="P80" style:family="paragraph" style:parent-style-name="Text_20_body" style:list-style-name="L150"/>
    <style:style style:name="P81" style:family="paragraph" style:parent-style-name="Text_20_body" style:list-style-name="L151"/>
    <style:style style:name="P82" style:family="paragraph" style:parent-style-name="Text_20_body" style:list-style-name="L151">
      <style:paragraph-properties fo:margin-top="0in" fo:margin-bottom="0in" style:contextual-spacing="false"/>
    </style:style>
    <style:style style:name="P83" style:family="paragraph" style:parent-style-name="Text_20_body" style:list-style-name="L152"/>
    <style:style style:name="P84" style:family="paragraph" style:parent-style-name="Text_20_body" style:list-style-name="L152">
      <style:paragraph-properties fo:margin-top="0in" fo:margin-bottom="0in" style:contextual-spacing="false"/>
    </style:style>
    <style:style style:name="P85" style:family="paragraph" style:parent-style-name="Text_20_body" style:list-style-name="L153"/>
    <style:style style:name="P86" style:family="paragraph" style:parent-style-name="Text_20_body" style:list-style-name="L154"/>
    <style:style style:name="P87" style:family="paragraph" style:parent-style-name="Text_20_body" style:list-style-name="L154">
      <style:paragraph-properties fo:margin-top="0in" fo:margin-bottom="0in" style:contextual-spacing="false"/>
    </style:style>
    <style:style style:name="P88" style:family="paragraph" style:parent-style-name="Text_20_body" style:list-style-name="L155"/>
    <style:style style:name="P89" style:family="paragraph" style:parent-style-name="Text_20_body" style:list-style-name="L155">
      <style:paragraph-properties fo:margin-top="0in" fo:margin-bottom="0in" style:contextual-spacing="false"/>
    </style:style>
    <style:style style:name="P90" style:family="paragraph" style:parent-style-name="Text_20_body" style:list-style-name="L156"/>
    <style:style style:name="P91" style:family="paragraph" style:parent-style-name="Text_20_body" style:list-style-name="L156">
      <style:paragraph-properties fo:margin-top="0in" fo:margin-bottom="0in" style:contextual-spacing="false"/>
    </style:style>
    <style:style style:name="P92" style:family="paragraph" style:parent-style-name="Text_20_body" style:list-style-name="L157"/>
    <style:style style:name="P93" style:family="paragraph" style:parent-style-name="Text_20_body" style:list-style-name="L157">
      <style:paragraph-properties fo:margin-top="0in" fo:margin-bottom="0in" style:contextual-spacing="false"/>
    </style:style>
    <style:style style:name="P94" style:family="paragraph" style:parent-style-name="Text_20_body" style:list-style-name="L158"/>
    <style:style style:name="P95" style:family="paragraph" style:parent-style-name="Text_20_body" style:list-style-name="L158">
      <style:paragraph-properties fo:margin-top="0in" fo:margin-bottom="0in" style:contextual-spacing="false"/>
    </style:style>
    <style:style style:name="P96" style:family="paragraph" style:parent-style-name="Text_20_body" style:list-style-name="L159"/>
    <style:style style:name="P97" style:family="paragraph" style:parent-style-name="Text_20_body" style:list-style-name="L159">
      <style:paragraph-properties fo:margin-top="0in" fo:margin-bottom="0in" style:contextual-spacing="false"/>
    </style:style>
    <style:style style:name="P98" style:family="paragraph" style:parent-style-name="Text_20_body" style:list-style-name="L160"/>
    <style:style style:name="P99" style:family="paragraph" style:parent-style-name="Text_20_body" style:list-style-name="L160">
      <style:paragraph-properties fo:margin-top="0in" fo:margin-bottom="0in" style:contextual-spacing="false"/>
    </style:style>
    <style:style style:name="P100" style:family="paragraph" style:parent-style-name="Text_20_body" style:list-style-name="L161"/>
    <style:style style:name="P101" style:family="paragraph" style:parent-style-name="Text_20_body" style:list-style-name="L161">
      <style:paragraph-properties fo:margin-top="0in" fo:margin-bottom="0in" style:contextual-spacing="false"/>
    </style:style>
    <style:style style:name="P102" style:family="paragraph" style:parent-style-name="Text_20_body" style:list-style-name="L162"/>
    <style:style style:name="P103" style:family="paragraph" style:parent-style-name="Text_20_body" style:list-style-name="L162">
      <style:paragraph-properties fo:margin-top="0in" fo:margin-bottom="0in" style:contextual-spacing="false"/>
    </style:style>
    <style:style style:name="P104" style:family="paragraph" style:parent-style-name="Text_20_body" style:list-style-name="L163"/>
    <style:style style:name="P105" style:family="paragraph" style:parent-style-name="Text_20_body" style:list-style-name="L163">
      <style:paragraph-properties fo:margin-top="0in" fo:margin-bottom="0in" style:contextual-spacing="false"/>
    </style:style>
    <style:style style:name="P106" style:family="paragraph" style:parent-style-name="Text_20_body" style:list-style-name="L164"/>
    <style:style style:name="P107" style:family="paragraph" style:parent-style-name="Text_20_body" style:list-style-name="L164">
      <style:paragraph-properties fo:margin-top="0in" fo:margin-bottom="0in" style:contextual-spacing="false"/>
    </style:style>
    <style:style style:name="P108" style:family="paragraph" style:parent-style-name="Text_20_body" style:list-style-name="L165"/>
    <style:style style:name="P109" style:family="paragraph" style:parent-style-name="Text_20_body" style:list-style-name="L165">
      <style:paragraph-properties fo:margin-top="0in" fo:margin-bottom="0in" style:contextual-spacing="false"/>
    </style:style>
    <style:style style:name="P110" style:family="paragraph" style:parent-style-name="Text_20_body" style:list-style-name="L166"/>
    <style:style style:name="P111" style:family="paragraph" style:parent-style-name="Text_20_body" style:list-style-name="L166">
      <style:paragraph-properties fo:margin-top="0in" fo:margin-bottom="0in" style:contextual-spacing="false"/>
    </style:style>
    <style:style style:name="P112" style:family="paragraph" style:parent-style-name="Text_20_body" style:list-style-name="L167"/>
    <style:style style:name="P113" style:family="paragraph" style:parent-style-name="Text_20_body" style:list-style-name="L167">
      <style:paragraph-properties fo:margin-top="0in" fo:margin-bottom="0in" style:contextual-spacing="false"/>
    </style:style>
    <style:style style:name="P114" style:family="paragraph" style:parent-style-name="Text_20_body" style:list-style-name="L168"/>
    <style:style style:name="P115" style:family="paragraph" style:parent-style-name="Text_20_body" style:list-style-name="L168">
      <style:paragraph-properties fo:margin-top="0in" fo:margin-bottom="0in" style:contextual-spacing="false"/>
    </style:style>
    <style:style style:name="P116" style:family="paragraph" style:parent-style-name="Text_20_body" style:list-style-name="L169"/>
    <style:style style:name="P117" style:family="paragraph" style:parent-style-name="Text_20_body" style:list-style-name="L169">
      <style:paragraph-properties fo:margin-top="0in" fo:margin-bottom="0in" style:contextual-spacing="false"/>
    </style:style>
    <style:style style:name="P118" style:family="paragraph" style:parent-style-name="Text_20_body" style:list-style-name="L170"/>
    <style:style style:name="P119" style:family="paragraph" style:parent-style-name="Text_20_body" style:list-style-name="L170">
      <style:paragraph-properties fo:margin-top="0in" fo:margin-bottom="0in" style:contextual-spacing="false"/>
    </style:style>
    <style:style style:name="P120" style:family="paragraph" style:parent-style-name="Text_20_body" style:list-style-name="L171"/>
    <style:style style:name="P121" style:family="paragraph" style:parent-style-name="Text_20_body" style:list-style-name="L171">
      <style:paragraph-properties fo:margin-top="0in" fo:margin-bottom="0in" style:contextual-spacing="false"/>
    </style:style>
    <style:style style:name="P122" style:family="paragraph" style:parent-style-name="Text_20_body" style:list-style-name="L172"/>
    <style:style style:name="P123" style:family="paragraph" style:parent-style-name="Text_20_body" style:list-style-name="L172">
      <style:paragraph-properties fo:margin-top="0in" fo:margin-bottom="0in" style:contextual-spacing="false"/>
    </style:style>
    <style:style style:name="P124" style:family="paragraph" style:parent-style-name="Text_20_body" style:list-style-name="L173"/>
    <style:style style:name="P125" style:family="paragraph" style:parent-style-name="Text_20_body" style:list-style-name="L173">
      <style:paragraph-properties fo:margin-top="0in" fo:margin-bottom="0in" style:contextual-spacing="false"/>
    </style:style>
    <style:style style:name="P126" style:family="paragraph" style:parent-style-name="Text_20_body" style:list-style-name="L220"/>
    <style:style style:name="P127" style:family="paragraph" style:parent-style-name="Text_20_body" style:list-style-name="L220">
      <style:paragraph-properties fo:margin-top="0in" fo:margin-bottom="0in" style:contextual-spacing="false"/>
    </style:style>
    <style:style style:name="P128" style:family="paragraph" style:parent-style-name="Text_20_body" style:list-style-name="L221"/>
    <style:style style:name="P129" style:family="paragraph" style:parent-style-name="Text_20_body" style:list-style-name="L221">
      <style:paragraph-properties fo:margin-top="0in" fo:margin-bottom="0in" style:contextual-spacing="false"/>
    </style:style>
    <style:style style:name="P130" style:family="paragraph" style:parent-style-name="Text_20_body" style:list-style-name="L222"/>
    <style:style style:name="P131" style:family="paragraph" style:parent-style-name="Text_20_body" style:list-style-name="L222">
      <style:paragraph-properties fo:margin-top="0in" fo:margin-bottom="0in" style:contextual-spacing="false"/>
    </style:style>
    <style:style style:name="P132" style:family="paragraph" style:parent-style-name="Text_20_body" style:list-style-name="L223"/>
    <style:style style:name="P133" style:family="paragraph" style:parent-style-name="Text_20_body" style:list-style-name="L223">
      <style:paragraph-properties fo:margin-top="0in" fo:margin-bottom="0in" style:contextual-spacing="false"/>
    </style:style>
    <style:style style:name="P134" style:family="paragraph" style:parent-style-name="Text_20_body" style:list-style-name="L225"/>
    <style:style style:name="P135" style:family="paragraph" style:parent-style-name="Text_20_body" style:list-style-name="L225">
      <style:paragraph-properties fo:margin-top="0in" fo:margin-bottom="0in" style:contextual-spacing="false"/>
    </style:style>
    <style:style style:name="P136" style:family="paragraph" style:parent-style-name="Text_20_body" style:list-style-name="L226"/>
    <style:style style:name="P137" style:family="paragraph" style:parent-style-name="Text_20_body" style:list-style-name="L226">
      <style:paragraph-properties fo:margin-top="0in" fo:margin-bottom="0in" style:contextual-spacing="false"/>
    </style:style>
    <style:style style:name="P138" style:family="paragraph" style:parent-style-name="Text_20_body" style:list-style-name="L227"/>
    <style:style style:name="P139" style:family="paragraph" style:parent-style-name="Text_20_body" style:list-style-name="L227">
      <style:paragraph-properties fo:margin-top="0in" fo:margin-bottom="0in" style:contextual-spacing="false"/>
    </style:style>
    <style:style style:name="P140" style:family="paragraph" style:parent-style-name="Text_20_body" style:list-style-name="L228"/>
    <style:style style:name="P141" style:family="paragraph" style:parent-style-name="Text_20_body" style:list-style-name="L228">
      <style:paragraph-properties fo:margin-top="0in" fo:margin-bottom="0in" style:contextual-spacing="false"/>
    </style:style>
    <style:style style:name="P142" style:family="paragraph" style:parent-style-name="Text_20_body" style:list-style-name="L229"/>
    <style:style style:name="P143" style:family="paragraph" style:parent-style-name="Text_20_body" style:list-style-name="L229">
      <style:paragraph-properties fo:margin-top="0in" fo:margin-bottom="0in" style:contextual-spacing="false"/>
    </style:style>
    <style:style style:name="P144" style:family="paragraph" style:parent-style-name="Text_20_body" style:list-style-name="L230"/>
    <style:style style:name="P145" style:family="paragraph" style:parent-style-name="Text_20_body" style:list-style-name="L230">
      <style:paragraph-properties fo:margin-top="0in" fo:margin-bottom="0in" style:contextual-spacing="false"/>
    </style:style>
    <style:style style:name="P146" style:family="paragraph" style:parent-style-name="Text_20_body" style:list-style-name="L231"/>
    <style:style style:name="P147" style:family="paragraph" style:parent-style-name="Text_20_body" style:list-style-name="L231">
      <style:paragraph-properties fo:margin-top="0in" fo:margin-bottom="0in" style:contextual-spacing="false"/>
    </style:style>
    <style:style style:name="P148" style:family="paragraph" style:parent-style-name="Text_20_body" style:list-style-name="L232"/>
    <style:style style:name="P149" style:family="paragraph" style:parent-style-name="Text_20_body" style:list-style-name="L232">
      <style:paragraph-properties fo:margin-top="0in" fo:margin-bottom="0in" style:contextual-spacing="false"/>
    </style:style>
    <style:style style:name="P150" style:family="paragraph" style:parent-style-name="Text_20_body" style:list-style-name="L233"/>
    <style:style style:name="P151" style:family="paragraph" style:parent-style-name="Text_20_body" style:list-style-name="L233">
      <style:paragraph-properties fo:margin-top="0in" fo:margin-bottom="0in" style:contextual-spacing="false"/>
    </style:style>
    <style:style style:name="P152" style:family="paragraph" style:parent-style-name="Text_20_body" style:list-style-name="L235"/>
    <style:style style:name="P153" style:family="paragraph" style:parent-style-name="Text_20_body" style:list-style-name="L235">
      <style:paragraph-properties fo:margin-top="0in" fo:margin-bottom="0in" style:contextual-spacing="false"/>
    </style:style>
    <style:style style:name="P154" style:family="paragraph" style:parent-style-name="Text_20_body" style:list-style-name="L236"/>
    <style:style style:name="P155" style:family="paragraph" style:parent-style-name="Text_20_body" style:list-style-name="L236">
      <style:paragraph-properties fo:margin-top="0in" fo:margin-bottom="0in" style:contextual-spacing="false"/>
    </style:style>
    <style:style style:name="P156" style:family="paragraph" style:parent-style-name="Text_20_body" style:list-style-name="L237"/>
    <style:style style:name="P157" style:family="paragraph" style:parent-style-name="Text_20_body" style:list-style-name="L237">
      <style:paragraph-properties fo:margin-top="0in" fo:margin-bottom="0in" style:contextual-spacing="false"/>
    </style:style>
    <style:style style:name="P158" style:family="paragraph" style:parent-style-name="Text_20_body" style:list-style-name="L238"/>
    <style:style style:name="P159" style:family="paragraph" style:parent-style-name="Text_20_body" style:list-style-name="L238">
      <style:paragraph-properties fo:margin-top="0in" fo:margin-bottom="0in" style:contextual-spacing="false"/>
    </style:style>
    <style:style style:name="P160" style:family="paragraph" style:parent-style-name="Text_20_body" style:list-style-name="L239"/>
    <style:style style:name="P161" style:family="paragraph" style:parent-style-name="Text_20_body" style:list-style-name="L239">
      <style:paragraph-properties fo:margin-top="0in" fo:margin-bottom="0in" style:contextual-spacing="false"/>
    </style:style>
    <style:style style:name="P162" style:family="paragraph" style:parent-style-name="Text_20_body" style:list-style-name="L240"/>
    <style:style style:name="P163" style:family="paragraph" style:parent-style-name="Text_20_body" style:list-style-name="L240">
      <style:paragraph-properties fo:margin-top="0in" fo:margin-bottom="0in" style:contextual-spacing="false"/>
    </style:style>
    <style:style style:name="P164" style:family="paragraph" style:parent-style-name="Text_20_body" style:list-style-name="L242"/>
    <style:style style:name="P165" style:family="paragraph" style:parent-style-name="Text_20_body" style:list-style-name="L243"/>
    <style:style style:name="P166" style:family="paragraph" style:parent-style-name="Text_20_body" style:list-style-name="L244"/>
    <style:style style:name="P167" style:family="paragraph" style:parent-style-name="Text_20_body" style:list-style-name="L244">
      <style:paragraph-properties fo:margin-top="0in" fo:margin-bottom="0in" style:contextual-spacing="false"/>
    </style:style>
    <style:style style:name="P168" style:family="paragraph" style:parent-style-name="Text_20_body" style:list-style-name="L281"/>
    <style:style style:name="P169" style:family="paragraph" style:parent-style-name="Text_20_body" style:list-style-name="L281">
      <style:paragraph-properties fo:margin-top="0in" fo:margin-bottom="0in" style:contextual-spacing="false"/>
    </style:style>
    <style:style style:name="P170" style:family="paragraph" style:parent-style-name="Text_20_body" style:list-style-name="L282"/>
    <style:style style:name="P171" style:family="paragraph" style:parent-style-name="Text_20_body" style:list-style-name="L282">
      <style:paragraph-properties fo:margin-top="0in" fo:margin-bottom="0in" style:contextual-spacing="false"/>
    </style:style>
    <style:style style:name="P172" style:family="paragraph" style:parent-style-name="Text_20_body" style:list-style-name="L283"/>
    <style:style style:name="P173" style:family="paragraph" style:parent-style-name="Text_20_body" style:list-style-name="L283">
      <style:paragraph-properties fo:margin-top="0in" fo:margin-bottom="0in" style:contextual-spacing="false"/>
    </style:style>
    <style:style style:name="P174" style:family="paragraph" style:parent-style-name="Text_20_body" style:list-style-name="L284"/>
    <style:style style:name="P175" style:family="paragraph" style:parent-style-name="Text_20_body" style:list-style-name="L284">
      <style:paragraph-properties fo:margin-top="0in" fo:margin-bottom="0in" style:contextual-spacing="false"/>
    </style:style>
    <style:style style:name="P176" style:family="paragraph" style:parent-style-name="Text_20_body" style:list-style-name="L285"/>
    <style:style style:name="P177" style:family="paragraph" style:parent-style-name="Text_20_body" style:list-style-name="L285">
      <style:paragraph-properties fo:margin-top="0in" fo:margin-bottom="0in" style:contextual-spacing="false"/>
    </style:style>
    <style:style style:name="P178" style:family="paragraph" style:parent-style-name="Text_20_body" style:list-style-name="L286"/>
    <style:style style:name="P179" style:family="paragraph" style:parent-style-name="Text_20_body" style:list-style-name="L286">
      <style:paragraph-properties fo:margin-top="0in" fo:margin-bottom="0in" style:contextual-spacing="false"/>
    </style:style>
    <style:style style:name="P180" style:family="paragraph" style:parent-style-name="Text_20_body" style:list-style-name="L287"/>
    <style:style style:name="P181" style:family="paragraph" style:parent-style-name="Text_20_body" style:list-style-name="L287">
      <style:paragraph-properties fo:margin-top="0in" fo:margin-bottom="0in" style:contextual-spacing="false"/>
    </style:style>
    <style:style style:name="P182" style:family="paragraph" style:parent-style-name="Text_20_body" style:list-style-name="L290"/>
    <style:style style:name="P183" style:family="paragraph" style:parent-style-name="Text_20_body" style:list-style-name="L290">
      <style:paragraph-properties fo:margin-top="0in" fo:margin-bottom="0in" style:contextual-spacing="false"/>
    </style:style>
    <style:style style:name="P184" style:family="paragraph" style:parent-style-name="Text_20_body" style:list-style-name="L291"/>
    <style:style style:name="P185" style:family="paragraph" style:parent-style-name="Text_20_body" style:list-style-name="L291">
      <style:paragraph-properties fo:margin-top="0in" fo:margin-bottom="0in" style:contextual-spacing="false"/>
    </style:style>
    <style:style style:name="P186" style:family="paragraph" style:parent-style-name="Text_20_body" style:list-style-name="L292"/>
    <style:style style:name="P187" style:family="paragraph" style:parent-style-name="Text_20_body" style:list-style-name="L292">
      <style:paragraph-properties fo:margin-top="0in" fo:margin-bottom="0in" style:contextual-spacing="false"/>
    </style:style>
    <style:style style:name="P188" style:family="paragraph" style:parent-style-name="Text_20_body" style:list-style-name="L293"/>
    <style:style style:name="P189" style:family="paragraph" style:parent-style-name="Text_20_body" style:list-style-name="L293">
      <style:paragraph-properties fo:margin-top="0in" fo:margin-bottom="0in" style:contextual-spacing="false"/>
    </style:style>
    <style:style style:name="P190" style:family="paragraph" style:parent-style-name="Text_20_body" style:list-style-name="L294"/>
    <style:style style:name="P191" style:family="paragraph" style:parent-style-name="Text_20_body" style:list-style-name="L294">
      <style:paragraph-properties fo:margin-top="0in" fo:margin-bottom="0in" style:contextual-spacing="false"/>
    </style:style>
    <style:style style:name="P192" style:family="paragraph" style:parent-style-name="Text_20_body" style:list-style-name="L295"/>
    <style:style style:name="P193" style:family="paragraph" style:parent-style-name="Text_20_body" style:list-style-name="L295">
      <style:paragraph-properties fo:margin-top="0in" fo:margin-bottom="0in" style:contextual-spacing="false"/>
    </style:style>
    <style:style style:name="P194" style:family="paragraph" style:parent-style-name="Text_20_body" style:list-style-name="L296"/>
    <style:style style:name="P195" style:family="paragraph" style:parent-style-name="Text_20_body" style:list-style-name="L296">
      <style:paragraph-properties fo:margin-top="0in" fo:margin-bottom="0in" style:contextual-spacing="false"/>
    </style:style>
    <style:style style:name="P196" style:family="paragraph" style:parent-style-name="Text_20_body" style:list-style-name="L297"/>
    <style:style style:name="P197" style:family="paragraph" style:parent-style-name="Text_20_body" style:list-style-name="L297">
      <style:paragraph-properties fo:margin-top="0in" fo:margin-bottom="0in" style:contextual-spacing="false"/>
    </style:style>
    <style:style style:name="P198" style:family="paragraph" style:parent-style-name="Text_20_body" style:list-style-name="L298"/>
    <style:style style:name="P199" style:family="paragraph" style:parent-style-name="Text_20_body" style:list-style-name="L298">
      <style:paragraph-properties fo:margin-top="0in" fo:margin-bottom="0in" style:contextual-spacing="false"/>
    </style:style>
    <style:style style:name="P200" style:family="paragraph" style:parent-style-name="Text_20_body" style:list-style-name="L299"/>
    <style:style style:name="P201" style:family="paragraph" style:parent-style-name="Text_20_body" style:list-style-name="L299">
      <style:paragraph-properties fo:margin-top="0in" fo:margin-bottom="0in" style:contextual-spacing="false"/>
    </style:style>
    <style:style style:name="P202" style:family="paragraph" style:parent-style-name="Text_20_body" style:list-style-name="L300"/>
    <style:style style:name="P203" style:family="paragraph" style:parent-style-name="Text_20_body" style:list-style-name="L300">
      <style:paragraph-properties fo:margin-top="0in" fo:margin-bottom="0in" style:contextual-spacing="false"/>
    </style:style>
    <style:style style:name="P204" style:family="paragraph" style:parent-style-name="Text_20_body" style:list-style-name="L303"/>
    <style:style style:name="P205" style:family="paragraph" style:parent-style-name="Text_20_body" style:list-style-name="L303">
      <style:paragraph-properties fo:margin-top="0in" fo:margin-bottom="0in" style:contextual-spacing="false"/>
    </style:style>
    <style:style style:name="P206" style:family="paragraph" style:parent-style-name="Text_20_body" style:list-style-name="L304"/>
    <style:style style:name="P207" style:family="paragraph" style:parent-style-name="Text_20_body" style:list-style-name="L304">
      <style:paragraph-properties fo:margin-top="0in" fo:margin-bottom="0in" style:contextual-spacing="false"/>
    </style:style>
    <style:style style:name="P208" style:family="paragraph" style:parent-style-name="Text_20_body" style:list-style-name="L305"/>
    <style:style style:name="P209" style:family="paragraph" style:parent-style-name="Text_20_body" style:list-style-name="L305">
      <style:paragraph-properties fo:margin-top="0in" fo:margin-bottom="0in" style:contextual-spacing="false"/>
    </style:style>
    <style:style style:name="P210" style:family="paragraph" style:parent-style-name="Text_20_body" style:list-style-name="L306"/>
    <style:style style:name="P211" style:family="paragraph" style:parent-style-name="Text_20_body" style:list-style-name="L306">
      <style:paragraph-properties fo:margin-top="0in" fo:margin-bottom="0in" style:contextual-spacing="false"/>
    </style:style>
    <style:style style:name="P212" style:family="paragraph" style:parent-style-name="Text_20_body" style:list-style-name="L307"/>
    <style:style style:name="P213" style:family="paragraph" style:parent-style-name="Text_20_body" style:list-style-name="L307">
      <style:paragraph-properties fo:margin-top="0in" fo:margin-bottom="0in" style:contextual-spacing="false"/>
    </style:style>
    <style:style style:name="P214" style:family="paragraph" style:parent-style-name="Text_20_body" style:list-style-name="L308"/>
    <style:style style:name="P215" style:family="paragraph" style:parent-style-name="Text_20_body" style:list-style-name="L308">
      <style:paragraph-properties fo:margin-top="0in" fo:margin-bottom="0in" style:contextual-spacing="false"/>
    </style:style>
    <style:style style:name="P216" style:family="paragraph" style:parent-style-name="Text_20_body" style:list-style-name="L309"/>
    <style:style style:name="P217" style:family="paragraph" style:parent-style-name="Text_20_body" style:list-style-name="L309">
      <style:paragraph-properties fo:margin-top="0in" fo:margin-bottom="0in" style:contextual-spacing="false"/>
    </style:style>
    <style:style style:name="P218" style:family="paragraph" style:parent-style-name="Text_20_body" style:list-style-name="L311"/>
    <style:style style:name="P219" style:family="paragraph" style:parent-style-name="Text_20_body" style:list-style-name="L311">
      <style:paragraph-properties fo:margin-top="0in" fo:margin-bottom="0in" style:contextual-spacing="false"/>
    </style:style>
    <style:style style:name="P220" style:family="paragraph" style:parent-style-name="Text_20_body" style:list-style-name="L312"/>
    <style:style style:name="P221" style:family="paragraph" style:parent-style-name="Text_20_body" style:list-style-name="L312">
      <style:paragraph-properties fo:margin-top="0in" fo:margin-bottom="0in" style:contextual-spacing="false"/>
    </style:style>
    <style:style style:name="P222" style:family="paragraph" style:parent-style-name="Text_20_body" style:list-style-name="L313"/>
    <style:style style:name="P223" style:family="paragraph" style:parent-style-name="Text_20_body" style:list-style-name="L313">
      <style:paragraph-properties fo:margin-top="0in" fo:margin-bottom="0in" style:contextual-spacing="false"/>
    </style:style>
    <style:style style:name="P224" style:family="paragraph" style:parent-style-name="Text_20_body" style:list-style-name="L314"/>
    <style:style style:name="P225" style:family="paragraph" style:parent-style-name="Text_20_body" style:list-style-name="L314">
      <style:paragraph-properties fo:margin-top="0in" fo:margin-bottom="0in" style:contextual-spacing="false"/>
    </style:style>
    <style:style style:name="P226" style:family="paragraph" style:parent-style-name="Text_20_body" style:list-style-name="L315"/>
    <style:style style:name="P227" style:family="paragraph" style:parent-style-name="Text_20_body" style:list-style-name="L315">
      <style:paragraph-properties fo:margin-top="0in" fo:margin-bottom="0in" style:contextual-spacing="false"/>
    </style:style>
    <style:style style:name="P228" style:family="paragraph" style:parent-style-name="Text_20_body" style:list-style-name="L316"/>
    <style:style style:name="P229" style:family="paragraph" style:parent-style-name="Text_20_body" style:list-style-name="L316">
      <style:paragraph-properties fo:margin-top="0in" fo:margin-bottom="0in" style:contextual-spacing="false"/>
    </style:style>
    <style:style style:name="P230" style:family="paragraph" style:parent-style-name="Text_20_body" style:list-style-name="L317"/>
    <style:style style:name="P231" style:family="paragraph" style:parent-style-name="Text_20_body" style:list-style-name="L317">
      <style:paragraph-properties fo:margin-top="0in" fo:margin-bottom="0in" style:contextual-spacing="false"/>
    </style:style>
    <style:style style:name="P232" style:family="paragraph" style:parent-style-name="Text_20_body" style:list-style-name="L318"/>
    <style:style style:name="P233" style:family="paragraph" style:parent-style-name="Text_20_body" style:list-style-name="L318">
      <style:paragraph-properties fo:margin-top="0in" fo:margin-bottom="0in" style:contextual-spacing="false"/>
    </style:style>
    <style:style style:name="P234" style:family="paragraph" style:parent-style-name="Text_20_body" style:list-style-name="L319"/>
    <style:style style:name="P235" style:family="paragraph" style:parent-style-name="Text_20_body" style:list-style-name="L319">
      <style:paragraph-properties fo:margin-top="0in" fo:margin-bottom="0in" style:contextual-spacing="false"/>
    </style:style>
    <style:style style:name="P236" style:family="paragraph" style:parent-style-name="Text_20_body" style:list-style-name="L320"/>
    <style:style style:name="P237" style:family="paragraph" style:parent-style-name="Text_20_body" style:list-style-name="L320">
      <style:paragraph-properties fo:margin-top="0in" fo:margin-bottom="0in" style:contextual-spacing="false"/>
    </style:style>
    <style:style style:name="P238" style:family="paragraph" style:parent-style-name="Text_20_body" style:list-style-name="L321"/>
    <style:style style:name="P239" style:family="paragraph" style:parent-style-name="Text_20_body" style:list-style-name="L321">
      <style:paragraph-properties fo:margin-top="0in" fo:margin-bottom="0in" style:contextual-spacing="false"/>
    </style:style>
    <style:style style:name="P240" style:family="paragraph" style:parent-style-name="Text_20_body" style:list-style-name="L324"/>
    <style:style style:name="P241" style:family="paragraph" style:parent-style-name="Text_20_body" style:list-style-name="L324">
      <style:paragraph-properties fo:margin-top="0in" fo:margin-bottom="0in" style:contextual-spacing="false"/>
    </style:style>
    <style:style style:name="P242" style:family="paragraph" style:parent-style-name="Text_20_body" style:list-style-name="L325"/>
    <style:style style:name="P243" style:family="paragraph" style:parent-style-name="Text_20_body" style:list-style-name="L325">
      <style:paragraph-properties fo:margin-top="0in" fo:margin-bottom="0in" style:contextual-spacing="false"/>
    </style:style>
    <style:style style:name="P244" style:family="paragraph" style:parent-style-name="Text_20_body" style:list-style-name="L326"/>
    <style:style style:name="P245" style:family="paragraph" style:parent-style-name="Text_20_body" style:list-style-name="L326">
      <style:paragraph-properties fo:margin-top="0in" fo:margin-bottom="0in" style:contextual-spacing="false"/>
    </style:style>
    <style:style style:name="P246" style:family="paragraph" style:parent-style-name="Text_20_body" style:list-style-name="L327"/>
    <style:style style:name="P247" style:family="paragraph" style:parent-style-name="Text_20_body" style:list-style-name="L327">
      <style:paragraph-properties fo:margin-top="0in" fo:margin-bottom="0in" style:contextual-spacing="false"/>
    </style:style>
    <style:style style:name="P248" style:family="paragraph" style:parent-style-name="Text_20_body" style:list-style-name="L328"/>
    <style:style style:name="P249" style:family="paragraph" style:parent-style-name="Text_20_body" style:list-style-name="L328">
      <style:paragraph-properties fo:margin-top="0in" fo:margin-bottom="0in" style:contextual-spacing="false"/>
    </style:style>
    <style:style style:name="P250" style:family="paragraph" style:parent-style-name="Text_20_body" style:list-style-name="L329"/>
    <style:style style:name="P251" style:family="paragraph" style:parent-style-name="Text_20_body" style:list-style-name="L329">
      <style:paragraph-properties fo:margin-top="0in" fo:margin-bottom="0in" style:contextual-spacing="false"/>
    </style:style>
    <style:style style:name="P252" style:family="paragraph" style:parent-style-name="Text_20_body" style:list-style-name="L331"/>
    <style:style style:name="P253" style:family="paragraph" style:parent-style-name="Text_20_body" style:list-style-name="L331">
      <style:paragraph-properties fo:margin-top="0in" fo:margin-bottom="0in" style:contextual-spacing="false"/>
    </style:style>
    <style:style style:name="P254" style:family="paragraph" style:parent-style-name="Text_20_body" style:list-style-name="L332"/>
    <style:style style:name="P255" style:family="paragraph" style:parent-style-name="Text_20_body" style:list-style-name="L332">
      <style:paragraph-properties fo:margin-top="0in" fo:margin-bottom="0in" style:contextual-spacing="false"/>
    </style:style>
    <style:style style:name="P256" style:family="paragraph" style:parent-style-name="Text_20_body" style:list-style-name="L333"/>
    <style:style style:name="P257" style:family="paragraph" style:parent-style-name="Text_20_body" style:list-style-name="L333">
      <style:paragraph-properties fo:margin-top="0in" fo:margin-bottom="0in" style:contextual-spacing="false"/>
    </style:style>
    <style:style style:name="P258" style:family="paragraph" style:parent-style-name="Text_20_body" style:list-style-name="L334"/>
    <style:style style:name="P259" style:family="paragraph" style:parent-style-name="Text_20_body" style:list-style-name="L334">
      <style:paragraph-properties fo:margin-top="0in" fo:margin-bottom="0in" style:contextual-spacing="false"/>
    </style:style>
    <style:style style:name="P260" style:family="paragraph" style:parent-style-name="Text_20_body" style:list-style-name="L335"/>
    <style:style style:name="P261" style:family="paragraph" style:parent-style-name="Text_20_body" style:list-style-name="L335">
      <style:paragraph-properties fo:margin-top="0in" fo:margin-bottom="0in" style:contextual-spacing="false"/>
    </style:style>
    <style:style style:name="P262" style:family="paragraph" style:parent-style-name="Text_20_body" style:list-style-name="L336"/>
    <style:style style:name="P263" style:family="paragraph" style:parent-style-name="Text_20_body" style:list-style-name="L337"/>
    <style:style style:name="P264" style:family="paragraph" style:parent-style-name="Text_20_body" style:list-style-name="L337">
      <style:paragraph-properties fo:margin-top="0in" fo:margin-bottom="0in" style:contextual-spacing="false"/>
    </style:style>
    <style:style style:name="P265" style:family="paragraph" style:parent-style-name="Text_20_body" style:list-style-name="L338"/>
    <style:style style:name="P266" style:family="paragraph" style:parent-style-name="Text_20_body" style:list-style-name="L339"/>
    <style:style style:name="P267" style:family="paragraph" style:parent-style-name="Text_20_body" style:list-style-name="L339">
      <style:paragraph-properties fo:margin-top="0in" fo:margin-bottom="0in" style:contextual-spacing="false"/>
    </style:style>
    <style:style style:name="P268" style:family="paragraph" style:parent-style-name="Text_20_body" style:list-style-name="L340"/>
    <style:style style:name="P269" style:family="paragraph" style:parent-style-name="Text_20_body" style:list-style-name="L340">
      <style:paragraph-properties fo:margin-top="0in" fo:margin-bottom="0in" style:contextual-spacing="false"/>
    </style:style>
    <style:style style:name="P270" style:family="paragraph" style:parent-style-name="Text_20_body" style:list-style-name="L342"/>
    <style:style style:name="P271" style:family="paragraph" style:parent-style-name="Text_20_body" style:list-style-name="L342">
      <style:paragraph-properties fo:margin-top="0in" fo:margin-bottom="0in" style:contextual-spacing="false"/>
    </style:style>
    <style:style style:name="P272" style:family="paragraph" style:parent-style-name="Text_20_body" style:list-style-name="L343"/>
    <style:style style:name="P273" style:family="paragraph" style:parent-style-name="Text_20_body" style:list-style-name="L343">
      <style:paragraph-properties fo:margin-top="0in" fo:margin-bottom="0in" style:contextual-spacing="false"/>
    </style:style>
    <style:style style:name="P274" style:family="paragraph" style:parent-style-name="Text_20_body" style:list-style-name="L344"/>
    <style:style style:name="P275" style:family="paragraph" style:parent-style-name="Text_20_body" style:list-style-name="L344">
      <style:paragraph-properties fo:margin-top="0in" fo:margin-bottom="0in" style:contextual-spacing="false"/>
    </style:style>
    <style:style style:name="P276" style:family="paragraph" style:parent-style-name="Text_20_body" style:list-style-name="L345"/>
    <style:style style:name="P277" style:family="paragraph" style:parent-style-name="Text_20_body" style:list-style-name="L345">
      <style:paragraph-properties fo:margin-top="0in" fo:margin-bottom="0in" style:contextual-spacing="false"/>
    </style:style>
    <style:style style:name="P278" style:family="paragraph" style:parent-style-name="Text_20_body" style:list-style-name="L346"/>
    <style:style style:name="P279" style:family="paragraph" style:parent-style-name="Text_20_body" style:list-style-name="L346">
      <style:paragraph-properties fo:margin-top="0in" fo:margin-bottom="0in" style:contextual-spacing="false"/>
    </style:style>
    <style:style style:name="P280" style:family="paragraph" style:parent-style-name="Text_20_body" style:list-style-name="L347"/>
    <style:style style:name="P281" style:family="paragraph" style:parent-style-name="Text_20_body" style:list-style-name="L347">
      <style:paragraph-properties fo:margin-top="0in" fo:margin-bottom="0in" style:contextual-spacing="false"/>
    </style:style>
    <style:style style:name="P282" style:family="paragraph" style:parent-style-name="Text_20_body" style:list-style-name="L348"/>
    <style:style style:name="P283" style:family="paragraph" style:parent-style-name="Text_20_body" style:list-style-name="L348">
      <style:paragraph-properties fo:margin-top="0in" fo:margin-bottom="0in" style:contextual-spacing="false"/>
    </style:style>
    <style:style style:name="P284" style:family="paragraph" style:parent-style-name="Text_20_body" style:list-style-name="L358"/>
    <style:style style:name="P285" style:family="paragraph" style:parent-style-name="Text_20_body" style:list-style-name="L358">
      <style:paragraph-properties fo:margin-top="0in" fo:margin-bottom="0in" style:contextual-spacing="false"/>
    </style:style>
    <style:style style:name="P286" style:family="paragraph" style:parent-style-name="Text_20_body" style:list-style-name="L359"/>
    <style:style style:name="P287" style:family="paragraph" style:parent-style-name="Text_20_body" style:list-style-name="L359">
      <style:paragraph-properties fo:margin-top="0in" fo:margin-bottom="0in" style:contextual-spacing="false"/>
    </style:style>
    <style:style style:name="P288" style:family="paragraph" style:parent-style-name="Text_20_body" style:list-style-name="L360"/>
    <style:style style:name="P289" style:family="paragraph" style:parent-style-name="Text_20_body" style:list-style-name="L360">
      <style:paragraph-properties fo:margin-top="0in" fo:margin-bottom="0in" style:contextual-spacing="false"/>
    </style:style>
    <style:style style:name="P290" style:family="paragraph" style:parent-style-name="Text_20_body" style:list-style-name="L361"/>
    <style:style style:name="P291" style:family="paragraph" style:parent-style-name="Text_20_body" style:list-style-name="L361">
      <style:paragraph-properties fo:margin-top="0in" fo:margin-bottom="0in" style:contextual-spacing="false"/>
    </style:style>
    <style:style style:name="P292" style:family="paragraph" style:parent-style-name="Text_20_body" style:list-style-name="L362"/>
    <style:style style:name="P293" style:family="paragraph" style:parent-style-name="Text_20_body" style:list-style-name="L362">
      <style:paragraph-properties fo:margin-top="0in" fo:margin-bottom="0in" style:contextual-spacing="false"/>
    </style:style>
    <style:style style:name="P294" style:family="paragraph" style:parent-style-name="Text_20_body" style:list-style-name="L363"/>
    <style:style style:name="P295" style:family="paragraph" style:parent-style-name="Text_20_body" style:list-style-name="L363">
      <style:paragraph-properties fo:margin-top="0in" fo:margin-bottom="0in" style:contextual-spacing="false"/>
    </style:style>
    <style:style style:name="P296" style:family="paragraph" style:parent-style-name="Text_20_body" style:list-style-name="L364"/>
    <style:style style:name="P297" style:family="paragraph" style:parent-style-name="Text_20_body" style:list-style-name="L364">
      <style:paragraph-properties fo:margin-top="0in" fo:margin-bottom="0in" style:contextual-spacing="false"/>
    </style:style>
    <style:style style:name="P298" style:family="paragraph" style:parent-style-name="Text_20_body" style:list-style-name="L365"/>
    <style:style style:name="P299" style:family="paragraph" style:parent-style-name="Text_20_body" style:list-style-name="L365">
      <style:paragraph-properties fo:margin-top="0in" fo:margin-bottom="0in" style:contextual-spacing="false"/>
    </style:style>
    <style:style style:name="P300" style:family="paragraph" style:parent-style-name="Text_20_body" style:list-style-name="L366"/>
    <style:style style:name="P301" style:family="paragraph" style:parent-style-name="Text_20_body" style:list-style-name="L366">
      <style:paragraph-properties fo:margin-top="0in" fo:margin-bottom="0in" style:contextual-spacing="false"/>
    </style:style>
    <style:style style:name="P302" style:family="paragraph" style:parent-style-name="Text_20_body" style:list-style-name="L367"/>
    <style:style style:name="P303" style:family="paragraph" style:parent-style-name="Text_20_body" style:list-style-name="L367">
      <style:paragraph-properties fo:margin-top="0in" fo:margin-bottom="0in" style:contextual-spacing="false"/>
    </style:style>
    <style:style style:name="P304" style:family="paragraph" style:parent-style-name="Text_20_body" style:list-style-name="L368"/>
    <style:style style:name="P305" style:family="paragraph" style:parent-style-name="Text_20_body" style:list-style-name="L368">
      <style:paragraph-properties fo:margin-top="0in" fo:margin-bottom="0in" style:contextual-spacing="false"/>
    </style:style>
    <style:style style:name="P306" style:family="paragraph" style:parent-style-name="Text_20_body" style:list-style-name="L369"/>
    <style:style style:name="P307" style:family="paragraph" style:parent-style-name="Text_20_body" style:list-style-name="L369">
      <style:paragraph-properties fo:margin-top="0in" fo:margin-bottom="0in" style:contextual-spacing="false"/>
    </style:style>
    <style:style style:name="P308" style:family="paragraph" style:parent-style-name="Text_20_body" style:list-style-name="L370"/>
    <style:style style:name="P309" style:family="paragraph" style:parent-style-name="Text_20_body" style:list-style-name="L370">
      <style:paragraph-properties fo:margin-top="0in" fo:margin-bottom="0in" style:contextual-spacing="false"/>
    </style:style>
    <style:style style:name="P310" style:family="paragraph" style:parent-style-name="Text_20_body" style:list-style-name="L371"/>
    <style:style style:name="P311" style:family="paragraph" style:parent-style-name="Text_20_body" style:list-style-name="L371">
      <style:paragraph-properties fo:margin-top="0in" fo:margin-bottom="0in" style:contextual-spacing="false"/>
    </style:style>
    <style:style style:name="P312" style:family="paragraph" style:parent-style-name="Text_20_body" style:list-style-name="L374"/>
    <style:style style:name="P313" style:family="paragraph" style:parent-style-name="Text_20_body" style:list-style-name="L374">
      <style:paragraph-properties fo:margin-top="0in" fo:margin-bottom="0in" style:contextual-spacing="false"/>
    </style:style>
    <style:style style:name="P314" style:family="paragraph" style:parent-style-name="Text_20_body" style:list-style-name="L377"/>
    <style:style style:name="P315" style:family="paragraph" style:parent-style-name="Text_20_body" style:list-style-name="L377">
      <style:paragraph-properties fo:margin-top="0in" fo:margin-bottom="0in" style:contextual-spacing="false"/>
    </style:style>
    <style:style style:name="P316" style:family="paragraph" style:parent-style-name="Text_20_body" style:list-style-name="L378"/>
    <style:style style:name="P317" style:family="paragraph" style:parent-style-name="Text_20_body" style:list-style-name="L378">
      <style:paragraph-properties fo:margin-top="0in" fo:margin-bottom="0in" style:contextual-spacing="false"/>
    </style:style>
    <style:style style:name="P318" style:family="paragraph" style:parent-style-name="Text_20_body" style:list-style-name="L379"/>
    <style:style style:name="P319" style:family="paragraph" style:parent-style-name="Text_20_body" style:list-style-name="L379">
      <style:paragraph-properties fo:margin-top="0in" fo:margin-bottom="0in" style:contextual-spacing="false"/>
    </style:style>
    <style:style style:name="P320" style:family="paragraph" style:parent-style-name="Text_20_body" style:list-style-name="L380"/>
    <style:style style:name="P321" style:family="paragraph" style:parent-style-name="Text_20_body" style:list-style-name="L380">
      <style:paragraph-properties fo:margin-top="0in" fo:margin-bottom="0in" style:contextual-spacing="false"/>
    </style:style>
    <style:style style:name="P322" style:family="paragraph" style:parent-style-name="Text_20_body" style:list-style-name="L381"/>
    <style:style style:name="P323" style:family="paragraph" style:parent-style-name="Text_20_body" style:list-style-name="L381">
      <style:paragraph-properties fo:margin-top="0in" fo:margin-bottom="0in" style:contextual-spacing="false"/>
    </style:style>
    <style:style style:name="P324" style:family="paragraph" style:parent-style-name="Text_20_body" style:list-style-name="L382"/>
    <style:style style:name="P325" style:family="paragraph" style:parent-style-name="Text_20_body" style:list-style-name="L382">
      <style:paragraph-properties fo:margin-top="0in" fo:margin-bottom="0in" style:contextual-spacing="false"/>
    </style:style>
    <style:style style:name="P326" style:family="paragraph" style:parent-style-name="Text_20_body" style:list-style-name="L383"/>
    <style:style style:name="P327" style:family="paragraph" style:parent-style-name="Text_20_body" style:list-style-name="L383">
      <style:paragraph-properties fo:margin-top="0in" fo:margin-bottom="0in" style:contextual-spacing="false"/>
    </style:style>
    <style:style style:name="P328" style:family="paragraph" style:parent-style-name="Text_20_body" style:list-style-name="L384"/>
    <style:style style:name="P329" style:family="paragraph" style:parent-style-name="Text_20_body" style:list-style-name="L384">
      <style:paragraph-properties fo:margin-top="0in" fo:margin-bottom="0in" style:contextual-spacing="false"/>
    </style:style>
    <style:style style:name="P330" style:family="paragraph" style:parent-style-name="Text_20_body" style:list-style-name="L385"/>
    <style:style style:name="P331" style:family="paragraph" style:parent-style-name="Text_20_body" style:list-style-name="L385">
      <style:paragraph-properties fo:margin-top="0in" fo:margin-bottom="0in" style:contextual-spacing="false"/>
    </style:style>
    <style:style style:name="P332" style:family="paragraph" style:parent-style-name="Text_20_body" style:list-style-name="L386"/>
    <style:style style:name="P333" style:family="paragraph" style:parent-style-name="Text_20_body" style:list-style-name="L386">
      <style:paragraph-properties fo:margin-top="0in" fo:margin-bottom="0in" style:contextual-spacing="false"/>
    </style:style>
    <style:style style:name="P334" style:family="paragraph" style:parent-style-name="Text_20_body" style:list-style-name="L387"/>
    <style:style style:name="P335" style:family="paragraph" style:parent-style-name="Text_20_body" style:list-style-name="L387">
      <style:paragraph-properties fo:margin-top="0in" fo:margin-bottom="0in" style:contextual-spacing="false"/>
    </style:style>
    <style:style style:name="P336" style:family="paragraph" style:parent-style-name="Text_20_body" style:list-style-name="L388"/>
    <style:style style:name="P337" style:family="paragraph" style:parent-style-name="Text_20_body" style:list-style-name="L388">
      <style:paragraph-properties fo:margin-top="0in" fo:margin-bottom="0in" style:contextual-spacing="false"/>
    </style:style>
    <style:style style:name="P338" style:family="paragraph" style:parent-style-name="Text_20_body" style:list-style-name="L389"/>
    <style:style style:name="P339" style:family="paragraph" style:parent-style-name="Text_20_body" style:list-style-name="L389">
      <style:paragraph-properties fo:margin-top="0in" fo:margin-bottom="0in" style:contextual-spacing="false"/>
    </style:style>
    <style:style style:name="P340" style:family="paragraph" style:parent-style-name="Text_20_body" style:list-style-name="L390"/>
    <style:style style:name="P341" style:family="paragraph" style:parent-style-name="Text_20_body" style:list-style-name="L390">
      <style:paragraph-properties fo:margin-top="0in" fo:margin-bottom="0in" style:contextual-spacing="false"/>
    </style:style>
    <style:style style:name="P342" style:family="paragraph" style:parent-style-name="Text_20_body" style:list-style-name="L391"/>
    <style:style style:name="P343" style:family="paragraph" style:parent-style-name="Text_20_body" style:list-style-name="L391">
      <style:paragraph-properties fo:margin-top="0in" fo:margin-bottom="0in" style:contextual-spacing="false"/>
    </style:style>
    <style:style style:name="P344" style:family="paragraph" style:parent-style-name="Text_20_body" style:list-style-name="L392"/>
    <style:style style:name="P345" style:family="paragraph" style:parent-style-name="Text_20_body" style:list-style-name="L392">
      <style:paragraph-properties fo:margin-top="0in" fo:margin-bottom="0in" style:contextual-spacing="false"/>
    </style:style>
    <style:style style:name="P346" style:family="paragraph" style:parent-style-name="Text_20_body" style:list-style-name="L393"/>
    <style:style style:name="P347" style:family="paragraph" style:parent-style-name="Text_20_body" style:list-style-name="L393">
      <style:paragraph-properties fo:margin-top="0in" fo:margin-bottom="0in" style:contextual-spacing="false"/>
    </style:style>
    <style:style style:name="P348" style:family="paragraph" style:parent-style-name="Text_20_body">
      <style:text-properties officeooo:paragraph-rsid="005d400f"/>
    </style:style>
    <style:style style:name="P349" style:family="paragraph" style:parent-style-name="Text_20_body" style:list-style-name="L394"/>
    <style:style style:name="P350" style:family="paragraph" style:parent-style-name="Text_20_body" style:list-style-name="L394">
      <style:paragraph-properties fo:margin-top="0in" fo:margin-bottom="0in" style:contextual-spacing="false"/>
    </style:style>
    <style:style style:name="P351" style:family="paragraph" style:parent-style-name="Text_20_body" style:list-style-name="L395"/>
    <style:style style:name="P352" style:family="paragraph" style:parent-style-name="Text_20_body" style:list-style-name="L395">
      <style:paragraph-properties fo:margin-top="0in" fo:margin-bottom="0in" style:contextual-spacing="false"/>
    </style:style>
    <style:style style:name="P353" style:family="paragraph" style:parent-style-name="Text_20_body" style:list-style-name="L396"/>
    <style:style style:name="P354" style:family="paragraph" style:parent-style-name="Text_20_body" style:list-style-name="L396">
      <style:paragraph-properties fo:margin-top="0in" fo:margin-bottom="0in" style:contextual-spacing="false"/>
    </style:style>
    <style:style style:name="P355" style:family="paragraph" style:parent-style-name="Text_20_body" style:list-style-name="L397"/>
    <style:style style:name="P356" style:family="paragraph" style:parent-style-name="Text_20_body" style:list-style-name="L397">
      <style:paragraph-properties fo:margin-top="0in" fo:margin-bottom="0in" style:contextual-spacing="false"/>
    </style:style>
    <style:style style:name="P357" style:family="paragraph" style:parent-style-name="Text_20_body" style:list-style-name="L398"/>
    <style:style style:name="P358" style:family="paragraph" style:parent-style-name="Text_20_body" style:list-style-name="L398">
      <style:paragraph-properties fo:margin-top="0in" fo:margin-bottom="0in" style:contextual-spacing="false"/>
    </style:style>
    <style:style style:name="P359" style:family="paragraph" style:parent-style-name="Text_20_body" style:list-style-name="L399"/>
    <style:style style:name="P360" style:family="paragraph" style:parent-style-name="Text_20_body" style:list-style-name="L399">
      <style:paragraph-properties fo:margin-top="0in" fo:margin-bottom="0in" style:contextual-spacing="false"/>
    </style:style>
    <style:style style:name="P361" style:family="paragraph" style:parent-style-name="Text_20_body" style:list-style-name="L400"/>
    <style:style style:name="P362" style:family="paragraph" style:parent-style-name="Text_20_body" style:list-style-name="L400">
      <style:paragraph-properties fo:margin-top="0in" fo:margin-bottom="0in" style:contextual-spacing="false"/>
    </style:style>
    <style:style style:name="P363" style:family="paragraph" style:parent-style-name="Text_20_body" style:list-style-name="L401"/>
    <style:style style:name="P364" style:family="paragraph" style:parent-style-name="Text_20_body" style:list-style-name="L401">
      <style:paragraph-properties fo:margin-top="0in" fo:margin-bottom="0in" style:contextual-spacing="false"/>
    </style:style>
    <style:style style:name="P365" style:family="paragraph" style:parent-style-name="Text_20_body" style:list-style-name="L402"/>
    <style:style style:name="P366" style:family="paragraph" style:parent-style-name="Text_20_body" style:list-style-name="L402">
      <style:paragraph-properties fo:margin-top="0in" fo:margin-bottom="0in" style:contextual-spacing="false"/>
    </style:style>
    <style:style style:name="T1" style:family="text">
      <style:text-properties officeooo:rsid="0011b12c"/>
    </style:style>
    <style:style style:name="T2" style:family="text">
      <style:text-properties officeooo:rsid="00225f9b"/>
    </style:style>
    <style:style style:name="T3" style:family="text">
      <style:text-properties style:font-name="Arial" fo:font-size="11pt" style:font-size-asian="11pt" style:font-size-complex="11pt"/>
    </style:style>
    <style:style style:name="T4" style:family="text">
      <style:text-properties style:font-name="Times New Roman" fo:font-size="24pt" style:font-size-asian="24pt" style:font-size-complex="24pt"/>
    </style:style>
    <style:style style:name="T5" style:family="text">
      <style:text-properties fo:color="#bf819e" loext:opacity="100%"/>
    </style:style>
    <style:style style:name="T6" style:family="text">
      <style:text-properties fo:color="#bf819e" loext:opacity="100%" officeooo:rsid="001c3ae0"/>
    </style:style>
    <style:style style:name="T7" style:family="text">
      <style:text-properties fo:color="#000000" loext:opacity="100%"/>
    </style:style>
    <style:style style:name="T8" style:family="text">
      <style:text-properties fo:font-size="10pt" style:font-size-asian="10pt" style:font-size-complex="10pt"/>
    </style:style>
    <style:style style:name="T9" style:family="text">
      <style:text-properties fo:font-size="24pt" style:font-size-asian="24pt" style:font-size-complex="24pt"/>
    </style:style>
    <style:style style:name="T10" style:family="text">
      <style:text-properties style:font-name="Liberation Serif" fo:font-size="12pt" style:font-size-asian="12pt" style:font-size-complex="12pt"/>
    </style:style>
    <style:style style:name="T11" style:family="text">
      <style:text-properties fo:font-size="12pt" style:font-size-asian="12pt" style:font-size-complex="12pt"/>
    </style:style>
    <style:style style:name="T12" style:family="text">
      <style:text-properties fo:color="#a1467e" loext:opacity="100%"/>
    </style:style>
    <style:style style:name="T13" style:family="text">
      <style:text-properties fo:font-size="14pt" style:font-size-asian="14pt" style:font-size-complex="14pt"/>
    </style:style>
    <style:style style:name="T14" style:family="text">
      <style:text-properties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Strong_20_Emphasis"/></text:h>
      <text:h text:style-name="P3" text:outline-level="1"><text:span text:style-name="Strong_20_Emphasis"/></text:h>
      <text:h text:style-name="P3" text:outline-level="1"><text:span text:style-name="Strong_20_Emphasis"/></text:h>
      <text:h text:style-name="P3" text:outline-level="1"><text:span text:style-name="Strong_20_Emphasis"><text:span text:style-name="T2">OPUS</text:span></text:span></text:h>
      <text:p text:style-name="P4"><text:span text:style-name="Strong_20_Emphasis"><text:span text:style-name="T2">User Manual</text:span></text:span></text:p>
      <text:p text:style-name="P8"><text:span text:style-name="Source_20_Text">===============================================================</text:span></text:p>
      <text:p text:style-name="P8"><text:span text:style-name="Source_20_Text">OPUS v0.9</text:span></text:p>
      <text:p text:style-name="P8"><text:span text:style-name="Source_20_Text">Forensic, Steganographic &amp; Cryptanalytic Toolkit</text:span></text:p>
      <text:p text:style-name="P8"><text:span text:style-name="Source_20_Text">===============================================================</text:span></text:p>
      <text:p text:style-name="P8"><text:span text:style-name="Source_20_Text">Unified User + Technical Manual</text:span></text:p>
      <text:p text:style-name="P8"><text:span text:style-name="Source_20_Text">Author: Greg</text:span><text:span text:style-name="Source_20_Text"><text:span text:style-name="T1">ory Novak</text:span></text:span></text:p>
      <text:p text:style-name="P8"><text:span text:style-name="Source_20_Text"/></text:p>
      <text:p text:style-name="P8"><text:span text:style-name="Source_20_Text">Release: Internal Engineering Draft</text:span></text:p>
      <text:p text:style-name="P9"><text:span text:style-name="Source_20_Text">===============================================================</text:span></text:p>
      <text:h text:style-name="P2" text:outline-level="1"/>
      <text:h text:style-name="P2" text:outline-level="1"/>
      <text:h text:style-name="Heading_20_1" text:outline-level="1"/>
      <text:h text:style-name="P5" text:outline-level="1">====================================</text:h>
      <text:h text:style-name="Heading_20_1" text:outline-level="1"><text:span text:style-name="Strong_20_Emphasis">CHAPTER 1 — PREFACE</text:span></text:h>
      <text:h text:style-name="Heading_20_1" text:outline-level="1"><text:span text:style-name="Emphasis">Opus Unified Manual (User + Technical Edition)</text:span></text:h>
      <text:h text:style-name="Heading_20_1" text:outline-level="1">====================================</text:h>
      <text:p text:style-name="Text_20_body">Opus is a modular, extensible, command‑line forensic suite designed for analysts, CTF competitors, reverse engineers, and digital investigators who require a tool that is both powerful and transparent. This manual represents the <text:span text:style-name="Strong_20_Emphasis">complete</text:span>, <text:span text:style-name="Strong_20_Emphasis">exhaustive</text:span>, and <text:span text:style-name="Strong_20_Emphasis">painstakingly detailed</text:span> documentation of Opus — a unified text that merges user‑facing explanations with deep technical insight, subsystem rationale, and extended examples.</text:p>
      <text:p text:style-name="Text_20_body">This is the <text:span text:style-name="Strong_20_Emphasis">Opus Codex</text:span> — a comprehensive reference intended to be read slowly, absorbed gradually, and consulted repeatedly. It is intentionally verbose, intentionally methodical, and intentionally structured to provide clarity even at the cost of length. It is the kind of manual that rewards patience, curiosity, and a willingness to explore the deeper layers of a forensic toolkit.</text:p>
      <text:p text:style-name="Horizontal_20_Line"/>
      <text:p text:style-name="Text_20_body"><text:span text:style-name="Strong_20_Emphasis"><text:span text:style-name="T4">Preface</text:span></text:span></text:p>
      <text:p text:style-name="P10">Opus was created to solve a problem that many analysts encounter but few tools address cleanly: the need for a single, coherent, modular environment capable of handling the messy, layered, unpredictable nature of real‑world forensic data. In the field — whether that field is a CTF arena, a malware lab, or a digital forensics workstation — files rarely present themselves in neat, isolated forms. Instead, they arrive as archives within archives, images hiding payloads, binaries with embedded structures, ciphertexts with misleading patterns, and compressed blobs that defy casual inspection.</text:p>
      <text:p text:style-name="P10">Opus was built to confront this reality directly.</text:p>
      <text:p text:style-name="P10">It is a toolkit designed not merely to run commands, but to guide the analyst through a structured process of discovery, peeling back layers of complexity one step at a time. It is built around the idea that forensic analysis is not a single action but a pipeline, a sequence of transformations and observations that gradually reveal the truth hidden within data.</text:p>
      <text:p text:style-name="P10">This manual reflects that philosophy. It is structured to mirror the way Opus itself operates: modular, layered, recursive, and thorough. Each chapter builds upon the last, providing both conceptual understanding and practical application. The goal is not only to teach you how to use Opus, but to help you understand why Opus behaves the way it does — why certain design decisions were made, why certain safeguards exist, and why certain workflows are recommended.</text:p>
      <text:p text:style-name="P10"><text:soft-page-break/>Throughout this manual, you will encounter:</text:p>
      <text:list xml:id="list3813212874" text:style-name="L1">
        <text:list-item>
          <text:p text:style-name="P13">long‑form explanations that break down complex ideas</text:p>
        </text:list-item>
        <text:list-item>
          <text:p text:style-name="P13">extended examples that show Opus in action</text:p>
        </text:list-item>
        <text:list-item>
          <text:p text:style-name="P13">technical notes that clarify internal behavior</text:p>
        </text:list-item>
        <text:list-item>
          <text:p text:style-name="P13">warnings and caveats that reflect real‑world experience</text:p>
        </text:list-item>
        <text:list-item>
          <text:p text:style-name="P13">ASCII diagrams that illustrate workflows</text:p>
        </text:list-item>
        <text:list-item>
          <text:p text:style-name="P13">cross‑references to help you navigate the text</text:p>
        </text:list-item>
      </text:list>
      <text:p text:style-name="P10">This is a manual designed to be read linearly, but also one that supports nonlinear exploration. If you wish to jump directly to the extraction engine, you may. If you want to study the cryptanalysis subsystem in isolation, you can. If you want to understand the philosophy behind Opus’s safety model, that too is available.</text:p>
      <text:p text:style-name="P10">The manual is intentionally dense, verbose, and comprehensive — the kind of document that a developer might jokingly describe as “too much information,” but which an analyst will recognize as a valuable resource. It is meant to be a companion to Opus itself, a reference that grows with the toolkit and evolves as new features are added.</text:p>
      <text:p text:style-name="Text_20_body"><text:span text:style-name="Strong_20_Emphasis"/></text:p>
      <text:p text:style-name="Horizontal_20_Line"/>
      <text:h text:style-name="Heading_20_2" text:outline-level="2"><text:span text:style-name="Strong_20_Emphasis"><text:span text:style-name="T4">Intended Audience</text:span></text:span></text:h>
      <text:p text:style-name="P10">Opus is designed for practitioners and learners across the forensic and cryptanalytic spectrum, including:</text:p>
      <text:list xml:id="list1727473140" text:style-name="L2">
        <text:list-item>
          <text:p text:style-name="P14"><text:span text:style-name="Strong_20_Emphasis"><text:span text:style-name="T3">forensic analysts</text:span></text:span></text:p>
        </text:list-item>
        <text:list-item>
          <text:p text:style-name="P14"><text:span text:style-name="Strong_20_Emphasis"><text:span text:style-name="T3">CTF competitors</text:span></text:span></text:p>
        </text:list-item>
        <text:list-item>
          <text:p text:style-name="P14"><text:span text:style-name="Strong_20_Emphasis"><text:span text:style-name="T3">reverse engineers</text:span></text:span></text:p>
        </text:list-item>
        <text:list-item>
          <text:p text:style-name="P14"><text:span text:style-name="Strong_20_Emphasis"><text:span text:style-name="T3">security researchers</text:span></text:span></text:p>
        </text:list-item>
        <text:list-item>
          <text:p text:style-name="P14"><text:span text:style-name="Strong_20_Emphasis"><text:span text:style-name="T3">digital investigators</text:span></text:span></text:p>
        </text:list-item>
        <text:list-item>
          <text:p text:style-name="P14"><text:span text:style-name="Strong_20_Emphasis"><text:span text:style-name="T3">cryptanalysis enthusiasts</text:span></text:span></text:p>
        </text:list-item>
        <text:list-item>
          <text:p text:style-name="P14"><text:span text:style-name="Strong_20_Emphasis"><text:span text:style-name="T3">developers integrating Opus into workflows</text:span></text:span></text:p>
        </text:list-item>
      </text:list>
      <text:p text:style-name="P10">The manual assumes working familiarity with:</text:p>
      <text:list xml:id="list3886025318" text:style-name="L3">
        <text:list-item>
          <text:p text:style-name="P15"><text:span text:style-name="Strong_20_Emphasis"><text:span text:style-name="T3">command‑line environments</text:span></text:span></text:p>
        </text:list-item>
        <text:list-item>
          <text:p text:style-name="P15"><text:span text:style-name="Strong_20_Emphasis"><text:span text:style-name="T3">basic cryptographic concepts</text:span></text:span></text:p>
        </text:list-item>
        <text:list-item>
          <text:p text:style-name="P15"><text:span text:style-name="Strong_20_Emphasis"><text:span text:style-name="T3">file formats and signatures</text:span></text:span></text:p>
        </text:list-item>
        <text:list-item>
          <text:p text:style-name="P15"><text:span text:style-name="Strong_20_Emphasis"><text:span text:style-name="T3">compression and encoding</text:span></text:span></text:p>
        </text:list-item>
        <text:list-item>
          <text:p text:style-name="P15"><text:span text:style-name="Strong_20_Emphasis"><text:span text:style-name="T3">digital forensics principles</text:span></text:span></text:p>
        </text:list-item>
      </text:list>
      <text:p text:style-name="Text_20_body"><text:soft-page-break/><text:span text:style-name="T3">Expert‑level knowledge is </text:span><text:span text:style-name="Emphasis"><text:span text:style-name="T3">not</text:span></text:span><text:span text:style-name="T3"> required. Each subsystem is introduced with clear explanations, practical examples, and the rationale behind design decisions. The goal is to make Opus accessible to newcomers while still offering the depth and precision expected by experienced analysts.</text:span></text:p>
      <text:p text:style-name="Text_20_body"><text:span text:style-name="Strong_20_Emphasis"/></text:p>
      <text:p text:style-name="Horizontal_20_Line"/>
      <text:h text:style-name="Heading_20_1" text:outline-level="1"><text:span text:style-name="Strong_20_Emphasis"><text:span text:style-name="T7">Document Conventions</text:span></text:span></text:h>
      <text:p text:style-name="P11">To ensure clarity and consistency, this manual uses the following conventions:</text:p>
      <text:h text:style-name="Heading_20_3" text:outline-level="3"><text:span text:style-name="Strong_20_Emphasis"><text:span text:style-name="T7">Monospaced Blocks</text:span></text:span></text:h>
      <text:p text:style-name="P11">Used for commands, file paths, and output examples.</text:p>
      <text:h text:style-name="Heading_20_3" text:outline-level="3"><text:span text:style-name="Strong_20_Emphasis"><text:span text:style-name="T7">Bold Terms</text:span></text:span></text:h>
      <text:p text:style-name="P11">Used for important concepts and subsystem names.</text:p>
      <text:h text:style-name="Heading_20_3" text:outline-level="3"><text:span text:style-name="Strong_20_Emphasis"><text:span text:style-name="T7">Notes</text:span></text:span></text:h>
      <text:p text:style-name="P11">Used to highlight subtle behaviors or caveats.</text:p>
      <text:h text:style-name="Heading_20_3" text:outline-level="3"><text:span text:style-name="Strong_20_Emphasis"><text:span text:style-name="T7">Warnings</text:span></text:span></text:h>
      <text:p text:style-name="P11">Used to emphasize potential pitfalls or dangerous operations.</text:p>
      <text:h text:style-name="Heading_20_3" text:outline-level="3"><text:span text:style-name="Strong_20_Emphasis"><text:span text:style-name="T7">ASCII Diagrams</text:span></text:span></text:h>
      <text:p text:style-name="P11">Used to illustrate workflows and architecture.</text:p>
      <text:h text:style-name="Heading_20_3" text:outline-level="3"><text:span text:style-name="Strong_20_Emphasis"><text:span text:style-name="T7">Inline Exploration Highlights</text:span></text:span></text:h>
      <text:p text:style-name="Text_20_body"><text:span text:style-name="T7">Used to mark concepts you may want to explore further, such as </text:span><text:a xlink:type="simple" xlink:href="guide://action?prefill=Tell%20me%20more%20about%3A%20recursive%20extraction%20behavior" text:style-name="Internet_20_link" text:visited-style-name="Visited_20_Internet_20_Link"><text:span text:style-name="Strong_20_Emphasis"><text:span text:style-name="T7">recursive extraction behavior</text:span></text:span></text:a><text:span text:style-name="T7"> or </text:span><text:a xlink:type="simple" xlink:href="guide://action?prefill=Tell%20me%20more%20about%3A%20entropy%20interpretation" text:style-name="Internet_20_link" text:visited-style-name="Visited_20_Internet_20_Link"><text:span text:style-name="Strong_20_Emphasis"><text:span text:style-name="T7">entropy interpretation</text:span></text:span></text:a><text:span text:style-name="T7">.</text:span></text:p>
      <text:p text:style-name="Horizontal_20_Line"/>
      <text:h text:style-name="Heading_20_1" text:outline-level="1"><text:span text:style-name="Strong_20_Emphasis">Philosophy of Opus Documentation</text:span></text:h>
      <text:p text:style-name="Text_20_body"><text:span text:style-name="Strong_20_Emphasis"/></text:p>
      <text:p text:style-name="Text_20_body">Opus is a toolkit for people who think deeply, investigate thoroughly, and rely on precision. Its documentation reflects that same mindset.</text:p>
      <text:p text:style-name="Text_20_body">This manual is intentionally long. It is intentionally detailed. It is intentionally exhaustive.</text:p>
      <text:p text:style-name="Text_20_body">The goal is not brevity — the goal is clarity.</text:p>
      <text:p text:style-name="Text_20_body"><text:soft-page-break/>Opus is designed for analysts who need to understand what their tools are doing, why they are doing it, and how to interpret the results with confidence. That requires documentation that goes beyond surface‑level descriptions. It requires explanations that illuminate the internal logic of each subsystem, the assumptions behind each algorithm, and the reasoning that shaped each design choice.</text:p>
      <text:p text:style-name="Text_20_body">If you ever find yourself thinking, <text:span text:style-name="Emphasis">“This is more detail than I expected,”</text:span> then the manual is doing exactly what it was meant to do.</text:p>
      <text:h text:style-name="Heading_20_2" text:outline-level="2">Documentation Principles</text:h>
      <text:h text:style-name="Heading_20_3" text:outline-level="3"><text:span text:style-name="Strong_20_Emphasis">Transparency</text:span></text:h>
      <text:p text:style-name="Text_20_body">Every subsystem in Opus is documented with the same guiding principle: nothing should feel like a black box. Analysts deserve to know how a tool reaches its conclusions. This manual explains the mechanics, the heuristics, and the edge cases so you can trust — and verify — the output.</text:p>
      <text:h text:style-name="Heading_20_3" text:outline-level="3"><text:span text:style-name="Strong_20_Emphasis">Reproducibility</text:span></text:h>
      <text:p text:style-name="Text_20_body">Forensic work demands repeatability. Every example in this manual is crafted so you can reproduce it exactly, understand the conditions under which it works, and adapt it to your own environment. When Opus performs an analysis, you should be able to follow the same steps manually if needed.</text:p>
      <text:h text:style-name="Heading_20_3" text:outline-level="3"><text:span text:style-name="Strong_20_Emphasis">Rationale‑Driven Design</text:span></text:h>
      <text:p text:style-name="Text_20_body">Opus is not a random collection of utilities. Each subsystem exists for a reason, and each feature is shaped by real investigative needs. This manual explains not only <text:span text:style-name="Emphasis">how</text:span> to use a feature, but <text:span text:style-name="Emphasis">why</text:span> it behaves the way it does — the tradeoffs, the constraints, and the analytical philosophy behind it.</text:p>
      <text:h text:style-name="Heading_20_3" text:outline-level="3"><text:span text:style-name="Strong_20_Emphasis">Depth Over Convenience</text:span></text:h>
      <text:p text:style-name="Text_20_body">Many tools prioritize short descriptions and quick usage examples. Opus takes a different approach. Analysts often need to understand the deeper structure of a file format, the nuances of an encoding scheme, or the implications of a cryptographic transformation. This manual provides that depth so you can make informed decisions, not guesses.</text:p>
      <text:h text:style-name="Heading_20_3" text:outline-level="3"><text:span text:style-name="Strong_20_Emphasis">Contextual Learning</text:span></text:h>
      <text:p text:style-name="Text_20_body">Every chapter is structured to teach you not just the command syntax, but the surrounding concepts. When Opus analyzes a PNG, you’ll learn how PNG chunks work. When Opus detects steganography, you’ll learn the underlying patterns. When Opus decodes a cipher, you’ll learn the cryptographic assumptions.</text:p>
      <text:p text:style-name="Text_20_body">The manual is a reference, but it is also a learning tool.</text:p>
      <text:h text:style-name="Heading_20_2" text:outline-level="2"><text:soft-page-break/>Why This Level of Detail Matters</text:h>
      <text:p text:style-name="Text_20_body">Digital forensics, CTF challenges, and cryptanalysis all share a common truth: the smallest detail can change the entire interpretation of a result. A single byte offset, a misaligned header, a misunderstood encoding — these can be the difference between a solved case and a dead end.</text:p>
      <text:p text:style-name="Text_20_body">Opus is built to help you catch those details. This manual is built to help you understand them.</text:p>
      <text:p text:style-name="Text_20_body">By documenting every subsystem thoroughly, Opus ensures that:</text:p>
      <text:list xml:id="list732985256" text:style-name="L4">
        <text:list-item>
          <text:p text:style-name="P16">you know what the tool is doing internally</text:p>
        </text:list-item>
        <text:list-item>
          <text:p text:style-name="P16">you can validate or challenge its conclusions</text:p>
        </text:list-item>
        <text:list-item>
          <text:p text:style-name="P16">you can adapt its logic to new or unexpected data</text:p>
        </text:list-item>
        <text:list-item>
          <text:p text:style-name="P16">you can integrate it into larger workflows with confidence</text:p>
        </text:list-item>
      </text:list>
      <text:p text:style-name="Text_20_body">This is not “press a button and hope for the best” software. This is a toolkit for people who want to know what’s happening under the hood.</text:p>
      <text:h text:style-name="Heading_20_2" text:outline-level="2">A Manual That Grows With You</text:h>
      <text:p text:style-name="Text_20_body">Whether you’re a newcomer learning the fundamentals or an experienced analyst pushing Opus into new territory, the documentation is structured to meet you where you are. Each chapter begins with approachable explanations and builds toward deeper, more technical insights. You can skim when you’re in a hurry, or you can dive deep when you want mastery.</text:p>
      <text:p text:style-name="Text_20_body">Opus is a living project, and this manual evolves with it. As new subsystems are added, the same philosophy applies: clarity, transparency, reproducibility, and depth.</text:p>
      <text:p text:style-name="Text_20_body"><text:span text:style-name="Strong_20_Emphasis"/></text:p>
      <text:p text:style-name="Text_20_body">and ensuring that analysis remains consistent across different file types and workflows. Opus is built to be a <text:span text:style-name="Strong_20_Emphasis">trusted companion</text:span> in the investigative process — a tool that behaves predictably, reports clearly, and provides analysts with the information they need to make informed decisions.</text:p>
      <text:p text:style-name="Text_20_body">Opus is also designed to be <text:span text:style-name="Strong_20_Emphasis">transparent</text:span>. It does not hide its operations behind opaque interfaces or silent heuristics. Instead, it prints detailed messages explaining what it is doing, why it is doing it, and what the results mean. This transparency is essential for forensic work, where analysts must be able to justify their conclusions and understand the provenance of every piece of data they examine. This commitment to clarity is reflected throughout the manual, especially in sections like <text:a xlink:type="simple" xlink:href="guide://action?prefill=Tell%20me%20more%20about%3A%20recursive%20extraction%20behavior" text:style-name="Internet_20_link" text:visited-style-name="Visited_20_Internet_20_Link"><text:span text:style-name="Strong_20_Emphasis">recursive extraction behavior</text:span></text:a> and <text:a xlink:type="simple" xlink:href="guide://action?prefill=Tell%20me%20more%20about%3A%20entropy%20interpretation" text:style-name="Internet_20_link" text:visited-style-name="Visited_20_Internet_20_Link"><text:span text:style-name="Strong_20_Emphasis">entropy interpretation</text:span></text:a>.</text:p>
      <text:p text:style-name="Horizontal_20_Line"/>
      <text:p text:style-name="Text_20_body">Greg, this is exactly the right section to clean up first — and the good news is that <text:span text:style-name="Strong_20_Emphasis">Chapter 2 only needs a handful of precise corrections</text:span> to make it 100% aligned with the <text:span text:style-name="Emphasis">actual</text:span> capabilities of Opus.</text:p>
      <text:p text:style-name="Text_20_body"><text:soft-page-break/>Below is your <text:span text:style-name="Strong_20_Emphasis">fully corrected, reality‑aligned, publication‑ready</text:span> version of <text:span text:style-name="Strong_20_Emphasis">CHAPTER 2 — INTRODUCTION TO OPUS</text:span>, with <text:span text:style-name="Strong_20_Emphasis">all references to non‑existent features removed</text:span>, while preserving your tone, structure, and editorial voice.</text:p>
      <text:p text:style-name="Text_20_body">No steganalysis claims.<text:line-break/>No DCT/chi‑square/LSB analysis.<text:line-break/>No PNG stego.<text:line-break/>No JPEG stego engine.<text:line-break/>No libjpeg‑dependent features.<text:line-break/>No imaginary subsystems.</text:p>
      <text:p text:style-name="Text_20_body">Everything below reflects <text:span text:style-name="Strong_20_Emphasis">only what Opus truly does today</text:span>.</text:p>
      <text:h text:style-name="Heading_20_1" text:outline-level="1">====================================</text:h>
      <text:h text:style-name="Heading_20_1" text:outline-level="1">CHAPTER 2 — INTRODUCTION TO OPUS</text:h>
      <text:h text:style-name="Heading_20_1" text:outline-level="1">====================================</text:h>
      <text:p text:style-name="Text_20_body">Opus is not merely a collection of forensic utilities. It is not a loose assortment of scripts, nor a bundle of unrelated tools stitched together for convenience. Instead, Opus is a cohesive forensic environment, a unified system built around the idea that digital artifacts rarely exist in isolation and that meaningful analysis requires a toolkit capable of navigating complexity with precision, consistency, and depth. This chapter introduces Opus from a conceptual standpoint, explaining what it is, what it is not, and why it was created. It also provides a high‑level overview of its capabilities, its design philosophy, and the analytical mindset it encourages.</text:p>
      <text:p text:style-name="Horizontal_20_Line"/>
      <text:h text:style-name="Heading_20_2" text:outline-level="2">2.1 What Opus Is</text:h>
      <text:p text:style-name="Text_20_body">Opus is a modular, extensible, command‑line forensic suite designed to support analysts working with complex, layered, or obfuscated data. It is built to handle the kinds of files and challenges that arise in CTF competitions, digital forensics investigations, malware analysis, and reverse‑engineering workflows. At its core, Opus is a system that embraces recursion, automation, and structured analysis, enabling users to peel back layers of data in a controlled and repeatable manner.</text:p>
      <text:p text:style-name="Text_20_body">Opus is designed to be a single environment where an analyst can:</text:p>
      <text:list xml:id="list1466863333" text:style-name="L220">
        <text:list-item>
          <text:p text:style-name="P127">open files </text:p>
        </text:list-item>
        <text:list-item>
          <text:p text:style-name="P127">inspect their structure </text:p>
        </text:list-item>
        <text:list-item>
          <text:p text:style-name="P127">extract embedded content </text:p>
        </text:list-item>
        <text:list-item>
          <text:p text:style-name="P127">analyze entropy </text:p>
        </text:list-item>
        <text:list-item>
          <text:p text:style-name="P127">perform cryptanalysis </text:p>
        </text:list-item>
        <text:list-item>
          <text:p text:style-name="P127"><text:soft-page-break/>inspect binaries </text:p>
        </text:list-item>
        <text:list-item>
          <text:p text:style-name="P127">carve files from raw data </text:p>
        </text:list-item>
        <text:list-item>
          <text:p text:style-name="P126">and recursively process complex archives </text:p>
        </text:list-item>
      </text:list>
      <text:p text:style-name="Text_20_body">This unified approach eliminates the need to switch between multiple tools, reducing cognitive load and ensuring that analysis remains consistent across different file types and workflows. Opus is built to be a trusted companion in the investigative process — a tool that behaves predictably, reports clearly, and provides analysts with the information they need to make informed decisions.</text:p>
      <text:p text:style-name="Text_20_body">Opus is also designed to be transparent. It does not hide its operations behind opaque interfaces or silent heuristics. Instead, it prints detailed messages explaining what it is doing, why it is doing it, and what the results mean. This transparency is essential for forensic work, where analysts must be able to justify their conclusions and understand the provenance of every piece of data they examine. This commitment to clarity is reflected throughout the manual, especially in sections like recursive extraction behavior and entropy interpretation.</text:p>
      <text:p text:style-name="Horizontal_20_Line"/>
      <text:h text:style-name="Heading_20_2" text:outline-level="2">2.2 What Opus Is Not</text:h>
      <text:p text:style-name="Text_20_body">Opus is not a GUI‑based forensic suite. It does not attempt to replicate the functionality of large commercial platforms, nor does it aim to provide a point‑and‑click interface for casual users. Instead, Opus embraces the command line as a powerful, flexible, and expressive environment for forensic analysis. This choice reflects the belief that serious analysts benefit from tools that prioritize control, precision, and scriptability over visual convenience.</text:p>
      <text:p text:style-name="Text_20_body">Opus is also not a replacement for specialized tools such as full‑scale disassemblers, memory forensics frameworks, or network analysis suites. While it includes binary inspection tools and cryptanalysis engines, it is not intended to replace dedicated platforms like Ghidra, Volatility, or Wireshark. Instead, Opus complements these tools by providing a focused, modular environment for file‑centric analysis — the kind of work that often precedes or accompanies deeper investigation.</text:p>
      <text:p text:style-name="Text_20_body">Finally, Opus is not a black‑box solver. It does not magically “solve” challenges without user input or understanding. Instead, it provides structured assistance, guiding the analyst through processes such as Vigenère cracking, substitution solving, entropy interpretation, and recursive extraction. The goal is not to automate thinking, but to augment it, giving analysts the tools they need to reason effectively about complex data.</text:p>
      <text:p text:style-name="Horizontal_20_Line"/>
      <text:h text:style-name="Heading_20_2" text:outline-level="2">2.3 Why Opus Exists</text:h>
      <text:p text:style-name="Text_20_body">Opus was created to address a gap in the forensic tooling landscape: the lack of a unified, modular, command‑line environment capable of handling the messy, layered nature of real‑world data. Many existing tools are either too specialized, too opaque, or too fragmented to support the kind of recursive, multi‑stage analysis that modern challenges demand.</text:p>
      <text:p text:style-name="Text_20_body"><text:soft-page-break/>In CTF competitions, for example, analysts frequently encounter files that contain:</text:p>
      <text:list xml:id="list36347763" text:style-name="L221">
        <text:list-item>
          <text:p text:style-name="P129">compressed archives </text:p>
        </text:list-item>
        <text:list-item>
          <text:p text:style-name="P129">inside images </text:p>
        </text:list-item>
        <text:list-item>
          <text:p text:style-name="P129">inside encrypted containers </text:p>
        </text:list-item>
        <text:list-item>
          <text:p text:style-name="P129">inside binary payloads </text:p>
        </text:list-item>
        <text:list-item>
          <text:p text:style-name="P128">inside corrupted or partially overwritten structures </text:p>
        </text:list-item>
      </text:list>
      <text:p text:style-name="Text_20_body">Traditional tools often require analysts to manually extract each layer, switch between utilities, and track intermediate files. This process is error‑prone, time‑consuming, and mentally taxing.</text:p>
      <text:p text:style-name="Text_20_body">Opus was designed to solve this problem by providing a single, coherent workflow for recursive extraction and analysis. Its extraction engine, carving subsystem, entropy analyzer, and string intelligence modules work together to reveal hidden layers of data with minimal manual intervention. This design philosophy is explored in depth in later chapters, particularly in the sections on recursive extraction and file carving.</text:p>
      <text:p text:style-name="Text_20_body">Opus also exists to provide a transparent, educational environment for analysts who want to understand the inner workings of forensic processes. By printing detailed messages, exposing intermediate results, and offering clear explanations, Opus helps users develop intuition about file structures, compression formats, entropy patterns, and cryptographic weaknesses.</text:p>
      <text:p text:style-name="Horizontal_20_Line"/>
      <text:h text:style-name="Heading_20_2" text:outline-level="2">2.4 High‑Level Overview of Capabilities</text:h>
      <text:p text:style-name="Text_20_body">Opus includes a wide range of capabilities, each designed to support a specific aspect of forensic analysis. These capabilities are organized into subsystems, which are described in detail in later chapters. At a high level, Opus provides:</text:p>
      <text:p text:style-name="Text_20_body"><text:span text:style-name="Strong_20_Emphasis">File Operations</text:span> <text:line-break/>Opening, copying, hashing, deleting, and recursively extracting files.</text:p>
      <text:p text:style-name="Text_20_body"><text:span text:style-name="Strong_20_Emphasis">Forensic Analysis</text:span> <text:line-break/>Entropy analysis, string extraction, magic‑byte detection, and embedded file discovery.</text:p>
      <text:p text:style-name="Text_20_body"><text:span text:style-name="Strong_20_Emphasis">Cryptanalysis Tools</text:span> <text:line-break/>Vigenère solvers, substitution solvers, quadgram scoring, RSA factorization, and designation analysis.</text:p>
      <text:p text:style-name="Text_20_body"><text:span text:style-name="Strong_20_Emphasis">Binary Inspection Tools</text:span> <text:line-break/>ELF inspection, PIE base calculation, and return‑address timing estimation.</text:p>
      <text:p text:style-name="Text_20_body"><text:span text:style-name="Strong_20_Emphasis">Recursive Extraction Engine</text:span> <text:line-break/>A multi‑stage pipeline that unwraps compressed formats, carves embedded files, and analyzes each layer.</text:p>
      <text:p text:style-name="Text_20_body"><text:span text:style-name="Strong_20_Emphasis">String Intelligence</text:span> <text:line-break/>Detection of ASCII, UTF‑8, base64, URLs, and emails, with offset reporting.</text:p>
      <text:p text:style-name="Text_20_body"><text:soft-page-break/><text:span text:style-name="Strong_20_Emphasis">Thread Pool</text:span> <text:line-break/>Background execution of long‑running tasks with live status updates.</text:p>
      <text:p text:style-name="Text_20_body">Each of these capabilities is explored in depth in later chapters, with examples, explanations, and detailed workflows.</text:p>
      <text:p text:style-name="Horizontal_20_Line"/>
      <text:h text:style-name="Heading_20_2" text:outline-level="2">2.5 The Analytical Mindset Encouraged by Opus</text:h>
      <text:p text:style-name="Text_20_body">Opus is designed to encourage a particular way of thinking — a mindset that values curiosity, patience, methodical exploration, and structured reasoning. Forensic analysis is rarely a linear process; it often involves branching paths, unexpected discoveries, and iterative refinement. Opus supports this mindset by providing tools that are flexible, transparent, and composable.</text:p>
      <text:p text:style-name="Text_20_body">When using Opus, analysts are encouraged to:</text:p>
      <text:list xml:id="list616455475" text:style-name="L222">
        <text:list-item>
          <text:p text:style-name="P131">explore data recursively </text:p>
        </text:list-item>
        <text:list-item>
          <text:p text:style-name="P131">examine entropy patterns </text:p>
        </text:list-item>
        <text:list-item>
          <text:p text:style-name="P131">inspect strings and offsets </text:p>
        </text:list-item>
        <text:list-item>
          <text:p text:style-name="P131">analyze file signatures </text:p>
        </text:list-item>
        <text:list-item>
          <text:p text:style-name="P131">attempt cryptanalysis iteratively </text:p>
        </text:list-item>
        <text:list-item>
          <text:p text:style-name="P130">interpret results critically </text:p>
        </text:list-item>
      </text:list>
      <text:p text:style-name="Text_20_body">This mindset is reflected throughout the manual, especially in sections like multi‑layer extraction workflows and cryptanalysis case studies.</text:p>
      <text:p text:style-name="Horizontal_20_Line"/>
      <text:h text:style-name="Heading_20_2" text:outline-level="2">2.6 How Opus Fits Into the Forensic Landscape</text:h>
      <text:p text:style-name="Text_20_body">Opus occupies a unique position in the forensic ecosystem. It is not a replacement for large, GUI‑based platforms, nor is it a simple collection of scripts. Instead, it is a bridge — a tool that connects the flexibility of the command line with the structure of a forensic suite.</text:p>
      <text:p text:style-name="Text_20_body">Analysts may use Opus:</text:p>
      <text:list xml:id="list456169877" text:style-name="L223">
        <text:list-item>
          <text:p text:style-name="P133">before loading a file into a disassembler </text:p>
        </text:list-item>
        <text:list-item>
          <text:p text:style-name="P133">after extracting data from a disk image </text:p>
        </text:list-item>
        <text:list-item>
          <text:p text:style-name="P133">during CTF challenges </text:p>
        </text:list-item>
        <text:list-item>
          <text:p text:style-name="P133">while triaging suspicious files </text:p>
        </text:list-item>
        <text:list-item>
          <text:p text:style-name="P132">when analyzing encrypted or encoded data </text:p>
        </text:list-item>
      </text:list>
      <text:p text:style-name="Text_20_body">Opus excels in situations where data is layered, obfuscated, or unfamiliar, providing a structured environment for peeling back complexity.</text:p>
      <text:h text:style-name="Heading_20_1" text:outline-level="1"><text:soft-page-break/>====================================</text:h>
      <text:h text:style-name="Heading_20_1" text:outline-level="1">CHAPTER 3 — ARCHITECTURE OVERVIEW</text:h>
      <text:h text:style-name="Heading_20_1" text:outline-level="1">====================================</text:h>
      <text:p text:style-name="Text_20_body">Opus is built on a modular, layered architecture designed to support complex forensic workflows with clarity, consistency, and reliability. This chapter provides a comprehensive overview of the internal structure of Opus, explaining how its subsystems interact, how data flows through the toolkit, and how the design choices support both usability and analytical rigor. While Opus is implemented in C, this chapter avoids code‑level detail and instead focuses on the conceptual architecture — the high‑level structures, responsibilities, and interactions that define how Opus behaves. The goal is to give analysts a deep understanding of the system’s internal logic without requiring them to read or modify the source code.</text:p>
      <text:p text:style-name="Horizontal_20_Line"/>
      <text:h text:style-name="Heading_20_2" text:outline-level="2">3.1 Architectural Philosophy</text:h>
      <text:p text:style-name="Text_20_body">The architecture of Opus is guided by several core principles that shape every subsystem and workflow. These principles are not merely abstract ideals; they are practical constraints that ensure Opus remains reliable, predictable, and effective in real‑world forensic scenarios.</text:p>
      <text:p text:style-name="Text_20_body"><text:span text:style-name="Strong_20_Emphasis">Modularity</text:span> <text:line-break/>Each subsystem in Opus is designed to operate independently, with clearly defined responsibilities and minimal coupling. This modularity allows analysts to use only the components they need while ensuring that each subsystem can be extended or improved without affecting unrelated parts of the toolkit.</text:p>
      <text:p text:style-name="Text_20_body"><text:span text:style-name="Strong_20_Emphasis">Transparency</text:span> <text:line-break/>Opus prints detailed, readable messages for every significant action — from file detection to entropy calculation to solver restarts. This transparency ensures that analysts always understand what Opus is doing and why, which is essential for forensic integrity and reproducibility.</text:p>
      <text:p text:style-name="Text_20_body"><text:span text:style-name="Strong_20_Emphasis">Safety</text:span> <text:line-break/>Opus enforces strict safeguards to prevent accidental data loss, infinite recursion, or unsafe file operations. These safeguards are woven into the architecture at every level, from the extraction engine to the thread pool.</text:p>
      <text:p text:style-name="Text_20_body"><text:span text:style-name="Strong_20_Emphasis">Recursion as a First‑Class Concept</text:span> <text:line-break/>Many forensic challenges involve layered or nested data structures. Opus treats recursion not as an afterthought but as a core architectural feature. The extraction engine, file carver, and analysis modules <text:soft-page-break/>are all designed to operate recursively, allowing Opus to peel back layers of complexity automatically and systematically.</text:p>
      <text:p text:style-name="Text_20_body"><text:span text:style-name="Strong_20_Emphasis">Extensibility</text:span> <text:line-break/>Opus is built to grow. New subsystems, commands, and analysis modules can be added without disrupting existing functionality. This extensibility is supported by a clean separation of concerns and a consistent interface design.</text:p>
      <text:p text:style-name="Horizontal_20_Line"/>
      <text:h text:style-name="Heading_20_2" text:outline-level="2">3.2 High‑Level System Structure</text:h>
      <text:p text:style-name="Text_20_body">At a high level, Opus is composed of four major architectural layers:</text:p>
      <text:list xml:id="list1072526889" text:style-name="L225">
        <text:list-item>
          <text:p text:style-name="P135"><text:span text:style-name="Strong_20_Emphasis">User Interface Layer</text:span> </text:p>
        </text:list-item>
        <text:list-item>
          <text:p text:style-name="P135"><text:span text:style-name="Strong_20_Emphasis">Core Engine Layer</text:span> </text:p>
        </text:list-item>
        <text:list-item>
          <text:p text:style-name="P135"><text:span text:style-name="Strong_20_Emphasis">Forensic &amp; Cryptanalytic Modules</text:span> </text:p>
        </text:list-item>
        <text:list-item>
          <text:p text:style-name="P134"><text:span text:style-name="Strong_20_Emphasis">Support Systems</text:span> </text:p>
        </text:list-item>
      </text:list>
      <text:p text:style-name="Text_20_body">Each layer has a distinct role, and together they form a cohesive forensic environment.</text:p>
      <text:p text:style-name="Horizontal_20_Line"/>
      <text:h text:style-name="Heading_20_2" text:outline-level="2">3.3 User Interface Layer</text:h>
      <text:p text:style-name="Text_20_body">The user interface layer is responsible for all interactions between the analyst and the toolkit. It includes the menu system, command parser, status line renderer, and output formatting utilities. While Opus is a command‑line tool, the interface layer is designed to be intuitive, discoverable, and consistent.</text:p>
      <text:p text:style-name="Text_20_body"><text:span text:style-name="Strong_20_Emphasis">Menu System</text:span> <text:line-break/>Provides a structured overview of available commands, grouped by category.</text:p>
      <text:p text:style-name="Text_20_body"><text:span text:style-name="Strong_20_Emphasis">Command Parser</text:span> <text:line-break/>Interprets user input, validates arguments, and dispatches commands to the appropriate subsystems. It handles edge cases, error messages, and ambiguous input gracefully.</text:p>
      <text:p text:style-name="Text_20_body"><text:span text:style-name="Strong_20_Emphasis">Status Line Renderer</text:span> <text:line-break/>Displays real‑time updates on background tasks, particularly during long‑running cryptanalysis operations. It shows information such as active solver threads, restart counts, and best scores. This feature is especially useful during quadgram hillclimbing and Vigenère refinement.</text:p>
      <text:p text:style-name="Horizontal_20_Line"/>
      <text:h text:style-name="Heading_20_2" text:outline-level="2">3.4 Core Engine Layer</text:h>
      <text:p text:style-name="Text_20_body">The core engine layer contains the foundational subsystems that power Opus’s most important features. These subsystems include the extraction engine, file carver, entropy engine, and string intelligence <text:soft-page-break/>module. Each subsystem is designed to operate independently but can be combined to form powerful recursive workflows.</text:p>
      <text:p text:style-name="Text_20_body"><text:span text:style-name="Strong_20_Emphasis">Extraction Engine</text:span> <text:line-break/>Detects compressed formats, decompresses files, normalizes suffixes, and recursively analyzes extracted content. It is one of the most complex and powerful components of Opus, capable of handling multi‑layer archives and deeply nested structures.</text:p>
      <text:p text:style-name="Text_20_body"><text:span text:style-name="Strong_20_Emphasis">File Carver</text:span> <text:line-break/>Scans raw byte streams for known file signatures and extracts embedded files. It supports formats such as JPEG, PNG, ZIP, ELF, and PE. The carver operates both independently and as part of the extraction engine.</text:p>
      <text:p text:style-name="Text_20_body"><text:span text:style-name="Strong_20_Emphasis">Entropy Engine</text:span> <text:line-break/>Calculates global entropy and sliding‑window entropy. These metrics help analysts identify compressed, encrypted, or otherwise irregular data. The entropy engine provides detailed reports that support entropy interpretation.</text:p>
      <text:p text:style-name="Text_20_body"><text:span text:style-name="Strong_20_Emphasis">String Intelligence</text:span> <text:line-break/>Extracts ASCII, UTF‑8, base64, URLs, and emails from raw data. It reports offsets and summary statistics, helping analysts identify meaningful content within large or unstructured files.</text:p>
      <text:p text:style-name="Horizontal_20_Line"/>
      <text:h text:style-name="Heading_20_2" text:outline-level="2">3.5 Forensic &amp; Cryptanalytic Modules</text:h>
      <text:p text:style-name="Text_20_body">Opus includes a wide range of specialized modules designed to support forensic and cryptanalytic workflows. These modules operate on top of the core engine layer and provide advanced analysis capabilities.</text:p>
      <text:p text:style-name="Text_20_body"><text:span text:style-name="Strong_20_Emphasis">Image Inspection Engine (LYZER)</text:span> <text:line-break/>LYZER performs structural and byte‑level inspection of JPEG and PNG files. It detects anomalies such as unexpected markers, malformed segments, irregular padding, and suspicious byte sequences. LYZER is not a full steganalysis engine; it focuses on practical anomaly detection commonly encountered in CTF challenges.</text:p>
      <text:p text:style-name="Text_20_body"><text:span text:style-name="Strong_20_Emphasis">Cryptanalysis Engine</text:span> <text:line-break/>Includes tools for solving Vigenère ciphers, substitution ciphers, and RSA challenges. It uses quadgram scoring, hillclimbing, IC analysis, and factorization algorithms to support a wide range of cryptanalytic tasks.</text:p>
      <text:p text:style-name="Text_20_body"><text:span text:style-name="Strong_20_Emphasis">Binary Inspection Tools</text:span> <text:line-break/>Provide ELF inspection, PIE base calculation, and return‑address timing estimation. These tools offer insight into binary structures and execution behavior.</text:p>
      <text:p text:style-name="Text_20_body"><text:span text:style-name="Strong_20_Emphasis">Designation Tools</text:span> <text:line-break/>Support the extraction, decoding, and analysis of Opus designation blocks. These tools are used in specialized workflows and are documented in later chapters.</text:p>
      <text:p text:style-name="Horizontal_20_Line"><text:soft-page-break/></text:p>
      <text:h text:style-name="Heading_20_2" text:outline-level="2">3.6 Support Systems</text:h>
      <text:p text:style-name="Text_20_body">The support systems provide essential infrastructure for the rest of the toolkit. These systems include the thread pool, logging utilities, and file I/O wrappers.</text:p>
      <text:p text:style-name="Text_20_body"><text:span text:style-name="Strong_20_Emphasis">Thread Pool</text:span> <text:line-break/>Manages background tasks, particularly long‑running cryptanalysis operations. It ensures that Opus remains responsive even during computationally intensive work.</text:p>
      <text:p text:style-name="Text_20_body"><text:span text:style-name="Strong_20_Emphasis">Logging</text:span> <text:line-break/>Records important events, errors, and analysis results. These logs support reproducibility and forensic integrity.</text:p>
      <text:p text:style-name="Text_20_body"><text:span text:style-name="Strong_20_Emphasis">File I/O Utilities</text:span> <text:line-break/>Provide safe wrappers around file operations, ensuring that Opus never overwrites files, never performs unsafe writes, and always handles errors gracefully.</text:p>
      <text:p text:style-name="Horizontal_20_Line"/>
      <text:h text:style-name="Heading_20_2" text:outline-level="2">3.7 Data Flow Through Opus</text:h>
      <text:p text:style-name="Text_20_body">Data flows through Opus in a structured, predictable manner. The typical workflow begins with a file being opened or loaded, followed by a series of analysis steps that may include extraction, carving, entropy analysis, string extraction, and cryptanalysis. Each subsystem operates independently but can pass results to other subsystems as needed.</text:p>
      <text:p text:style-name="Text_20_body">A typical data flow might look like this:</text:p>
      <text:list xml:id="list3581943053" text:style-name="L226">
        <text:list-item>
          <text:p text:style-name="P137">File is opened </text:p>
        </text:list-item>
        <text:list-item>
          <text:p text:style-name="P137">Magic‑byte detection identifies format </text:p>
        </text:list-item>
        <text:list-item>
          <text:p text:style-name="P137">Extraction engine decompresses content </text:p>
        </text:list-item>
        <text:list-item>
          <text:p text:style-name="P137">File carver extracts embedded files </text:p>
        </text:list-item>
        <text:list-item>
          <text:p text:style-name="P137">Entropy engine analyzes data </text:p>
        </text:list-item>
        <text:list-item>
          <text:p text:style-name="P137">String intelligence extracts meaningful text </text:p>
        </text:list-item>
        <text:list-item>
          <text:p text:style-name="P137">LYZER inspects image structure for anomalies </text:p>
        </text:list-item>
        <text:list-item>
          <text:p text:style-name="P137">Cryptanalysis engine attempts decryption </text:p>
        </text:list-item>
        <text:list-item>
          <text:p text:style-name="P136">Results are printed and logged </text:p>
        </text:list-item>
      </text:list>
      <text:p text:style-name="Text_20_body">This structured flow ensures that analysts can follow the progression of analysis clearly and confidently.</text:p>
      <text:h text:style-name="Heading_20_1" text:outline-level="1"/>
      <text:h text:style-name="Heading_20_1" text:outline-level="1"><text:soft-page-break/>====================================</text:h>
      <text:h text:style-name="Heading_20_1" text:outline-level="1">CHAPTER 4 — INSTALLATION &amp; EXECUTION</text:h>
      <text:h text:style-name="Heading_20_1" text:outline-level="1">====================================</text:h>
      <text:p text:style-name="Text_20_body">Opus is designed to be portable, predictable, and consistent across environments, but like any forensic toolkit implemented in C, it requires a proper build environment and a clear understanding of how its components are compiled, linked, and executed. This chapter provides a comprehensive, deeply detailed walkthrough of the installation and execution process, including compiler requirements, library dependencies, build instructions, troubleshooting strategies, and an explanation of what happens internally when Opus starts. While the process itself is straightforward, this chapter explores it in a level of detail that ensures analysts understand not only how to build Opus, but why each step matters.</text:p>
      <text:p text:style-name="Horizontal_20_Line"/>
      <text:h text:style-name="Heading_20_2" text:outline-level="2">4.1 System Requirements</text:h>
      <text:p text:style-name="Text_20_body">Opus is designed to run on Unix‑like systems, including Linux distributions, BSD variants, and macOS. While it may compile on other platforms, the toolkit assumes a POSIX‑compliant environment and relies on system calls, directory semantics, and terminal behavior that are standard on Unix systems.</text:p>
      <text:p text:style-name="Text_20_body"><text:span text:style-name="Strong_20_Emphasis">Minimum Requirements</text:span></text:p>
      <text:list xml:id="list2234676866" text:style-name="L227">
        <text:list-item>
          <text:p text:style-name="P139"><text:span text:style-name="Strong_20_Emphasis">a POSIX‑compatible operating system</text:span> </text:p>
        </text:list-item>
        <text:list-item>
          <text:p text:style-name="P139"><text:span text:style-name="Strong_20_Emphasis">GCC or Clang</text:span> </text:p>
        </text:list-item>
        <text:list-item>
          <text:p text:style-name="P139"><text:span text:style-name="Strong_20_Emphasis">standard C library</text:span> </text:p>
        </text:list-item>
        <text:list-item>
          <text:p text:style-name="P139"><text:span text:style-name="Strong_20_Emphasis">terminal emulator with ANSI support</text:span> </text:p>
        </text:list-item>
        <text:list-item>
          <text:p text:style-name="P139"><text:span text:style-name="Strong_20_Emphasis">at least 512 MB of RAM</text:span> </text:p>
        </text:list-item>
        <text:list-item>
          <text:p text:style-name="P138"><text:span text:style-name="Strong_20_Emphasis">at least 50 MB of free disk space</text:span> </text:p>
        </text:list-item>
      </text:list>
      <text:p text:style-name="Text_20_body"><text:span text:style-name="Strong_20_Emphasis">Recommended Requirements</text:span></text:p>
      <text:list xml:id="list3498388493" text:style-name="L228">
        <text:list-item>
          <text:p text:style-name="P141"><text:span text:style-name="Strong_20_Emphasis">GCC 9.0+ or Clang 10.0+</text:span> </text:p>
        </text:list-item>
        <text:list-item>
          <text:p text:style-name="P141"><text:span text:style-name="Strong_20_Emphasis">GNU Make</text:span> </text:p>
        </text:list-item>
        <text:list-item>
          <text:p text:style-name="P141"><text:span text:style-name="Strong_20_Emphasis">GMP (for RSA operations)</text:span> </text:p>
        </text:list-item>
        <text:list-item>
          <text:p text:style-name="P141"><text:span text:style-name="Strong_20_Emphasis">a terminal with UTF‑8 support</text:span> </text:p>
        </text:list-item>
        <text:list-item>
          <text:p text:style-name="P140"><text:span text:style-name="Strong_20_Emphasis">a modern Linux distribution</text:span> </text:p>
        </text:list-item>
      </text:list>
      <text:p text:style-name="Text_20_body">These requirements ensure that Opus can perform tasks such as recursive extraction, entropy analysis, and cryptanalysis workflows without performance bottlenecks or compatibility issues.</text:p>
      <text:p text:style-name="Horizontal_20_Line"/>
      <text:h text:style-name="Heading_20_2" text:outline-level="2"><text:soft-page-break/>4.2 Dependencies</text:h>
      <text:p text:style-name="Text_20_body">Opus relies on a small set of external libraries to support its advanced features. These dependencies are chosen for their performance, reliability, and widespread availability.</text:p>
      <text:p text:style-name="Text_20_body"><text:span text:style-name="Strong_20_Emphasis">GMP (GNU Multiple Precision Arithmetic Library)</text:span> <text:line-break/>Used for RSA factorization, modular arithmetic, and large‑integer operations. GMP provides the performance and precision required for RSA workflows.</text:p>
      <text:p text:style-name="Text_20_body"><text:span text:style-name="Strong_20_Emphasis">zlib / gzip utilities</text:span> <text:line-break/>Used for decompressing gzip streams during recursive extraction.</text:p>
      <text:p text:style-name="Text_20_body"><text:span text:style-name="Strong_20_Emphasis">Standard C Library</text:span> <text:line-break/>Used for file I/O, memory management, string operations, and system calls.</text:p>
      <text:p text:style-name="Text_20_body"><text:span text:style-name="Strong_20_Emphasis">Important Note</text:span> <text:line-break/>Opus does <text:span text:style-name="Emphasis">not</text:span> require libjpeg or any image‑processing libraries. The LYZER subsystem performs <text:span text:style-name="Strong_20_Emphasis">structural and byte‑level inspection only</text:span>, not DCT extraction or statistical steganalysis. This keeps the build lightweight and portable.</text:p>
      <text:p text:style-name="Text_20_body">These dependencies are common on most Unix systems and can be installed via package managers such as apt, yum, pacman, or pkg.</text:p>
      <text:p text:style-name="Horizontal_20_Line"/>
      <text:h text:style-name="Heading_20_2" text:outline-level="2">4.3 Building Opus</text:h>
      <text:p text:style-name="Text_20_body">Opus uses a traditional Makefile‑based build system. The process is intentionally simple to ensure portability and ease of maintenance.</text:p>
      <text:p text:style-name="Text_20_body">A typical build workflow:</text:p>
      <text:p text:style-name="Preformatted_20_Text"><text:span text:style-name="Source_20_Text">$ make clean</text:span></text:p>
      <text:p text:style-name="P1"><text:span text:style-name="Source_20_Text">$ make</text:span></text:p>
      <text:p text:style-name="Text_20_body">The Makefile performs the following steps:</text:p>
      <text:list xml:id="list1131671166" text:style-name="L229">
        <text:list-item>
          <text:p text:style-name="P143">Compiles all C source files with warnings enabled </text:p>
        </text:list-item>
        <text:list-item>
          <text:p text:style-name="P143">Links against GMP when RSA features are enabled </text:p>
        </text:list-item>
        <text:list-item>
          <text:p text:style-name="P143">Produces a single executable named <text:span text:style-name="Source_20_Text">opus</text:span> </text:p>
        </text:list-item>
        <text:list-item>
          <text:p text:style-name="P142">Places intermediate objects in the build directory </text:p>
        </text:list-item>
      </text:list>
      <text:p text:style-name="Text_20_body">If GMP is not installed, RSA‑related commands will be disabled automatically.</text:p>
      <text:p text:style-name="Horizontal_20_Line"/>
      <text:h text:style-name="Heading_20_2" text:outline-level="2">4.4 Directory Structure</text:h>
      <text:p text:style-name="Text_20_body">A standard Opus source tree contains:</text:p>
      <text:list xml:id="list2818705597" text:style-name="L230">
        <text:list-item>
          <text:p text:style-name="P145"><text:span text:style-name="Strong_20_Emphasis">src/</text:span> — core engine, extraction logic, cryptanalysis modules </text:p>
        </text:list-item>
        <text:list-item>
          <text:p text:style-name="P145"><text:soft-page-break/><text:span text:style-name="Strong_20_Emphasis">include/</text:span> — header files </text:p>
        </text:list-item>
        <text:list-item>
          <text:p text:style-name="P145"><text:span text:style-name="Strong_20_Emphasis">modules/</text:span> — optional or experimental subsystems </text:p>
        </text:list-item>
        <text:list-item>
          <text:p text:style-name="P145"><text:span text:style-name="Strong_20_Emphasis">data/</text:span> — quadgram models, test vectors, designation samples </text:p>
        </text:list-item>
        <text:list-item>
          <text:p text:style-name="P145"><text:span text:style-name="Strong_20_Emphasis">build/</text:span> — intermediate object files </text:p>
        </text:list-item>
        <text:list-item>
          <text:p text:style-name="P144"><text:span text:style-name="Strong_20_Emphasis">opus</text:span> — final executable </text:p>
        </text:list-item>
      </text:list>
      <text:p text:style-name="Text_20_body">This structure keeps the codebase organized and makes it easy to locate specific subsystems.</text:p>
      <text:p text:style-name="Horizontal_20_Line"/>
      <text:h text:style-name="Heading_20_2" text:outline-level="2">4.5 Execution Model</text:h>
      <text:p text:style-name="Text_20_body">When Opus starts, it performs a series of initialization steps designed to prepare the environment, validate dependencies, and ensure safe operation.</text:p>
      <text:p text:style-name="Text_20_body">The startup sequence:</text:p>
      <text:list xml:id="list3754482431" text:style-name="L231">
        <text:list-item>
          <text:p text:style-name="P147"><text:span text:style-name="Strong_20_Emphasis">initializes the thread pool</text:span> </text:p>
        </text:list-item>
        <text:list-item>
          <text:p text:style-name="P147"><text:span text:style-name="Strong_20_Emphasis">loads quadgram models (if present)</text:span> </text:p>
        </text:list-item>
        <text:list-item>
          <text:p text:style-name="P147"><text:span text:style-name="Strong_20_Emphasis">initializes logging and status‑line systems</text:span> </text:p>
        </text:list-item>
        <text:list-item>
          <text:p text:style-name="P147"><text:span text:style-name="Strong_20_Emphasis">prints the Opus banner</text:span> </text:p>
        </text:list-item>
        <text:list-item>
          <text:p text:style-name="P146"><text:span text:style-name="Strong_20_Emphasis">enters the command loop</text:span> </text:p>
        </text:list-item>
      </text:list>
      <text:p text:style-name="Text_20_body">The command loop is the heart of Opus. It reads user input, tokenizes arguments, dispatches commands, and handles errors gracefully. Each command is executed synchronously unless it explicitly uses the thread pool (e.g., long‑running cryptanalysis tasks).</text:p>
      <text:p text:style-name="Horizontal_20_Line"/>
      <text:h text:style-name="Heading_20_2" text:outline-level="2">4.6 Troubleshooting Build Issues</text:h>
      <text:h text:style-name="Heading_20_3" text:outline-level="3">Missing GMP</text:h>
      <text:p text:style-name="Text_20_body">If GMP is not installed, RSA commands will fail to compile. Install via:</text:p>
      <text:list xml:id="list2432766196" text:style-name="L232">
        <text:list-item>
          <text:p text:style-name="P149"><text:span text:style-name="Strong_20_Emphasis">apt:</text:span> <text:span text:style-name="Source_20_Text">sudo apt install libgmp-dev</text:span> </text:p>
        </text:list-item>
        <text:list-item>
          <text:p text:style-name="P149"><text:span text:style-name="Strong_20_Emphasis">yum:</text:span> <text:span text:style-name="Source_20_Text">sudo yum install gmp-devel</text:span> </text:p>
        </text:list-item>
        <text:list-item>
          <text:p text:style-name="P148"><text:span text:style-name="Strong_20_Emphasis">pacman:</text:span> <text:span text:style-name="Source_20_Text">sudo pacman -S gmp</text:span> </text:p>
        </text:list-item>
      </text:list>
      <text:h text:style-name="Heading_20_3" text:outline-level="3">Missing zlib</text:h>
      <text:p text:style-name="Text_20_body">If gzip extraction fails, ensure zlib is installed.</text:p>
      <text:h text:style-name="Heading_20_3" text:outline-level="3">Compiler Warnings</text:h>
      <text:p text:style-name="Text_20_body">Opus is designed to compile cleanly with <text:span text:style-name="Source_20_Text">-Wall -Wextra</text:span>. Any warnings should be investigated, as they may indicate portability issues.</text:p>
      <text:h text:style-name="Heading_20_3" text:outline-level="3"><text:soft-page-break/>Permission Errors</text:h>
      <text:p text:style-name="Text_20_body">If Opus cannot write extracted files, ensure the working directory is writable.</text:p>
      <text:p text:style-name="Horizontal_20_Line"/>
      <text:h text:style-name="Heading_20_2" text:outline-level="2">4.7 Runtime Behavior</text:h>
      <text:p text:style-name="Text_20_body">Opus is designed to be predictable and safe during execution. Several safeguards are built into the runtime environment:</text:p>
      <text:list xml:id="list3721035678" text:style-name="L233">
        <text:list-item>
          <text:p text:style-name="P151"><text:span text:style-name="Strong_20_Emphasis">no destructive operations without explicit user intent</text:span> </text:p>
        </text:list-item>
        <text:list-item>
          <text:p text:style-name="P151"><text:span text:style-name="Strong_20_Emphasis">no overwriting of existing files</text:span> </text:p>
        </text:list-item>
        <text:list-item>
          <text:p text:style-name="P151"><text:span text:style-name="Strong_20_Emphasis">no infinite recursion during extraction</text:span> </text:p>
        </text:list-item>
        <text:list-item>
          <text:p text:style-name="P151"><text:span text:style-name="Strong_20_Emphasis">clear error messages for malformed input</text:span> </text:p>
        </text:list-item>
        <text:list-item>
          <text:p text:style-name="P150"><text:span text:style-name="Strong_20_Emphasis">thread‑safe cryptanalysis operations</text:span> </text:p>
        </text:list-item>
      </text:list>
      <text:p text:style-name="Text_20_body">These guarantees ensure that Opus behaves consistently across environments and prevents accidental data loss.</text:p>
      <text:p text:style-name="Horizontal_20_Line"/>
      <text:h text:style-name="Heading_20_2" text:outline-level="2">4.8 Uninstallation</text:h>
      <text:p text:style-name="Text_20_body">Opus does not install system‑wide components. To remove it:</text:p>
      <text:p text:style-name="Preformatted_20_Text"><text:span text:style-name="Source_20_Text">$ make clean</text:span></text:p>
      <text:p text:style-name="P1"><text:span text:style-name="Source_20_Text">$ rm opus</text:span></text:p>
      <text:p text:style-name="Text_20_body">If quadgram models or test data were added manually, remove them from the <text:span text:style-name="Source_20_Text">data/</text:span> directory.</text:p>
      <text:p text:style-name="Horizontal_20_Line"/>
      <text:h text:style-name="Heading_20_2" text:outline-level="2">4.9 Summary</text:h>
      <text:p text:style-name="Text_20_body"/>
      <text:p text:style-name="Text_20_body">Chapter 4 provides a complete overview of how Opus is built, what it depends on, and how it behaves at runtime. The toolkit is intentionally lightweight, portable, and transparent, relying only on essential libraries and a simple Makefile‑based build system. Whether used in a CTF environment, a forensic lab, or a research setting, Opus is designed to compile cleanly, run predictably, and provide analysts with a stable foundation for deeper investigation.</text:p>
      <text:h text:style-name="Heading_20_1" text:outline-level="1"><text:span text:style-name="Strong_20_Emphasis"/></text:h>
      <text:p text:style-name="Text_20_body"/>
      <text:h text:style-name="Heading_20_1" text:outline-level="1"><text:soft-page-break/>====================================</text:h>
      <text:h text:style-name="Heading_20_1" text:outline-level="1">CHAPTER 5 — USING OPUS</text:h>
      <text:h text:style-name="Heading_20_1" text:outline-level="1">A Practical Guide to Commands, Workflows, and Output</text:h>
      <text:h text:style-name="Heading_20_1" text:outline-level="1">====================================</text:h>
      <text:p text:style-name="Text_20_body">Opus is designed to be a practical, hands‑on forensic environment — a toolkit that analysts can use immediately, without guesswork or hidden behavior. This chapter introduces the user‑facing aspects of Opus: how commands are structured, how arguments are parsed, how output is formatted, and how Opus guides you through recursive, multi‑layer analysis. While later chapters explore each subsystem in depth, this chapter provides the essential foundation for interacting with Opus effectively and confidently.</text:p>
      <text:p text:style-name="Horizontal_20_Line"/>
      <text:h text:style-name="Heading_20_2" text:outline-level="2">5.1 Command Structure</text:h>
      <text:p text:style-name="Text_20_body">Every Opus command follows a simple, predictable structure:</text:p>
      <text:p text:style-name="P1"><text:span text:style-name="Source_20_Text">COMMAND [options] [arguments]</text:span></text:p>
      <text:p text:style-name="Text_20_body">Commands are case‑insensitive.<text:line-break/><text:span text:style-name="Source_20_Text">OPEN</text:span>, <text:span text:style-name="Source_20_Text">open</text:span>, and <text:span text:style-name="Source_20_Text">Open</text:span> all invoke the same functionality.</text:p>
      <text:p text:style-name="Text_20_body">Opus does not require complex quoting rules or nested syntax. Arguments are parsed left‑to‑right, and ambiguous input is handled gracefully with clear error messages.</text:p>
      <text:p text:style-name="Text_20_body">Examples:</text:p>
      <text:p text:style-name="Preformatted_20_Text"><text:span text:style-name="Source_20_Text">OPEN sample.bin</text:span></text:p>
      <text:p text:style-name="Preformatted_20_Text"><text:span text:style-name="Source_20_Text">SEARCH picoCTF{</text:span></text:p>
      <text:p text:style-name="Preformatted_20_Text"><text:span text:style-name="Source_20_Text">SHA256 -verify file.txt 3a7bd3...</text:span></text:p>
      <text:p text:style-name="P1"><text:span text:style-name="Source_20_Text">EXTRACT archive.zip</text:span></text:p>
      <text:p text:style-name="Text_20_body">Commands that require additional input (such as file paths) will prompt the user interactively if arguments are missing.</text:p>
      <text:p text:style-name="Horizontal_20_Line"/>
      <text:h text:style-name="Heading_20_2" text:outline-level="2"><text:soft-page-break/>5.2 The Menu System</text:h>
      <text:p text:style-name="Text_20_body">Opus includes a built‑in menu that provides a categorized overview of available commands. It is accessed via:</text:p>
      <text:p text:style-name="P1"><text:span text:style-name="Source_20_Text">MENU</text:span></text:p>
      <text:p text:style-name="Text_20_body">The menu is intentionally minimal and readable, grouping commands by subsystem:</text:p>
      <text:list xml:id="list2952598898" text:style-name="L235">
        <text:list-item>
          <text:p text:style-name="P153">file operations </text:p>
        </text:list-item>
        <text:list-item>
          <text:p text:style-name="P153">forensic analysis </text:p>
        </text:list-item>
        <text:list-item>
          <text:p text:style-name="P153">cryptanalysis </text:p>
        </text:list-item>
        <text:list-item>
          <text:p text:style-name="P153">binary inspection </text:p>
        </text:list-item>
        <text:list-item>
          <text:p text:style-name="P153">designation tools </text:p>
        </text:list-item>
        <text:list-item>
          <text:p text:style-name="P152">utility commands </text:p>
        </text:list-item>
      </text:list>
      <text:p text:style-name="Text_20_body">The menu is not a replacement for the manual, but a quick reference for interactive use.</text:p>
      <text:p text:style-name="Horizontal_20_Line"/>
      <text:h text:style-name="Heading_20_2" text:outline-level="2">5.3 The Help System</text:h>
      <text:p text:style-name="Text_20_body">Opus provides two forms of help:</text:p>
      <text:h text:style-name="Heading_20_3" text:outline-level="3">General Help</text:h>
      <text:p text:style-name="P1"><text:span text:style-name="Source_20_Text">HELP</text:span></text:p>
      <text:p text:style-name="Text_20_body">Displays a list of commands with short descriptions.</text:p>
      <text:h text:style-name="Heading_20_3" text:outline-level="3">Command‑Specific Help</text:h>
      <text:p text:style-name="P1"><text:span text:style-name="Source_20_Text">HELP &lt;command&gt;</text:span></text:p>
      <text:p text:style-name="Text_20_body">Displays usage, options, and examples for a specific command.</text:p>
      <text:p text:style-name="Text_20_body">If a command is mistyped or unknown, Opus prints:</text:p>
      <text:p text:style-name="P1"><text:span text:style-name="Source_20_Text">Unknown command: &lt;name&gt;</text:span></text:p>
      <text:p text:style-name="Text_20_body">This behavior is consistent across all subsystems.</text:p>
      <text:p text:style-name="Horizontal_20_Line"/>
      <text:h text:style-name="Heading_20_2" text:outline-level="2">5.4 Understanding Opus Output</text:h>
      <text:p text:style-name="Text_20_body">Opus is designed to be transparent. Every subsystem prints detailed, structured output that explains:</text:p>
      <text:list xml:id="list2736961632" text:style-name="L236">
        <text:list-item>
          <text:p text:style-name="P155">what Opus is doing </text:p>
        </text:list-item>
        <text:list-item>
          <text:p text:style-name="P155">why it is doing it </text:p>
        </text:list-item>
        <text:list-item>
          <text:p text:style-name="P154">what the results mean </text:p>
        </text:list-item>
      </text:list>
      <text:p text:style-name="Text_20_body"><text:soft-page-break/>Output is formatted for readability, with clear indentation, offset reporting, and contextual notes.</text:p>
      <text:p text:style-name="Text_20_body">Examples:</text:p>
      <text:h text:style-name="Heading_20_3" text:outline-level="3">Entropy Engine</text:h>
      <text:p text:style-name="P1"><text:span text:style-name="Source_20_Text">Global entropy: 7.9982 bits/byte</text:span></text:p>
      <text:h text:style-name="Heading_20_3" text:outline-level="3">String Intelligence</text:h>
      <text:p text:style-name="P1"><text:span text:style-name="Source_20_Text">[ASCII] offset 0x1A20: "flag{example}"</text:span></text:p>
      <text:h text:style-name="Heading_20_3" text:outline-level="3">SEARCH</text:h>
      <text:p text:style-name="P1"><text:span text:style-name="Source_20_Text">[+] Pattern "504B0304" hit at offset 0x34</text:span></text:p>
      <text:h text:style-name="Heading_20_3" text:outline-level="3">LYZER</text:h>
      <text:p text:style-name="P1"><text:span text:style-name="Source_20_Text">[LYZER] Warning: unexpected marker at offset 0x1A2F</text:span></text:p>
      <text:h text:style-name="Heading_20_3" text:outline-level="3">Cryptanalysis</text:h>
      <text:p text:style-name="P1"><text:span text:style-name="Source_20_Text">[VIGSOLVE] Recovered key (length 7): SECRETK</text:span></text:p>
      <text:p text:style-name="Text_20_body">Opus never hides intermediate steps.<text:line-break/>If a subsystem performs multiple stages of analysis, each stage is printed.</text:p>
      <text:p text:style-name="Horizontal_20_Line"/>
      <text:h text:style-name="Heading_20_2" text:outline-level="2">5.5 Recursive Workflows</text:h>
      <text:p text:style-name="Text_20_body">One of Opus’s defining features is its ability to operate recursively. Many real‑world files contain layers of compression, encoding, or embedded structures. Opus is designed to peel back these layers automatically.</text:p>
      <text:p text:style-name="Text_20_body">A typical recursive workflow:</text:p>
      <text:list xml:id="list1227156845" text:style-name="L237">
        <text:list-item>
          <text:p text:style-name="P157"><text:span text:style-name="Strong_20_Emphasis">EXTRACT</text:span> decompresses or unwraps the outer layer </text:p>
        </text:list-item>
        <text:list-item>
          <text:p text:style-name="P157"><text:span text:style-name="Strong_20_Emphasis">File Carver</text:span> identifies embedded files </text:p>
        </text:list-item>
        <text:list-item>
          <text:p text:style-name="P157"><text:span text:style-name="Strong_20_Emphasis">Entropy Engine</text:span> highlights compressed or encrypted regions </text:p>
        </text:list-item>
        <text:list-item>
          <text:p text:style-name="P157"><text:span text:style-name="Strong_20_Emphasis">String Intelligence</text:span> extracts readable content </text:p>
        </text:list-item>
        <text:list-item>
          <text:p text:style-name="P157"><text:span text:style-name="Strong_20_Emphasis">SEARCH</text:span> locates patterns or signatures </text:p>
        </text:list-item>
        <text:list-item>
          <text:p text:style-name="P157"><text:span text:style-name="Strong_20_Emphasis">Cryptanalysis</text:span> attempts to decode ciphertext </text:p>
        </text:list-item>
        <text:list-item>
          <text:p text:style-name="P157"><text:span text:style-name="Strong_20_Emphasis">Binary Inspection</text:span> analyzes executables </text:p>
        </text:list-item>
        <text:list-item>
          <text:p text:style-name="P156"><text:span text:style-name="Strong_20_Emphasis">LYZER</text:span> inspects images for structural anomalies </text:p>
        </text:list-item>
      </text:list>
      <text:p text:style-name="Text_20_body">Each stage feeds into the next, forming a pipeline that reveals deeper layers of data.</text:p>
      <text:p text:style-name="Text_20_body">Opus prints every step of this process, allowing analysts to follow the chain of reasoning.</text:p>
      <text:p text:style-name="Horizontal_20_Line"><text:soft-page-break/></text:p>
      <text:h text:style-name="Heading_20_2" text:outline-level="2">5.6 Error Handling and Safeguards</text:h>
      <text:p text:style-name="Text_20_body">Opus is designed to fail safely and informatively. When something goes wrong, Opus prints:</text:p>
      <text:list xml:id="list2929211300" text:style-name="L238">
        <text:list-item>
          <text:p text:style-name="P159">what failed </text:p>
        </text:list-item>
        <text:list-item>
          <text:p text:style-name="P159">why it failed </text:p>
        </text:list-item>
        <text:list-item>
          <text:p text:style-name="P158">what the user can do next </text:p>
        </text:list-item>
      </text:list>
      <text:p text:style-name="Text_20_body">Examples:</text:p>
      <text:p text:style-name="Preformatted_20_Text"><text:span text:style-name="Source_20_Text">SHA256: cannot read 'missing.txt'</text:span></text:p>
      <text:p text:style-name="Preformatted_20_Text"><text:span text:style-name="Source_20_Text">EXTRACT: failed with code 2</text:span></text:p>
      <text:p text:style-name="P1"><text:span text:style-name="Source_20_Text">LYZER: unsupported file type</text:span></text:p>
      <text:p text:style-name="Text_20_body">Opus will never:</text:p>
      <text:list xml:id="list616089675" text:style-name="L239">
        <text:list-item>
          <text:p text:style-name="P161">overwrite existing files </text:p>
        </text:list-item>
        <text:list-item>
          <text:p text:style-name="P161">delete data without explicit user intent </text:p>
        </text:list-item>
        <text:list-item>
          <text:p text:style-name="P161">recurse infinitely </text:p>
        </text:list-item>
        <text:list-item>
          <text:p text:style-name="P160">perform unsafe writes </text:p>
        </text:list-item>
      </text:list>
      <text:p text:style-name="Text_20_body">These safeguards are built into the architecture and apply to all subsystems.</text:p>
      <text:p text:style-name="Horizontal_20_Line"/>
      <text:h text:style-name="Heading_20_2" text:outline-level="2">5.7 Combining Subsystems</text:h>
      <text:p text:style-name="Text_20_body">Opus is most powerful when subsystems are combined. Analysts often chain commands to build a complete picture of a file.</text:p>
      <text:p text:style-name="Text_20_body">Examples:</text:p>
      <text:h text:style-name="Heading_20_3" text:outline-level="3">Example 1 — Finding a Flag in a Corrupted Archive</text:h>
      <text:p text:style-name="Preformatted_20_Text"><text:span text:style-name="Source_20_Text">EXTRACT challenge.bin</text:span></text:p>
      <text:p text:style-name="Preformatted_20_Text"><text:span text:style-name="Source_20_Text">SEARCH picoCTF{</text:span></text:p>
      <text:p text:style-name="P1"><text:span text:style-name="Source_20_Text">STRING extracted/file1</text:span></text:p>
      <text:h text:style-name="Heading_20_3" text:outline-level="3">Example 2 — Investigating a Suspicious Image</text:h>
      <text:p text:style-name="Preformatted_20_Text"><text:span text:style-name="Source_20_Text">LYZER ALL image.jpg</text:span></text:p>
      <text:p text:style-name="Preformatted_20_Text"><text:span text:style-name="Source_20_Text">SEARCH PK</text:span></text:p>
      <text:p text:style-name="P1"><text:span text:style-name="Source_20_Text">EXTRACT carved_0001.zip</text:span></text:p>
      <text:h text:style-name="Heading_20_3" text:outline-level="3">Example 3 — Solving a Cipher</text:h>
      <text:p text:style-name="Preformatted_20_Text"><text:span text:style-name="Source_20_Text">STRING cipher.txt</text:span></text:p>
      <text:p text:style-name="Preformatted_20_Text"><text:span text:style-name="Source_20_Text">VIGAN -in cipher.txt</text:span></text:p>
      <text:p text:style-name="P1"><text:span text:style-name="Source_20_Text">VIGREFINE -in cipher.txt -keylen 7</text:span></text:p>
      <text:p text:style-name="Text_20_body"><text:soft-page-break/>Opus encourages experimentation and iterative refinement.</text:p>
      <text:p text:style-name="Horizontal_20_Line"/>
      <text:h text:style-name="Heading_20_2" text:outline-level="2">5.8 Keyboard Shortcuts and Quality‑of‑Life Features</text:h>
      <text:p text:style-name="Text_20_body">Opus includes several small conveniences:</text:p>
      <text:list xml:id="list4017637827" text:style-name="L240">
        <text:list-item>
          <text:p text:style-name="P163"><text:span text:style-name="Strong_20_Emphasis">CLR</text:span> clears the screen </text:p>
        </text:list-item>
        <text:list-item>
          <text:p text:style-name="P163"><text:span text:style-name="Strong_20_Emphasis">SPLASH</text:span> reprints the Opus banner </text:p>
        </text:list-item>
        <text:list-item>
          <text:p text:style-name="P163"><text:span text:style-name="Strong_20_Emphasis">TIME</text:span> prints the system time </text:p>
        </text:list-item>
        <text:list-item>
          <text:p text:style-name="P162"><text:span text:style-name="Strong_20_Emphasis">Z / EXIT</text:span> cleanly shuts down the thread pool and exits </text:p>
        </text:list-item>
      </text:list>
      <text:p text:style-name="Text_20_body">These commands are optional but useful during long sessions.</text:p>
      <text:p text:style-name="Horizontal_20_Line"/>
      <text:h text:style-name="Heading_20_2" text:outline-level="2">5.9 Summary</text:h>
      <text:p text:style-name="Text_20_body">Chapter 5 provides a practical foundation for interacting with Opus. It explains how commands are structured, how output is formatted, how recursive workflows operate, and how subsystems can be combined to solve complex forensic challenges. With this foundation in place, the next chapters explore each subsystem in depth, beginning with the forensic analysis tools that form the core of Opus’s investigative capabilities.</text:p>
      <text:h text:style-name="Heading_20_1" text:outline-level="1"/>
      <text:h text:style-name="Heading_20_1" text:outline-level="1">====================================</text:h>
      <text:h text:style-name="Heading_20_1" text:outline-level="1"><text:span text:style-name="Strong_20_Emphasis">CHAPTER 6 — COMMAND REFERENCE</text:span></text:h>
      <text:h text:style-name="Heading_20_1" text:outline-level="1">====================================</text:h>
      <text:p text:style-name="Text_20_body">This chapter provides a comprehensive, deeply detailed reference for every command available in Opus. Each command is documented with:</text:p>
      <text:list xml:id="list596166520" text:style-name="L24">
        <text:list-item>
          <text:p text:style-name="P18">syntax </text:p>
        </text:list-item>
        <text:list-item>
          <text:p text:style-name="P18">long‑form explanation </text:p>
        </text:list-item>
        <text:list-item>
          <text:p text:style-name="P18">internal behavior </text:p>
        </text:list-item>
        <text:list-item>
          <text:p text:style-name="P18">rationale </text:p>
        </text:list-item>
        <text:list-item>
          <text:p text:style-name="P18">examples </text:p>
        </text:list-item>
        <text:list-item>
          <text:p text:style-name="P18">edge cases </text:p>
        </text:list-item>
        <text:list-item>
          <text:p text:style-name="P18">warnings </text:p>
        </text:list-item>
        <text:list-item>
          <text:p text:style-name="P18"><text:soft-page-break/>notes </text:p>
        </text:list-item>
        <text:list-item>
          <text:p text:style-name="P17">related commands </text:p>
        </text:list-item>
      </text:list>
      <text:p text:style-name="Text_20_body">This chapter is intentionally exhaustive. It is designed to be the definitive reference for analysts who want to understand not only how to use Opus, but why each command behaves the way it does.</text:p>
      <text:h text:style-name="Heading_20_1" text:outline-level="1">====================================</text:h>
      <text:h text:style-name="Heading_20_1" text:outline-level="1">CHAPTER 6 — SUBSYSTEMS</text:h>
      <text:h text:style-name="Heading_20_1" text:outline-level="1">====================================</text:h>
      <text:p text:style-name="Text_20_body">This chapter introduces the major subsystems that make up Opus’s forensic and cryptanalytic capabilities. Each subsystem is documented with its purpose, design rationale, command syntax, internal behavior, and practical workflows. The goal is to give analysts a clear understanding of how each component operates and how they can be combined to form powerful investigative pipelines.</text:p>
      <text:p text:style-name="Text_20_body">Opus subsystems are grouped into four major categories:</text:p>
      <text:list xml:id="list2441454973" text:style-name="L242">
        <text:list-item>
          <text:p text:style-name="P164"><text:span text:style-name="Strong_20_Emphasis">File Operations</text:span></text:p>
        </text:list-item>
        <text:list-item>
          <text:p text:style-name="P164"><text:span text:style-name="Strong_20_Emphasis">Forensic Analysis</text:span></text:p>
        </text:list-item>
        <text:list-item>
          <text:p text:style-name="P164"><text:span text:style-name="Strong_20_Emphasis">Integrity &amp; Hashing Tools</text:span></text:p>
        </text:list-item>
        <text:list-item>
          <text:p text:style-name="P164"><text:span text:style-name="Strong_20_Emphasis">Cryptanalysis &amp; Binary Inspection</text:span></text:p>
        </text:list-item>
      </text:list>
      <text:p text:style-name="Text_20_body">Each category contains one or more commands that operate independently but can be chained together to support recursive, multi‑stage analysis.</text:p>
      <text:p text:style-name="Text_20_body"/>
      <text:p text:style-name="Horizontal_20_Line"/>
      <text:h text:style-name="Heading_20_1" text:outline-level="1"><text:span text:style-name="Strong_20_Emphasis">6.1 FILE OPERATIONS</text:span></text:h>
      <text:p text:style-name="Text_20_body">File operations form the foundation of Opus’s workflow. These commands allow analysts to open files, create new files, copy data, delete content safely, wipe directory structures, and recursively extract archives or embedded content.</text:p>
      <text:p text:style-name="Text_20_body">File operations include:</text:p>
      <text:list xml:id="list2958535115" text:style-name="L243">
        <text:list-item>
          <text:p text:style-name="P165"><text:span text:style-name="Strong_20_Emphasis">OPEN</text:span> — load a file for analysis</text:p>
        </text:list-item>
        <text:list-item>
          <text:p text:style-name="P165"><text:span text:style-name="Strong_20_Emphasis">CREATE</text:span> — create a new file</text:p>
        </text:list-item>
        <text:list-item>
          <text:p text:style-name="P165"><text:span text:style-name="Strong_20_Emphasis">COPY</text:span> — duplicate a file</text:p>
        </text:list-item>
        <text:list-item>
          <text:p text:style-name="P165"><text:soft-page-break/><text:span text:style-name="Strong_20_Emphasis">DEL</text:span> — delete a file safely</text:p>
        </text:list-item>
        <text:list-item>
          <text:p text:style-name="P165"><text:span text:style-name="Strong_20_Emphasis">WIPEFS</text:span> — wipe a directory tree</text:p>
        </text:list-item>
        <text:list-item>
          <text:p text:style-name="P165"><text:span text:style-name="Strong_20_Emphasis">READ</text:span> — inspect raw file content in multiple modes</text:p>
        </text:list-item>
        <text:list-item>
          <text:p text:style-name="P165"><text:span text:style-name="Strong_20_Emphasis">EXTRACT</text:span> — recursively decompress and unwrap archives</text:p>
        </text:list-item>
      </text:list>
      <text:p text:style-name="Text_20_body"><text:span text:style-name="Strong_20_Emphasis"/></text:p>
      <text:h text:style-name="Heading_20_1" text:outline-level="1">====================================</text:h>
      <text:h text:style-name="Heading_20_1" text:outline-level="1">6.1 FILE OPERATIONS</text:h>
      <text:h text:style-name="Heading_20_1" text:outline-level="1">====================================</text:h>
      <text:p text:style-name="Text_20_body">The File Operations subsystem forms the foundation of Opus’s workflow. These commands allow analysts to open files, create new files, copy data, delete content safely, wipe directory structures, inspect raw bytes, and recursively extract archives or embedded content. While later subsystems perform deeper analysis, File Operations provide the essential primitives that make recursive, multi‑stage workflows possible.</text:p>
      <text:p text:style-name="Text_20_body">All file‑operation commands are designed to be <text:span text:style-name="Strong_20_Emphasis">safe</text:span>, <text:span text:style-name="Strong_20_Emphasis">predictable</text:span>, and <text:span text:style-name="Strong_20_Emphasis">transparent</text:span>. Opus never overwrites files without explicit user intent, never deletes data silently, and always prints clear messages describing what it is doing.</text:p>
      <text:p text:style-name="Text_20_body">The File Operations subsystem includes:</text:p>
      <text:list xml:id="list3430737988" text:style-name="L244">
        <text:list-item>
          <text:p text:style-name="P167"><text:span text:style-name="Strong_20_Emphasis">OPEN</text:span> — load a file for analysis </text:p>
        </text:list-item>
        <text:list-item>
          <text:p text:style-name="P167"><text:span text:style-name="Strong_20_Emphasis">CREATE</text:span> — create a new file </text:p>
        </text:list-item>
        <text:list-item>
          <text:p text:style-name="P167"><text:span text:style-name="Strong_20_Emphasis">COPY</text:span> — duplicate a file </text:p>
        </text:list-item>
        <text:list-item>
          <text:p text:style-name="P167"><text:span text:style-name="Strong_20_Emphasis">DEL</text:span> — delete a file safely </text:p>
        </text:list-item>
        <text:list-item>
          <text:p text:style-name="P167"><text:span text:style-name="Strong_20_Emphasis">WIPEFS</text:span> — wipe a directory tree </text:p>
        </text:list-item>
        <text:list-item>
          <text:p text:style-name="P167"><text:span text:style-name="Strong_20_Emphasis">READ</text:span> — inspect raw file content in multiple modes </text:p>
        </text:list-item>
        <text:list-item>
          <text:p text:style-name="P166"><text:span text:style-name="Strong_20_Emphasis">EXTRACT</text:span> — recursively decompress and unwrap archives </text:p>
        </text:list-item>
      </text:list>
      <text:p text:style-name="Text_20_body">Each command is documented in the sections below.</text:p>
      <text:p text:style-name="Horizontal_20_Line"/>
      <text:p text:style-name="Text_20_body"/>
      <text:p text:style-name="Text_20_body"/>
      <text:h text:style-name="Heading_20_1" text:outline-level="1"><text:soft-page-break/><text:span text:style-name="Strong_20_Emphasis">6.1.1 OPEN — Load a File for Analysis</text:span></text:h>
      <text:p text:style-name="Text_20_body"><text:span text:style-name="Strong_20_Emphasis">Syntax</text:span></text:p>
      <text:p text:style-name="P1"><text:span text:style-name="Source_20_Text">OPEN &lt;file&gt;</text:span></text:p>
      <text:p text:style-name="Text_20_body"><text:span text:style-name="Strong_20_Emphasis">Description</text:span> <text:line-break/>Loads a file into Opus for inspection and sets it as the active working file. Many analysis commands — including STRING, ENTROPY, SEARCH, and binary inspection tools — operate on whichever file is currently open. OPEN never modifies the file; it simply prepares Opus’s internal state.</text:p>
      <text:p text:style-name="Text_20_body"><text:span text:style-name="Strong_20_Emphasis">Behavior</text:span></text:p>
      <text:list xml:id="list657633449" text:style-name="L358">
        <text:list-item>
          <text:p text:style-name="P285"><text:span text:style-name="Strong_20_Emphasis">validates that the file exists and is readable</text:span> </text:p>
        </text:list-item>
        <text:list-item>
          <text:p text:style-name="P285"><text:span text:style-name="Strong_20_Emphasis">rejects directories</text:span> and warns on symbolic links </text:p>
        </text:list-item>
        <text:list-item>
          <text:p text:style-name="P285"><text:span text:style-name="Strong_20_Emphasis">prints status messages</text:span>, including filename and size </text:p>
        </text:list-item>
        <text:list-item>
          <text:p text:style-name="P285"><text:span text:style-name="Strong_20_Emphasis">updates the current working file</text:span>, replacing any previous context </text:p>
        </text:list-item>
        <text:list-item>
          <text:p text:style-name="P284"><text:span text:style-name="Strong_20_Emphasis">performs no writes</text:span> and makes no assumptions about file format </text:p>
        </text:list-item>
      </text:list>
      <text:p text:style-name="Text_20_body"><text:span text:style-name="Strong_20_Emphasis">Example Output</text:span></text:p>
      <text:p text:style-name="Preformatted_20_Text"><text:span text:style-name="Source_20_Text"><text:tab/>Command: open test123.txt</text:span></text:p>
      <text:p text:style-name="Preformatted_20_Text"><text:span text:style-name="Source_20_Text"><text:tab/>File opened successfully: test123.txt</text:span></text:p>
      <text:p text:style-name="Preformatted_20_Text"><text:span text:style-name="Source_20_Text"/></text:p>
      <text:p text:style-name="Horizontal_20_Line"/>
      <text:p text:style-name="Text_20_body"><text:span text:style-name="Source_20_Text">Absolutely, Greg — your draft already captures the essence of CREATE beautifully. What it needs now is a </text:span><text:span text:style-name="Source_20_Text"><text:span text:style-name="Strong_20_Emphasis">clean, publication‑ready rewrite</text:span></text:span><text:span text:style-name="Source_20_Text"> that matches the tone and structure of the OPEN section we just finalized.</text:span></text:p>
      <text:p text:style-name="Text_20_body">Below is a polished, cohesive version of <text:span text:style-name="Strong_20_Emphasis">6.1.2 CREATE</text:span>, keeping all your technical guarantees intact while tightening the language and flow.</text:p>
      <text:p text:style-name="Horizontal_20_Line"/>
      <text:h text:style-name="Heading_20_1" text:outline-level="1"><text:span text:style-name="Strong_20_Emphasis">6.1.2 CREATE — Secure File Creation</text:span></text:h>
      <text:p text:style-name="Text_20_body"><text:span text:style-name="Strong_20_Emphasis">Syntax</text:span></text:p>
      <text:p text:style-name="P1"><text:span text:style-name="Source_20_Text">CREATE &lt;file&gt;</text:span></text:p>
      <text:p text:style-name="Text_20_body"><text:span text:style-name="Strong_20_Emphasis">Description</text:span> <text:line-break/>Creates a new file using Opus’s secure creation primitive. The file is created <text:span text:style-name="Strong_20_Emphasis">atomically</text:span>, with <text:span text:style-name="Strong_20_Emphasis">strict permissions</text:span>, and without any possibility of overwriting existing files or following symbolic links. This protects analysts from race‑condition attacks, accidental data loss, and filesystem‑based privilege‑escalation tricks commonly encountered in CTFs and hostile environments. CREATE never writes user data; it only produces a secure, empty file.</text:p>
      <text:p text:style-name="Text_20_body"><text:soft-page-break/><text:span text:style-name="Strong_20_Emphasis">Security Guarantees</text:span></text:p>
      <text:list xml:id="list2444984910" text:style-name="L359">
        <text:list-item>
          <text:p text:style-name="P287"><text:span text:style-name="Strong_20_Emphasis">atomic creation</text:span> — the file is created using exclusive <text:span text:style-name="Source_20_Text">O_CREAT | O_EXCL</text:span> semantics </text:p>
        </text:list-item>
        <text:list-item>
          <text:p text:style-name="P287"><text:span text:style-name="Strong_20_Emphasis">no overwrites</text:span> — creation fails if the target already exists </text:p>
        </text:list-item>
        <text:list-item>
          <text:p text:style-name="P287"><text:span text:style-name="Strong_20_Emphasis">no symlink traversal</text:span> — symbolic links are rejected to prevent redirection attacks </text:p>
        </text:list-item>
        <text:list-item>
          <text:p text:style-name="P287"><text:span text:style-name="Strong_20_Emphasis">secure permissions</text:span> — the file is created with restrictive mode (typically <text:span text:style-name="Source_20_Text">0600</text:span>) </text:p>
        </text:list-item>
        <text:list-item>
          <text:p text:style-name="P286"><text:span text:style-name="Strong_20_Emphasis">no pre‑creation exposure</text:span> — the file never exists in an insecure or world‑readable state </text:p>
        </text:list-item>
      </text:list>
      <text:p text:style-name="Text_20_body"><text:span text:style-name="Strong_20_Emphasis">Internal Behavior</text:span></text:p>
      <text:list xml:id="list3250666444" text:style-name="L360">
        <text:list-item>
          <text:p text:style-name="P289">validates the target path </text:p>
        </text:list-item>
        <text:list-item>
          <text:p text:style-name="P289">rejects symbolic links </text:p>
        </text:list-item>
        <text:list-item>
          <text:p text:style-name="P289">opens the file with exclusive creation flags </text:p>
        </text:list-item>
        <text:list-item>
          <text:p text:style-name="P289">applies secure permissions at creation time </text:p>
        </text:list-item>
        <text:list-item>
          <text:p text:style-name="P289">writes zero‑length content </text:p>
        </text:list-item>
        <text:list-item>
          <text:p text:style-name="P288">prints a confirmation message </text:p>
        </text:list-item>
      </text:list>
      <text:p text:style-name="Text_20_body"><text:span text:style-name="Strong_20_Emphasis">Example Output</text:span></text:p>
      <text:p text:style-name="P1"><text:span text:style-name="Source_20_Text">[CREATE] Created secure empty file: notes.txt</text:span></text:p>
      <text:p text:style-name="Horizontal_20_Line"/>
      <text:h text:style-name="Heading_20_1" text:outline-level="1"><text:span text:style-name="Strong_20_Emphasis">6.1.3 COPY — Secure Copy with Integrity Verification</text:span></text:h>
      <text:p text:style-name="Text_20_body"><text:span text:style-name="Strong_20_Emphasis">Syntax</text:span></text:p>
      <text:p text:style-name="P1"><text:span text:style-name="Source_20_Text">COPY &lt;source&gt; &lt;destination&gt;</text:span></text:p>
      <text:p text:style-name="Text_20_body"><text:span text:style-name="Strong_20_Emphasis">Description</text:span> <text:line-break/>Performs a secure, integrity‑verified file copy. The destination file is created using the same hardened primitive as CREATE, ensuring that it cannot overwrite existing files or follow symbolic links. After copying, Opus computes MD5 hashes of both files and verifies that the destination is an exact byte‑for‑byte match. If verification fails, the destination file is removed to prevent corrupted or partial artifacts.</text:p>
      <text:p text:style-name="Text_20_body"><text:span text:style-name="Strong_20_Emphasis">Security Guarantees</text:span></text:p>
      <text:list xml:id="list2933380086" text:style-name="L361">
        <text:list-item>
          <text:p text:style-name="P291"><text:span text:style-name="Strong_20_Emphasis">secure destination creation</text:span> — uses exclusive <text:span text:style-name="Source_20_Text">O_CREAT | O_EXCL</text:span> semantics </text:p>
        </text:list-item>
        <text:list-item>
          <text:p text:style-name="P291"><text:span text:style-name="Strong_20_Emphasis">no overwrites</text:span> — COPY fails if the destination already exists </text:p>
        </text:list-item>
        <text:list-item>
          <text:p text:style-name="P291"><text:span text:style-name="Strong_20_Emphasis">no symlink traversal</text:span> — symbolic links are rejected for both source and destination </text:p>
        </text:list-item>
        <text:list-item>
          <text:p text:style-name="P291"><text:span text:style-name="Strong_20_Emphasis">block‑wise copy</text:span> — prevents partial writes and ensures deterministic behavior </text:p>
        </text:list-item>
        <text:list-item>
          <text:p text:style-name="P291"><text:span text:style-name="Strong_20_Emphasis">integrity verification</text:span> — MD5(source) must match MD5(destination) </text:p>
        </text:list-item>
        <text:list-item>
          <text:p text:style-name="P291"><text:span text:style-name="Strong_20_Emphasis">failure‑safe cleanup</text:span> — destination is deleted if verification fails </text:p>
        </text:list-item>
        <text:list-item>
          <text:p text:style-name="P290"><text:span text:style-name="Strong_20_Emphasis">no exposure window</text:span> — destination never exists in a corrupted or incomplete state </text:p>
        </text:list-item>
      </text:list>
      <text:p text:style-name="Text_20_body"><text:soft-page-break/><text:span text:style-name="Strong_20_Emphasis">Internal Behavior</text:span></text:p>
      <text:list xml:id="list1670823958" text:style-name="L362">
        <text:list-item>
          <text:p text:style-name="P293"><text:span text:style-name="Strong_20_Emphasis">validates source path</text:span> </text:p>
        </text:list-item>
        <text:list-item>
          <text:p text:style-name="P293"><text:span text:style-name="Strong_20_Emphasis">rejects symbolic links</text:span> for both source and destination </text:p>
        </text:list-item>
        <text:list-item>
          <text:p text:style-name="P293"><text:span text:style-name="Strong_20_Emphasis">creates destination securely</text:span> using exclusive creation flags </text:p>
        </text:list-item>
        <text:list-item>
          <text:p text:style-name="P293"><text:span text:style-name="Strong_20_Emphasis">copies data in fixed‑size blocks</text:span> </text:p>
        </text:list-item>
        <text:list-item>
          <text:p text:style-name="P293"><text:span text:style-name="Strong_20_Emphasis">computes MD5 hashes</text:span> for both files </text:p>
        </text:list-item>
        <text:list-item>
          <text:p text:style-name="P293"><text:span text:style-name="Strong_20_Emphasis">compares digests</text:span> and reports the result </text:p>
        </text:list-item>
        <text:list-item>
          <text:p text:style-name="P292"><text:span text:style-name="Strong_20_Emphasis">removes destination on mismatch</text:span> </text:p>
        </text:list-item>
      </text:list>
      <text:p text:style-name="Text_20_body"><text:span text:style-name="Strong_20_Emphasis">Example Output</text:span></text:p>
      <text:p text:style-name="Preformatted_20_Text"><text:span text:style-name="Source_20_Text"><text:tab/>Command: copy test123.txt testABC.txt</text:span></text:p>
      <text:p text:style-name="Preformatted_20_Text"><text:span text:style-name="Source_20_Text"/></text:p>
      <text:p text:style-name="Preformatted_20_Text"><text:span text:style-name="Source_20_Text"><text:tab/>COPY command: test123.txt -&gt; testABC.txt</text:span></text:p>
      <text:p text:style-name="Preformatted_20_Text"><text:span text:style-name="Source_20_Text"><text:tab/>FILE_COPY: starting copy test123.txt -&gt; testABC.txt (0 bytes)</text:span></text:p>
      <text:p text:style-name="Preformatted_20_Text"><text:span text:style-name="Source_20_Text"><text:tab/>FILE_COPY: MD5(source) <text:s text:c="5"/>= d41d8cd98f00b204e9800998ecf8427e</text:span></text:p>
      <text:p text:style-name="Preformatted_20_Text"><text:span text:style-name="Source_20_Text"><text:tab/>FILE_COPY: MD5(destination) = d41d8cd98f00b204e9800998ecf8427e</text:span></text:p>
      <text:p text:style-name="Preformatted_20_Text"><text:span text:style-name="Source_20_Text"><text:tab/>FILE_COPY: copy verified successfully (MD5 match).</text:span></text:p>
      <text:p text:style-name="Preformatted_20_Text"><text:span text:style-name="Source_20_Text"><text:tab/>COPY: success</text:span></text:p>
      <text:p text:style-name="Preformatted_20_Text"><text:span text:style-name="Source_20_Text"/></text:p>
      <text:p text:style-name="Horizontal_20_Line"/>
      <text:h text:style-name="Heading_20_3" text:outline-level="3"><text:span text:style-name="Strong_20_Emphasis"><text:span text:style-name="T9">6.1.4 DEL — Secure File Deletion</text:span></text:span></text:h>
      <text:p text:style-name="Text_20_body"><text:span text:style-name="Strong_20_Emphasis"><text:span text:style-name="T10">Syntax</text:span></text:span></text:p>
      <text:p text:style-name="P1"><text:span text:style-name="Source_20_Text"><text:span text:style-name="T10">DEL</text:span></text:span></text:p>
      <text:p text:style-name="Text_20_body"><text:span text:style-name="Strong_20_Emphasis"><text:span text:style-name="T10">Description</text:span></text:span><text:span text:style-name="T10"> <text:line-break/>Performs a </text:span><text:span text:style-name="Strong_20_Emphasis"><text:span text:style-name="T10">secure deletion</text:span></text:span><text:span text:style-name="T10"> of a single file. DEL does not take arguments on the command line; instead, it interactively prompts for the target filename and the desired deletion standard. The file is then overwritten according to the selected policy before being removed from the filesystem. This command is intended for situations where residual data must not be recoverable through standard forensic techniques.</text:span></text:p>
      <text:p text:style-name="Text_20_body"><text:span text:style-name="Strong_20_Emphasis"><text:span text:style-name="T10">Behavior</text:span></text:span></text:p>
      <text:list xml:id="list1649694152" text:style-name="L363">
        <text:list-item>
          <text:p text:style-name="P295"><text:span text:style-name="Strong_20_Emphasis"><text:span text:style-name="T10">prompts for the filename</text:span></text:span><text:span text:style-name="T10"> to securely delete </text:span></text:p>
        </text:list-item>
        <text:list-item>
          <text:p text:style-name="P295"><text:span text:style-name="Strong_20_Emphasis"><text:span text:style-name="T10">offers a choice of deletion standards</text:span></text:span><text:span text:style-name="T10"> (e.g., DoD 5220.22‑M, NIST 800‑88 Rev.1) </text:span></text:p>
        </text:list-item>
        <text:list-item>
          <text:p text:style-name="P295"><text:span text:style-name="Strong_20_Emphasis"><text:span text:style-name="T10">confirms the selection</text:span></text:span><text:span text:style-name="T10"> and asks for explicit user consent </text:span></text:p>
        </text:list-item>
        <text:list-item>
          <text:p text:style-name="P295"><text:span text:style-name="Strong_20_Emphasis"><text:span text:style-name="T10">overwrites file contents</text:span></text:span><text:span text:style-name="T10"> according to the chosen standard </text:span></text:p>
        </text:list-item>
        <text:list-item>
          <text:p text:style-name="P295"><text:span text:style-name="Strong_20_Emphasis"><text:span text:style-name="T10">unlinks the file</text:span></text:span><text:span text:style-name="T10"> after successful overwrite </text:span></text:p>
        </text:list-item>
        <text:list-item>
          <text:p text:style-name="P294"><text:span text:style-name="Strong_20_Emphasis"><text:span text:style-name="T10">prints a final status message</text:span></text:span><text:span text:style-name="T10"> on completion </text:span></text:p>
        </text:list-item>
      </text:list>
      <text:p text:style-name="Text_20_body"><text:span text:style-name="Strong_20_Emphasis">Example Session</text:span></text:p>
      <text:p text:style-name="Preformatted_20_Text"><text:span text:style-name="Source_20_Text"><text:tab/>Command: DEL</text:span></text:p>
      <text:p text:style-name="Preformatted_20_Text"><text:span text:style-name="Source_20_Text"><text:tab/>Enter the name of the file to securely delete: testFile.txt</text:span></text:p>
      <text:p text:style-name="Preformatted_20_Text"><text:span text:style-name="Source_20_Text"><text:tab/>Choose deletion standard:</text:span></text:p>
      <text:p text:style-name="Preformatted_20_Text"><text:span text:style-name="Source_20_Text"><text:tab/> <text:s/>1 = DoD 5220.22-M (3-pass overwrite)</text:span></text:p>
      <text:p text:style-name="Preformatted_20_Text"><text:soft-page-break/><text:span text:style-name="Source_20_Text"><text:tab/> <text:s/>2 = NIST 800-88 Rev.1 (single-pass zero overwrite)</text:span></text:p>
      <text:p text:style-name="Preformatted_20_Text"><text:span text:style-name="Source_20_Text"><text:tab/>Selection: 1</text:span></text:p>
      <text:p text:style-name="Preformatted_20_Text"><text:span text:style-name="Source_20_Text"><text:tab/>Are you sure you want to SECURELY DELETE 'testFile.txt'? [Y/N]: Y</text:span></text:p>
      <text:p text:style-name="P1"><text:span text:style-name="Source_20_Text"><text:tab/>Secure deletion complete.</text:span></text:p>
      <text:p text:style-name="Horizontal_20_Line"/>
      <text:h text:style-name="Heading_20_1" text:outline-level="1"><text:span text:style-name="Strong_20_Emphasis">6.1.5 WIPEFS — Secure Free‑Space Wiping</text:span></text:h>
      <text:p text:style-name="Text_20_body"><text:span text:style-name="Strong_20_Emphasis">Syntax</text:span></text:p>
      <text:p text:style-name="P1"><text:span text:style-name="Source_20_Text">WIPEFS &lt;directory&gt;</text:span></text:p>
      <text:p text:style-name="Text_20_body"><text:span text:style-name="Strong_20_Emphasis">Description</text:span> <text:line-break/>WIPEFS performs a <text:span text:style-name="Strong_20_Emphasis">secure free‑space wipe</text:span> on a target directory tree. It does not delete existing files; instead, it overwrites <text:span text:style-name="Emphasis">unallocated space</text:span> within the filesystem by creating large temporary files until the volume is full, then removing them. This eliminates residual data left behind by previously deleted files, making recovery through forensic carving significantly more difficult.</text:p>
      <text:p text:style-name="Text_20_body">WIPEFS is designed for controlled environments such as loopback filesystems, forensic sandboxes, and disposable workspaces. It includes multiple safety checks to prevent accidental execution on critical system paths.</text:p>
      <text:p text:style-name="Text_20_body"><text:span text:style-name="Strong_20_Emphasis">Behavior</text:span></text:p>
      <text:list xml:id="list3013975923" text:style-name="L364">
        <text:list-item>
          <text:p text:style-name="P297"><text:span text:style-name="Strong_20_Emphasis">validates the target directory</text:span> and ensures it exists </text:p>
        </text:list-item>
        <text:list-item>
          <text:p text:style-name="P297"><text:span text:style-name="Strong_20_Emphasis">rejects unsafe paths</text:span>, including <text:span text:style-name="Source_20_Text">/</text:span>, <text:span text:style-name="Source_20_Text">/home</text:span>, and other protected locations </text:p>
        </text:list-item>
        <text:list-item>
          <text:p text:style-name="P297"><text:span text:style-name="Strong_20_Emphasis">creates temporary wipe files</text:span> inside the target directory </text:p>
        </text:list-item>
        <text:list-item>
          <text:p text:style-name="P297"><text:span text:style-name="Strong_20_Emphasis">writes until the filesystem reports no remaining free space</text:span> </text:p>
        </text:list-item>
        <text:list-item>
          <text:p text:style-name="P297"><text:span text:style-name="Strong_20_Emphasis">deletes all temporary files</text:span> after the wipe completes </text:p>
        </text:list-item>
        <text:list-item>
          <text:p text:style-name="P296"><text:span text:style-name="Strong_20_Emphasis">prints progress and status messages</text:span> throughout the operation </text:p>
        </text:list-item>
      </text:list>
      <text:p text:style-name="Text_20_body"><text:span text:style-name="Strong_20_Emphasis">Safety Features</text:span></text:p>
      <text:list xml:id="list2556097088" text:style-name="L365">
        <text:list-item>
          <text:p text:style-name="P299"><text:span text:style-name="Strong_20_Emphasis">path validation</text:span> — prevents wiping the wrong filesystem </text:p>
        </text:list-item>
        <text:list-item>
          <text:p text:style-name="P299"><text:span text:style-name="Strong_20_Emphasis">directory‑scope containment</text:span> — all temporary files remain inside the target directory </text:p>
        </text:list-item>
        <text:list-item>
          <text:p text:style-name="P299"><text:span text:style-name="Strong_20_Emphasis">no traversal</text:span> — WIPEFS never climbs upward in the directory tree </text:p>
        </text:list-item>
        <text:list-item>
          <text:p text:style-name="P299"><text:span text:style-name="Strong_20_Emphasis">no modification of existing files</text:span> — only free space is overwritten </text:p>
        </text:list-item>
        <text:list-item>
          <text:p text:style-name="P298"><text:span text:style-name="Strong_20_Emphasis">automatic cleanup</text:span> — temporary files are removed even if the wipe is interrupted </text:p>
        </text:list-item>
      </text:list>
      <text:p text:style-name="Text_20_body"><text:span text:style-name="Strong_20_Emphasis">Example Session</text:span></text:p>
      <text:p text:style-name="Preformatted_20_Text"><text:span text:style-name="Source_20_Text"><text:tab/>WIPEFS ./forensic_loop</text:span></text:p>
      <text:p text:style-name="Preformatted_20_Text"><text:span text:style-name="Source_20_Text"><text:tab/>[WIPEFS] Starting free-space wipe...</text:span></text:p>
      <text:p text:style-name="Preformatted_20_Text"><text:span text:style-name="Source_20_Text"><text:tab/>[WIPEFS] Writing temporary blocks...</text:span></text:p>
      <text:p text:style-name="Preformatted_20_Text"><text:span text:style-name="Source_20_Text"><text:tab/>[WIPEFS] Filesystem full. Cleaning up...</text:span></text:p>
      <text:p text:style-name="P1"><text:span text:style-name="Source_20_Text"><text:tab/>[WIPEFS] Secure free-space wipe complete.</text:span></text:p>
      <text:p text:style-name="Horizontal_20_Line"/>
      <text:p text:style-name="Text_20_body"><text:soft-page-break/></text:p>
      <text:h text:style-name="Heading_20_1" text:outline-level="1"><text:span text:style-name="Strong_20_Emphasis">6.1.6 READ — Inspect Raw File Content</text:span></text:h>
      <text:p text:style-name="Text_20_body"><text:span text:style-name="Strong_20_Emphasis">Syntax</text:span></text:p>
      <text:p text:style-name="P1"><text:span text:style-name="Source_20_Text">READ &lt;file&gt;</text:span></text:p>
      <text:p text:style-name="Text_20_body"><text:span text:style-name="Strong_20_Emphasis">Description</text:span> <text:line-break/>Displays the raw contents of a file in a structured, human‑readable format. READ is designed for quick triage, binary inspection, and low‑level verification. It prints both hexadecimal and ASCII representations, highlights non‑printable bytes, and preserves exact byte order. READ never modifies the file and performs no decoding or interpretation.</text:p>
      <text:p text:style-name="Text_20_body"><text:span text:style-name="Strong_20_Emphasis">Behavior</text:span></text:p>
      <text:list xml:id="list2093626832" text:style-name="L366">
        <text:list-item>
          <text:p text:style-name="P301"><text:span text:style-name="Strong_20_Emphasis">validates the target file</text:span> before reading </text:p>
        </text:list-item>
        <text:list-item>
          <text:p text:style-name="P301"><text:span text:style-name="Strong_20_Emphasis">opens the file in read‑only mode</text:span> </text:p>
        </text:list-item>
        <text:list-item>
          <text:p text:style-name="P301"><text:span text:style-name="Strong_20_Emphasis">reads data in fixed‑size blocks</text:span> for predictable output </text:p>
        </text:list-item>
        <text:list-item>
          <text:p text:style-name="P301"><text:span text:style-name="Strong_20_Emphasis">prints hex and ASCII columns</text:span> side‑by‑side </text:p>
        </text:list-item>
        <text:list-item>
          <text:p text:style-name="P301"><text:span text:style-name="Strong_20_Emphasis">highlights non‑printable characters</text:span> in the ASCII column </text:p>
        </text:list-item>
        <text:list-item>
          <text:p text:style-name="P300"><text:span text:style-name="Strong_20_Emphasis">stops cleanly at end‑of‑file</text:span> without padding or assumptions </text:p>
        </text:list-item>
      </text:list>
      <text:p text:style-name="Text_20_body"><text:span text:style-name="Strong_20_Emphasis">Example Output</text:span></text:p>
      <text:p text:style-name="Text_20_body"><text:span text:style-name="Source_20_Text"><text:span text:style-name="T8"><text:tab/>Command: READ</text:span></text:span></text:p>
      <text:p text:style-name="Text_20_body"><text:span text:style-name="Source_20_Text"><text:span text:style-name="T8"><text:tab/>Enter file path: cipher.txt</text:span></text:span></text:p>
      <text:p text:style-name="Text_20_body"><text:span text:style-name="Source_20_Text"><text:span text:style-name="T8"><text:tab/>Mode [r=raw, s=safe, t=structured] (default r): r</text:span></text:span></text:p>
      <text:p text:style-name="Text_20_body"><text:span text:style-name="Source_20_Text"><text:span text:style-name="T8"><text:tab/>00000000 <text:s/>0a 63 66 73 69 75 68 65 67 20 70 77 75 77 20 61 <text:s/>.cfsiuheg pwuw a</text:span></text:span></text:p>
      <text:p text:style-name="Text_20_body"><text:span text:style-name="Source_20_Text"><text:span text:style-name="T8"><text:tab/>00000010 <text:s/>67 20 64 66 6e 75 20 76 74 68 69 20 2d 20 76 75 <text:s/>g dfnu vthi - vu</text:span></text:span></text:p>
      <text:p text:style-name="Text_20_body"><text:span text:style-name="Source_20_Text"><text:span text:style-name="T8"><text:tab/>00000020 <text:s/>77 6f 6e 77 73 63 64 5f 61 67 5f 63 5f 66 6d 77 <text:s/>wonwscd_ag_c_fmw</text:span></text:span></text:p>
      <text:p text:style-name="Text_20_body"><text:span text:style-name="Source_20_Text"><text:span text:style-name="T8"><text:tab/>00000030 <text:s/>75 5f 74 68 71 6a 79 68 5f 6a 32 32 38 31 38 32 <text:s/>u_thqjyh_j228182</text:span></text:span></text:p>
      <text:p text:style-name="Text_20_body"><text:span text:style-name="Source_20_Text"><text:span text:style-name="T8"><text:tab/>00000040 <text:s/>37 0a 2d 2d 2d 2d 2d 2d 2d 2d 2d 2d 2d 2d 2d 2d <text:s/>7.--------------</text:span></text:span></text:p>
      <text:p text:style-name="Text_20_body"><text:span text:style-name="Strong_20_Emphasis">Notes</text:span></text:p>
      <text:list xml:id="list3115354433" text:style-name="L367">
        <text:list-item>
          <text:p text:style-name="P303">READ does not attempt to detect file type </text:p>
        </text:list-item>
        <text:list-item>
          <text:p text:style-name="P303">READ does not follow symbolic links unless explicitly allowed </text:p>
        </text:list-item>
        <text:list-item>
          <text:p text:style-name="P302">READ is safe for hostile or malformed input </text:p>
        </text:list-item>
      </text:list>
      <text:p text:style-name="Horizontal_20_Line"/>
      <text:p text:style-name="Text_20_body"/>
      <text:h text:style-name="Heading_20_1" text:outline-level="1"><text:soft-page-break/><text:span text:style-name="Strong_20_Emphasis">6.1.7 EXTRACT — Recursive Archive Extraction</text:span></text:h>
      <text:p text:style-name="Text_20_body"><text:span text:style-name="Strong_20_Emphasis">Syntax</text:span></text:p>
      <text:p text:style-name="P1"><text:span text:style-name="Source_20_Text">EXTRACT &lt;file&gt;</text:span></text:p>
      <text:p text:style-name="Text_20_body"><text:span text:style-name="Strong_20_Emphasis">Description</text:span> <text:line-break/>Recursively extracts supported archive formats, including ZIP, TAR, GZIP, and embedded structures such as ZIP‑in‑PNG or ZIP‑in‑ZIP. EXTRACT is designed for forensic workflows where archives may contain nested layers, hidden payloads, or malformed structures. Each extraction step is logged, and Opus creates a dedicated output directory to preserve provenance and prevent overwriting existing files.</text:p>
      <text:p text:style-name="Text_20_body">EXTRACT never modifies the original file. All extracted content is written to a controlled directory tree under the working path.</text:p>
      <text:p text:style-name="Text_20_body"><text:span text:style-name="Strong_20_Emphasis">Behavior</text:span></text:p>
      <text:list xml:id="list4262726881" text:style-name="L368">
        <text:list-item>
          <text:p text:style-name="P305"><text:span text:style-name="Strong_20_Emphasis">detects file format</text:span> using signature‑based inspection </text:p>
        </text:list-item>
        <text:list-item>
          <text:p text:style-name="P305"><text:span text:style-name="Strong_20_Emphasis">creates a dedicated output directory</text:span> for the extraction session </text:p>
        </text:list-item>
        <text:list-item>
          <text:p text:style-name="P305"><text:span text:style-name="Strong_20_Emphasis">extracts top‑level content</text:span> using format‑appropriate routines </text:p>
        </text:list-item>
        <text:list-item>
          <text:p text:style-name="P305"><text:span text:style-name="Strong_20_Emphasis">scans extracted files for embedded archives</text:span> </text:p>
        </text:list-item>
        <text:list-item>
          <text:p text:style-name="P305"><text:span text:style-name="Strong_20_Emphasis">recursively processes nested structures</text:span> until no further archives remain </text:p>
        </text:list-item>
        <text:list-item>
          <text:p text:style-name="P305"><text:span text:style-name="Strong_20_Emphasis">prints a structured extraction log</text:span> showing each step </text:p>
        </text:list-item>
        <text:list-item>
          <text:p text:style-name="P304"><text:span text:style-name="Strong_20_Emphasis">avoids overwriting existing files</text:span> by generating unique output paths </text:p>
        </text:list-item>
      </text:list>
      <text:p text:style-name="Text_20_body"><text:span text:style-name="Strong_20_Emphasis">Supported Features</text:span></text:p>
      <text:list xml:id="list255417464" text:style-name="L369">
        <text:list-item>
          <text:p text:style-name="P307"><text:span text:style-name="Strong_20_Emphasis">ZIP extraction</text:span> including multi‑file archives </text:p>
        </text:list-item>
        <text:list-item>
          <text:p text:style-name="P307"><text:span text:style-name="Strong_20_Emphasis">TAR and GZIP handling</text:span> </text:p>
        </text:list-item>
        <text:list-item>
          <text:p text:style-name="P307"><text:span text:style-name="Strong_20_Emphasis">PNG‑embedded ZIP detection</text:span> via chunk scanning </text:p>
        </text:list-item>
        <text:list-item>
          <text:p text:style-name="P307"><text:span text:style-name="Strong_20_Emphasis">depth‑limited recursion</text:span> to prevent infinite loops </text:p>
        </text:list-item>
        <text:list-item>
          <text:p text:style-name="P307"><text:span text:style-name="Strong_20_Emphasis">safe output paths</text:span> that never escape the working directory </text:p>
        </text:list-item>
        <text:list-item>
          <text:p text:style-name="P306"><text:span text:style-name="Strong_20_Emphasis">malformed archive resilience</text:span> with graceful error reporting </text:p>
        </text:list-item>
      </text:list>
      <text:p text:style-name="Text_20_body"><text:span text:style-name="Strong_20_Emphasis">Example Output</text:span></text:p>
      <text:p text:style-name="Preformatted_20_Text"><text:span text:style-name="Source_20_Text"><text:span text:style-name="T12"><text:tab/></text:span></text:span><text:span text:style-name="Source_20_Text"><text:span text:style-name="T7">[EXTRACT] ZIP detected.</text:span></text:span></text:p>
      <text:p text:style-name="Preformatted_20_Text"><text:span text:style-name="Source_20_Text"><text:tab/>[EXTRACT] Extracted 12 files into ./sample.bin_extracted</text:span></text:p>
      <text:p text:style-name="Preformatted_20_Text"><text:span text:style-name="Source_20_Text"><text:tab/>[EXTRACT] Found embedded ZIP: layer1.zip</text:span></text:p>
      <text:p text:style-name="Preformatted_20_Text"><text:span text:style-name="Source_20_Text"><text:tab/>[EXTRACT] Extracted 3 files into ./sample.bin_extracted/layer1</text:span></text:p>
      <text:p text:style-name="Preformatted_20_Text"><text:span text:style-name="Source_20_Text"><text:tab/>[EXTRACT] Done.</text:span></text:p>
      <text:p text:style-name="Preformatted_20_Text"><text:span text:style-name="Source_20_Text"/></text:p>
      <text:p text:style-name="Preformatted_20_Text"><text:span text:style-name="Source_20_Text"/></text:p>
      <text:p text:style-name="Text_20_body"><text:span text:style-name="Strong_20_Emphasis">Notes</text:span></text:p>
      <text:list xml:id="list1835589920" text:style-name="L370">
        <text:list-item>
          <text:p text:style-name="P309">EXTRACT never deletes or modifies the original file </text:p>
        </text:list-item>
        <text:list-item>
          <text:p text:style-name="P309">EXTRACT is safe for hostile or malformed archives </text:p>
        </text:list-item>
        <text:list-item>
          <text:p text:style-name="P308"><text:soft-page-break/>EXTRACT logs can be used for provenance tracking or chain‑of‑custody documentation </text:p>
        </text:list-item>
      </text:list>
      <text:p text:style-name="Horizontal_20_Line"/>
      <text:h text:style-name="Heading_20_1" text:outline-level="1"><text:span text:style-name="Strong_20_Emphasis">6.1.8 Summary</text:span></text:h>
      <text:p text:style-name="Text_20_body"><text:span text:style-name="Strong_20_Emphasis"/></text:p>
      <text:p text:style-name="Text_20_body">The File Operations subsystem provides a set of secure, predictable primitives for interacting with the filesystem. Each command is designed to support forensic workflows, prevent accidental data loss, and operate safely in hostile or malformed environments.</text:p>
      <text:p text:style-name="Text_20_body"><text:span text:style-name="Strong_20_Emphasis">Capabilities</text:span></text:p>
      <text:list xml:id="list3285716288" text:style-name="L371">
        <text:list-item>
          <text:p text:style-name="P311"><text:span text:style-name="Strong_20_Emphasis">OPEN loads a file</text:span> into Opus for inspection without modifying it </text:p>
        </text:list-item>
        <text:list-item>
          <text:p text:style-name="P311"><text:span text:style-name="Strong_20_Emphasis">CREATE securely creates a new file</text:span> using atomic, exclusive semantics </text:p>
        </text:list-item>
        <text:list-item>
          <text:p text:style-name="P311"><text:span text:style-name="Strong_20_Emphasis">COPY performs integrity‑verified duplication</text:span> with MD5 confirmation </text:p>
        </text:list-item>
        <text:list-item>
          <text:p text:style-name="P311"><text:span text:style-name="Strong_20_Emphasis">DEL securely deletes a file</text:span> using selectable overwrite standards </text:p>
        </text:list-item>
        <text:list-item>
          <text:p text:style-name="P311"><text:span text:style-name="Strong_20_Emphasis">WIPEFS overwrites free space</text:span> within a directory to eliminate recoverable remnants </text:p>
        </text:list-item>
        <text:list-item>
          <text:p text:style-name="P311"><text:span text:style-name="Strong_20_Emphasis">READ displays raw file content</text:span> in hex and ASCII for low‑level inspection </text:p>
        </text:list-item>
        <text:list-item>
          <text:p text:style-name="P310"><text:span text:style-name="Strong_20_Emphasis">EXTRACT recursively unpacks archives</text:span> and embedded structures into safe output paths </text:p>
        </text:list-item>
      </text:list>
      <text:p text:style-name="Text_20_body">These commands form the foundation of Opus’s forensic workflow, ensuring that analysts can manipulate files safely, reproducibly, and with full awareness of the underlying operations.</text:p>
      <text:h text:style-name="Heading_20_1" text:outline-level="1">====================================</text:h>
      <text:h text:style-name="Heading_20_1" text:outline-level="1"><text:span text:style-name="Strong_20_Emphasis">6.2 FORENSIC ANALYSIS COMMANDS</text:span></text:h>
      <text:h text:style-name="Heading_20_1" text:outline-level="1">====================================</text:h>
      <text:p text:style-name="Text_20_body">The Forensic Analysis subsystem provides tools for examining file content, extracting meaningful data, measuring randomness, and locating specific byte patterns. These commands operate on the currently open file and are designed for precision, transparency, and repeatability in forensic and CTF workflows.</text:p>
      <text:p text:style-name="Text_20_body"><text:span text:style-name="Strong_20_Emphasis">Capabilities</text:span></text:p>
      <text:list xml:id="list1812353364" text:style-name="L374">
        <text:list-item>
          <text:p text:style-name="P313"><text:span text:style-name="Strong_20_Emphasis">STRING extracts printable text</text:span> from binary data for quick triage </text:p>
        </text:list-item>
        <text:list-item>
          <text:p text:style-name="P313"><text:span text:style-name="Strong_20_Emphasis">ENTROPY measures randomness</text:span> to identify compressed or encrypted regions </text:p>
        </text:list-item>
        <text:list-item>
          <text:p text:style-name="P313"><text:span text:style-name="Strong_20_Emphasis">SEARCH locates byte patterns</text:span> using ASCII, hex, or wildcard queries </text:p>
        </text:list-item>
        <text:list-item>
          <text:p text:style-name="P313"><text:span text:style-name="Strong_20_Emphasis">READ displays raw bytes</text:span> in hex and ASCII for low‑level inspection </text:p>
        </text:list-item>
        <text:list-item>
          <text:p text:style-name="P312"><text:span text:style-name="Strong_20_Emphasis">EXTRACT unpacks embedded archives</text:span> for deeper structural analysis </text:p>
        </text:list-item>
      </text:list>
      <text:p text:style-name="Text_20_body"><text:soft-page-break/>These commands form the analytical core of Opus, enabling investigators to move from raw data to actionable insight.</text:p>
      <text:p text:style-name="Text_20_body"/>
      <text:p text:style-name="Horizontal_20_Line"/>
      <text:h text:style-name="Heading_20_1" text:outline-level="1"><text:span text:style-name="Strong_20_Emphasis">6.2.1 STRING — Extract Printable Text</text:span></text:h>
      <text:p text:style-name="Text_20_body"><text:span text:style-name="Strong_20_Emphasis">Syntax</text:span></text:p>
      <text:p text:style-name="P1"><text:span text:style-name="Source_20_Text">STRING</text:span></text:p>
      <text:p text:style-name="Text_20_body"><text:span text:style-name="Strong_20_Emphasis">Description</text:span> <text:line-break/>Extracts printable ASCII sequences from the currently open file using Opus’s structured string‑intelligence engine. STRING is designed for forensic triage, binary inspection, and intelligence gathering. It identifies human‑readable fragments, filters noise, tracks offsets, and reports multiple string classes including ASCII, UTF‑8‑like sequences, base64‑like tokens, URL‑like patterns, and email‑like substrings.</text:p>
      <text:p text:style-name="Text_20_body">STRING preserves byte order, never modifies the file, and is hardened against malformed or adversarial input.</text:p>
      <text:h text:style-name="Heading_20_2" text:outline-level="2"><text:span text:style-name="Strong_20_Emphasis"><text:span text:style-name="T11">Detection Model</text:span></text:span></text:h>
      <text:p text:style-name="Text_20_body">STRING uses a multi‑stage detection pipeline to classify and extract meaningful text:</text:p>
      <text:list xml:id="list1253889244" text:style-name="L377">
        <text:list-item>
          <text:p text:style-name="P315"><text:span text:style-name="Strong_20_Emphasis">ASCII printable detection</text:span> — identifies contiguous ranges of bytes in the <text:span text:style-name="Source_20_Text">0x20–0x7E</text:span> set </text:p>
        </text:list-item>
        <text:list-item>
          <text:p text:style-name="P315"><text:span text:style-name="Strong_20_Emphasis">UTF‑8‑like sequence recognition</text:span> — detects valid leading/trailing byte patterns </text:p>
        </text:list-item>
        <text:list-item>
          <text:p text:style-name="P315"><text:span text:style-name="Strong_20_Emphasis">base64‑like token detection</text:span> — matches <text:span text:style-name="Source_20_Text">A–Z</text:span>, <text:span text:style-name="Source_20_Text">a–z</text:span>, <text:span text:style-name="Source_20_Text">0–9</text:span>, <text:span text:style-name="Source_20_Text">+</text:span>, <text:span text:style-name="Source_20_Text">/</text:span>, <text:span text:style-name="Source_20_Text">=</text:span> patterns </text:p>
        </text:list-item>
        <text:list-item>
          <text:p text:style-name="P315"><text:span text:style-name="Strong_20_Emphasis">URL‑like substring detection</text:span> — identifies <text:span text:style-name="Source_20_Text">http://</text:span>, <text:span text:style-name="Source_20_Text">https://</text:span>, <text:span text:style-name="Source_20_Text">ftp://</text:span>, and domain patterns </text:p>
        </text:list-item>
        <text:list-item>
          <text:p text:style-name="P315"><text:span text:style-name="Strong_20_Emphasis">email‑like substring detection</text:span> — matches <text:span text:style-name="Source_20_Text">local@domain</text:span> structures </text:p>
        </text:list-item>
        <text:list-item>
          <text:p text:style-name="P315"><text:span text:style-name="Strong_20_Emphasis">minimum‑length filtering</text:span> — discards noise below the configured threshold </text:p>
        </text:list-item>
        <text:list-item>
          <text:p text:style-name="P314"><text:span text:style-name="Strong_20_Emphasis">offset tracking</text:span> — records the exact byte offset of each discovered string </text:p>
        </text:list-item>
      </text:list>
      <text:p text:style-name="Text_20_body">These detections feed into a unified reporting engine.</text:p>
      <text:h text:style-name="Heading_20_2" text:outline-level="2"><text:span text:style-name="Strong_20_Emphasis"><text:span text:style-name="T11">Output Format</text:span></text:span></text:h>
      <text:p text:style-name="Text_20_body">Each discovered string is printed with contextual metadata:</text:p>
      <text:list xml:id="list1258692648" text:style-name="L378">
        <text:list-item>
          <text:p text:style-name="P317"><text:span text:style-name="Strong_20_Emphasis">byte offset</text:span> — starting position in the file </text:p>
        </text:list-item>
        <text:list-item>
          <text:p text:style-name="P317"><text:span text:style-name="Strong_20_Emphasis">string class</text:span> — ASCII, UTF‑8, base64‑like, URL‑like, email‑like </text:p>
        </text:list-item>
        <text:list-item>
          <text:p text:style-name="P317"><text:span text:style-name="Strong_20_Emphasis">string content</text:span> — raw printable text </text:p>
        </text:list-item>
        <text:list-item>
          <text:p text:style-name="P316"><text:span text:style-name="Strong_20_Emphasis">length field</text:span> — number of bytes in the string </text:p>
        </text:list-item>
      </text:list>
      <text:p text:style-name="Text_20_body">Example:</text:p>
      <text:p text:style-name="Preformatted_20_Text"><text:soft-page-break/><text:span text:style-name="Source_20_Text"><text:tab/>[STRING] 0x0012A0 ASCII (len=18): "User-Agent: curl/8.0"</text:span></text:p>
      <text:p text:style-name="Preformatted_20_Text"><text:span text:style-name="Source_20_Text"><text:tab/>[STRING] 0x0041F2 URL <text:s text:c="2"/>(len=27): "https://updates.example.net"</text:span></text:p>
      <text:p text:style-name="P1"><text:span text:style-name="Source_20_Text"><text:tab/>[STRING] 0x005C10 B64 <text:s text:c="2"/>(len=44): "QWxhZGRpbjpvcGVuIHNlc2FtZQ=="</text:span></text:p>
      <text:h text:style-name="Heading_20_2" text:outline-level="2"><text:span text:style-name="Strong_20_Emphasis"><text:span text:style-name="T11">Behavior</text:span></text:span></text:h>
      <text:list xml:id="list811638194" text:style-name="L379">
        <text:list-item>
          <text:p text:style-name="P319"><text:span text:style-name="Strong_20_Emphasis">scans the file sequentially</text:span> using a deterministic state machine </text:p>
        </text:list-item>
        <text:list-item>
          <text:p text:style-name="P319"><text:span text:style-name="Strong_20_Emphasis">collects contiguous printable bytes</text:span> into candidate strings </text:p>
        </text:list-item>
        <text:list-item>
          <text:p text:style-name="P319"><text:span text:style-name="Strong_20_Emphasis">classifies each string</text:span> using pattern‑based heuristics </text:p>
        </text:list-item>
        <text:list-item>
          <text:p text:style-name="P319"><text:span text:style-name="Strong_20_Emphasis">prints structured output</text:span> with offsets and metadata </text:p>
        </text:list-item>
        <text:list-item>
          <text:p text:style-name="P319"><text:span text:style-name="Strong_20_Emphasis">updates internal counters</text:span> for summary reporting </text:p>
        </text:list-item>
        <text:list-item>
          <text:p text:style-name="P318"><text:span text:style-name="Strong_20_Emphasis">ignores non‑printable regions</text:span> without altering the file </text:p>
        </text:list-item>
      </text:list>
      <text:h text:style-name="Heading_20_2" text:outline-level="2"><text:span text:style-name="Strong_20_Emphasis"><text:span text:style-name="T11">Summary Statistics</text:span></text:span></text:h>
      <text:p text:style-name="Text_20_body">At the end of execution, STRING prints a summary derived from <text:span text:style-name="Source_20_Text">opus_string_report_t</text:span>:</text:p>
      <text:list xml:id="list1870399471" text:style-name="L380">
        <text:list-item>
          <text:p text:style-name="P321"><text:span text:style-name="Strong_20_Emphasis">ASCII count</text:span> </text:p>
        </text:list-item>
        <text:list-item>
          <text:p text:style-name="P321"><text:span text:style-name="Strong_20_Emphasis">UTF‑8‑like count</text:span> </text:p>
        </text:list-item>
        <text:list-item>
          <text:p text:style-name="P321"><text:span text:style-name="Strong_20_Emphasis">base64‑like count</text:span> </text:p>
        </text:list-item>
        <text:list-item>
          <text:p text:style-name="P321"><text:span text:style-name="Strong_20_Emphasis">URL‑like count</text:span> </text:p>
        </text:list-item>
        <text:list-item>
          <text:p text:style-name="P320"><text:span text:style-name="Strong_20_Emphasis">email‑like count</text:span> </text:p>
        </text:list-item>
      </text:list>
      <text:p text:style-name="Text_20_body">Example:</text:p>
      <text:p text:style-name="P1"><text:span text:style-name="Source_20_Text"><text:tab/>[STRING] Summary: ASCII=42 UTF8=3 B64=5 URL=2 EMAIL=1</text:span></text:p>
      <text:h text:style-name="Heading_20_2" text:outline-level="2"><text:span text:style-name="Strong_20_Emphasis"><text:span text:style-name="T11">Notes</text:span></text:span></text:h>
      <text:list xml:id="list467322986" text:style-name="L381">
        <text:list-item>
          <text:p text:style-name="P323">STRING does not decode UTF‑8; it only detects valid patterns </text:p>
        </text:list-item>
        <text:list-item>
          <text:p text:style-name="P323">STRING does not follow symbolic links unless OPEN permitted it </text:p>
        </text:list-item>
        <text:list-item>
          <text:p text:style-name="P323">STRING is safe for malformed, truncated, or adversarial input </text:p>
        </text:list-item>
        <text:list-item>
          <text:p text:style-name="P322">STRING output is deterministic and stable across runs </text:p>
        </text:list-item>
      </text:list>
      <text:p text:style-name="Text_20_body"><text:span text:style-name="Strong_20_Emphasis"/></text:p>
      <text:p text:style-name="Horizontal_20_Line"/>
      <text:h text:style-name="Heading_20_1" text:outline-level="1"><text:span text:style-name="Strong_20_Emphasis">6.2.2 ENTROPY — Measure Randomness and Structural Complexity</text:span></text:h>
      <text:p text:style-name="Text_20_body"><text:span text:style-name="Strong_20_Emphasis">Syntax</text:span></text:p>
      <text:p text:style-name="P1"><text:span text:style-name="Source_20_Text">ENTROPY</text:span></text:p>
      <text:p text:style-name="Text_20_body"><text:span text:style-name="Strong_20_Emphasis">Description</text:span> <text:line-break/>Computes Shannon entropy across the currently open file using Opus’s multi‑mode entropy engine. <text:soft-page-break/>ENTROPY supports global entropy measurement, sliding‑window entropy analysis, and heatmap generation. These modes reveal compressed regions, encrypted payloads, padding blocks, structured headers, and anomalous transitions that may indicate embedded data or steganographic content.</text:p>
      <text:p text:style-name="Text_20_body">ENTROPY is deterministic, safe for malformed input, and optimized for large files.</text:p>
      <text:h text:style-name="Heading_20_1" text:outline-level="1"><text:span text:style-name="Strong_20_Emphasis"><text:span text:style-name="T11">Entropy Modes</text:span></text:span></text:h>
      <text:p text:style-name="Text_20_body">Opus automatically performs three complementary analyses:</text:p>
      <text:list xml:id="list1356380544" text:style-name="L382">
        <text:list-item>
          <text:p text:style-name="P325"><text:span text:style-name="Strong_20_Emphasis">global entropy</text:span> — computes a single Shannon entropy value for the entire file </text:p>
        </text:list-item>
        <text:list-item>
          <text:p text:style-name="P325"><text:span text:style-name="Strong_20_Emphasis">sliding‑window entropy</text:span> — measures entropy across fixed‑size windows to reveal structural variation </text:p>
        </text:list-item>
        <text:list-item>
          <text:p text:style-name="P324"><text:span text:style-name="Strong_20_Emphasis">entropy heatmap</text:span> — produces a visual banded representation of entropy gradients </text:p>
        </text:list-item>
      </text:list>
      <text:p text:style-name="Text_20_body">These modes combine to give a complete picture of randomness distribution.</text:p>
      <text:h text:style-name="Heading_20_1" text:outline-level="1"><text:span text:style-name="Strong_20_Emphasis"><text:span text:style-name="T11">Detection Model</text:span></text:span></text:h>
      <text:p text:style-name="Text_20_body">The ENTROPY engine uses a multi‑stage pipeline:</text:p>
      <text:list xml:id="list3270769889" text:style-name="L383">
        <text:list-item>
          <text:p text:style-name="P327"><text:span text:style-name="Strong_20_Emphasis">byte histogram generation</text:span> — tallies all 256 byte values </text:p>
        </text:list-item>
        <text:list-item>
          <text:p text:style-name="P327"><text:span text:style-name="Strong_20_Emphasis">Shannon entropy computation</text:span> — applies the formula (H = -\sum p_i \log_2 p_i) </text:p>
        </text:list-item>
        <text:list-item>
          <text:p text:style-name="P327"><text:span text:style-name="Strong_20_Emphasis">windowed analysis</text:span> — computes entropy for each window (e.g., 512 or 1024 bytes) </text:p>
        </text:list-item>
        <text:list-item>
          <text:p text:style-name="P327"><text:span text:style-name="Strong_20_Emphasis">gradient detection</text:span> — identifies sharp transitions between low‑ and high‑entropy regions </text:p>
        </text:list-item>
        <text:list-item>
          <text:p text:style-name="P326"><text:span text:style-name="Strong_20_Emphasis">anomaly flagging</text:span> — highlights windows that deviate from statistical norms </text:p>
        </text:list-item>
      </text:list>
      <text:p text:style-name="Text_20_body">This pipeline is hardened against malformed or adversarial data.</text:p>
      <text:h text:style-name="Heading_20_1" text:outline-level="1"><text:span text:style-name="Strong_20_Emphasis"><text:span text:style-name="T11">Output Format</text:span></text:span></text:h>
      <text:p text:style-name="Text_20_body">ENTROPY prints structured results:</text:p>
      <text:h text:style-name="Heading_20_3" text:outline-level="3"><text:span text:style-name="Strong_20_Emphasis"><text:span text:style-name="T11">Global Entropy</text:span></text:span></text:h>
      <text:p text:style-name="Text_20_body">A single value representing the entire file:</text:p>
      <text:p text:style-name="P1"><text:span text:style-name="Source_20_Text">[ENTROPY] Global entropy: 7.92 bits/byte</text:span></text:p>
      <text:h text:style-name="Heading_20_3" text:outline-level="3"><text:span text:style-name="Strong_20_Emphasis"><text:span text:style-name="T11">Sliding‑Window Entropy</text:span></text:span></text:h>
      <text:p text:style-name="Text_20_body">Each window is reported with offset and entropy:</text:p>
      <text:p text:style-name="Preformatted_20_Text"><text:span text:style-name="Source_20_Text">[ENTROPY] 0x00000000–0x000001FF: 2.11</text:span></text:p>
      <text:p text:style-name="P1"><text:span text:style-name="Source_20_Text">[ENTROPY] 0x00000200–0x000003FF: 7.98</text:span></text:p>
      <text:h text:style-name="Heading_20_3" text:outline-level="3"><text:span text:style-name="Strong_20_Emphasis"><text:span text:style-name="T11">Heatmap</text:span></text:span></text:h>
      <text:p text:style-name="Text_20_body">A compact visual representation:</text:p>
      <text:p text:style-name="Preformatted_20_Text"><text:span text:style-name="Source_20_Text">[ENTROPY] Heatmap:</text:span></text:p>
      <text:p text:style-name="P1"><text:span text:style-name="Source_20_Text">░░▒▒██████████▒▒░░</text:span></text:p>
      <text:p text:style-name="Text_20_body"><text:soft-page-break/>(Low entropy = light; high entropy = dark.)</text:p>
      <text:h text:style-name="Heading_20_1" text:outline-level="1"><text:span text:style-name="Strong_20_Emphasis"><text:span text:style-name="T11">Behavior</text:span></text:span></text:h>
      <text:list xml:id="list2522603425" text:style-name="L384">
        <text:list-item>
          <text:p text:style-name="P329"><text:span text:style-name="Strong_20_Emphasis">reads the entire file</text:span> and builds a byte histogram </text:p>
        </text:list-item>
        <text:list-item>
          <text:p text:style-name="P329"><text:span text:style-name="Strong_20_Emphasis">computes global entropy</text:span> using Shannon’s formula </text:p>
        </text:list-item>
        <text:list-item>
          <text:p text:style-name="P329"><text:span text:style-name="Strong_20_Emphasis">performs sliding‑window analysis</text:span> with fixed‑size blocks </text:p>
        </text:list-item>
        <text:list-item>
          <text:p text:style-name="P329"><text:span text:style-name="Strong_20_Emphasis">generates a heatmap</text:span> for visual inspection </text:p>
        </text:list-item>
        <text:list-item>
          <text:p text:style-name="P329"><text:span text:style-name="Strong_20_Emphasis">flags anomalous windows</text:span> based on entropy thresholds </text:p>
        </text:list-item>
        <text:list-item>
          <text:p text:style-name="P328"><text:span text:style-name="Strong_20_Emphasis">prints structured results</text:span> in deterministic order </text:p>
        </text:list-item>
      </text:list>
      <text:h text:style-name="Heading_20_1" text:outline-level="1"><text:span text:style-name="Strong_20_Emphasis"><text:span text:style-name="T11">Interpretation Guide</text:span></text:span></text:h>
      <text:p text:style-name="Text_20_body">Opus includes built‑in heuristics for interpreting entropy patterns:</text:p>
      <text:list xml:id="list175545458" text:style-name="L385">
        <text:list-item>
          <text:p text:style-name="P331"><text:span text:style-name="Strong_20_Emphasis">low entropy (0–3 bits/byte)</text:span> → padding, ASCII text, structured headers </text:p>
        </text:list-item>
        <text:list-item>
          <text:p text:style-name="P331"><text:span text:style-name="Strong_20_Emphasis">medium entropy (3–6 bits/byte)</text:span> → lightly encoded or formatted data </text:p>
        </text:list-item>
        <text:list-item>
          <text:p text:style-name="P331"><text:span text:style-name="Strong_20_Emphasis">high entropy (6–8 bits/byte)</text:span> → encryption, compression, or random blobs </text:p>
        </text:list-item>
        <text:list-item>
          <text:p text:style-name="P331"><text:span text:style-name="Strong_20_Emphasis">entropy cliffs</text:span> → boundaries between embedded structures </text:p>
        </text:list-item>
        <text:list-item>
          <text:p text:style-name="P330"><text:span text:style-name="Strong_20_Emphasis">flat high‑entropy plateaus</text:span> → encrypted payloads or compressed archives </text:p>
        </text:list-item>
      </text:list>
      <text:p text:style-name="Text_20_body">These heuristics help analysts quickly identify suspicious regions.</text:p>
      <text:h text:style-name="Heading_20_1" text:outline-level="1"><text:span text:style-name="Strong_20_Emphasis"><text:span text:style-name="T11">Example Output</text:span></text:span></text:h>
      <text:p text:style-name="Preformatted_20_Text"><text:span text:style-name="Source_20_Text">[ENTROPY] Global entropy: 7.91 bits/byte</text:span></text:p>
      <text:p text:style-name="Preformatted_20_Text"><text:span text:style-name="Source_20_Text">[ENTROPY] Window 0x0000–0x01FF: 2.14</text:span></text:p>
      <text:p text:style-name="Preformatted_20_Text"><text:span text:style-name="Source_20_Text">[ENTROPY] Window 0x0200–0x03FF: 7.98</text:span></text:p>
      <text:p text:style-name="Preformatted_20_Text"><text:span text:style-name="Source_20_Text">[ENTROPY] Heatmap:</text:span></text:p>
      <text:p text:style-name="Preformatted_20_Text"><text:span text:style-name="Source_20_Text">░░▒▒██████████▒▒░░</text:span></text:p>
      <text:p text:style-name="P1"><text:span text:style-name="Source_20_Text">[ENTROPY] High‑entropy region detected at offset 0x0200</text:span></text:p>
      <text:h text:style-name="Heading_20_1" text:outline-level="1"><text:span text:style-name="Strong_20_Emphasis"><text:span text:style-name="T11">Notes</text:span></text:span></text:h>
      <text:list xml:id="list485534634" text:style-name="L386">
        <text:list-item>
          <text:p text:style-name="P333">ENTROPY never modifies the file </text:p>
        </text:list-item>
        <text:list-item>
          <text:p text:style-name="P333">ENTROPY is safe for hostile or malformed input </text:p>
        </text:list-item>
        <text:list-item>
          <text:p text:style-name="P333">ENTROPY output is deterministic and stable across runs </text:p>
        </text:list-item>
        <text:list-item>
          <text:p text:style-name="P332">ENTROPY heatmaps are ASCII‑only for terminal compatibility </text:p>
        </text:list-item>
      </text:list>
      <text:p text:style-name="Horizontal_20_Line"/>
      <text:h text:style-name="Heading_20_1" text:outline-level="1"><text:span text:style-name="Strong_20_Emphasis">6.2.3 SEARCH — Locate Byte Patterns</text:span></text:h>
      <text:p text:style-name="Text_20_body"><text:span text:style-name="Strong_20_Emphasis"/></text:p>
      <text:p text:style-name="Text_20_body"><text:span text:style-name="Strong_20_Emphasis"><text:span text:style-name="T11">Syntax</text:span></text:span></text:p>
      <text:p text:style-name="P1"><text:span text:style-name="Source_20_Text">SEARCH &lt;pattern&gt;</text:span></text:p>
      <text:p text:style-name="P348"><text:soft-page-break/><text:span text:style-name="Strong_20_Emphasis"><text:span text:style-name="T11">Description</text:span></text:span><text:span text:style-name="T11"> </text:span></text:p>
      <text:p text:style-name="P348">SEARCH locates byte patterns within the currently open file using Opus’s multi‑mode pattern‑matching engine. It supports ASCII queries, hex‑encoded queries, wildcard matching, and mixed‑mode patterns. SEARCH reports all matching offsets, prints structured match metadata, and is hardened against malformed or adversarial input.</text:p>
      <text:p text:style-name="Text_20_body">SEARCH is one of the most powerful forensic tools in Opus, used for locating signatures, magic numbers, protocol markers, embedded keys, URLs, and arbitrary byte sequences.</text:p>
      <text:h text:style-name="Heading_20_1" text:outline-level="1"><text:span text:style-name="Strong_20_Emphasis"><text:span text:style-name="T13">Pattern Types</text:span></text:span></text:h>
      <text:p text:style-name="Text_20_body">SEARCH automatically determines the pattern type based on syntax:</text:p>
      <text:list xml:id="list1286959493" text:style-name="L387">
        <text:list-item>
          <text:p text:style-name="P335"><text:span text:style-name="Strong_20_Emphasis">ASCII patterns</text:span> — literal text (e.g., <text:span text:style-name="Source_20_Text">SEARCH "PNG"</text:span>) </text:p>
        </text:list-item>
        <text:list-item>
          <text:p text:style-name="P335"><text:span text:style-name="Strong_20_Emphasis">hex patterns</text:span> — byte sequences in hex (e.g., <text:span text:style-name="Source_20_Text">SEARCH 50 4B 03 04</text:span>) </text:p>
        </text:list-item>
        <text:list-item>
          <text:p text:style-name="P335"><text:span text:style-name="Strong_20_Emphasis">wildcard patterns</text:span> — hex with <text:span text:style-name="Source_20_Text">??</text:span> placeholders (e.g., <text:span text:style-name="Source_20_Text">SEARCH 89 50 ?? 0D 0A</text:span>) </text:p>
        </text:list-item>
        <text:list-item>
          <text:p text:style-name="P334"><text:span text:style-name="Strong_20_Emphasis">mixed‑mode patterns</text:span> — ASCII + hex combined (e.g., <text:span text:style-name="Source_20_Text">SEARCH "PK" 03 04</text:span>) </text:p>
        </text:list-item>
      </text:list>
      <text:p text:style-name="Text_20_body">All patterns are normalized into a unified internal representation before scanning.</text:p>
      <text:h text:style-name="Heading_20_1" text:outline-level="1"><text:span text:style-name="Strong_20_Emphasis"><text:span text:style-name="T13">Detection Model</text:span></text:span></text:h>
      <text:p text:style-name="Text_20_body">SEARCH uses a deterministic, multi‑stage pipeline:</text:p>
      <text:list xml:id="list1540092233" text:style-name="L388">
        <text:list-item>
          <text:p text:style-name="P337"><text:span text:style-name="Strong_20_Emphasis">pattern normalization</text:span> — converts ASCII/hex/wildcards into a byte‑pattern structure </text:p>
        </text:list-item>
        <text:list-item>
          <text:p text:style-name="P337"><text:span text:style-name="Strong_20_Emphasis">sliding‑window matching</text:span> — scans the file byte‑by‑byte </text:p>
        </text:list-item>
        <text:list-item>
          <text:p text:style-name="P337"><text:span text:style-name="Strong_20_Emphasis">wildcard resolution</text:span> — treats <text:span text:style-name="Source_20_Text">??</text:span> as “match any byte” </text:p>
        </text:list-item>
        <text:list-item>
          <text:p text:style-name="P337"><text:span text:style-name="Strong_20_Emphasis">multi‑match detection</text:span> — finds all occurrences, not just the first </text:p>
        </text:list-item>
        <text:list-item>
          <text:p text:style-name="P337"><text:span text:style-name="Strong_20_Emphasis">offset tracking</text:span> — records exact byte offsets for each match </text:p>
        </text:list-item>
        <text:list-item>
          <text:p text:style-name="P336"><text:span text:style-name="Strong_20_Emphasis">structured reporting</text:span> — prints deterministic, ordered results </text:p>
        </text:list-item>
      </text:list>
      <text:p text:style-name="Text_20_body">The engine is optimized for large files and adversarial patterns.</text:p>
      <text:h text:style-name="Heading_20_1" text:outline-level="1"><text:span text:style-name="Strong_20_Emphasis"><text:span text:style-name="T13">Output Format</text:span></text:span></text:h>
      <text:p text:style-name="Text_20_body">Each match is printed with:</text:p>
      <text:list xml:id="list3299258456" text:style-name="L389">
        <text:list-item>
          <text:p text:style-name="P339"><text:span text:style-name="Strong_20_Emphasis">offset</text:span> — byte position in the file </text:p>
        </text:list-item>
        <text:list-item>
          <text:p text:style-name="P339"><text:span text:style-name="Strong_20_Emphasis">matched bytes</text:span> — the exact bytes found </text:p>
        </text:list-item>
        <text:list-item>
          <text:p text:style-name="P338"><text:span text:style-name="Strong_20_Emphasis">pattern class</text:span> — ASCII, HEX, or MIXED </text:p>
        </text:list-item>
      </text:list>
      <text:p text:style-name="Text_20_body">Example:</text:p>
      <text:p text:style-name="Preformatted_20_Text"><text:span text:style-name="Source_20_Text">[SEARCH] Match @ 0x00000120: 50 4B 03 04 <text:s/>(HEX)</text:span></text:p>
      <text:p text:style-name="P1"><text:span text:style-name="Source_20_Text">[SEARCH] Match @ 0x0000A2F0: "config=" <text:s text:c="3"/>(ASCII)</text:span></text:p>
      <text:h text:style-name="Heading_20_1" text:outline-level="1"><text:soft-page-break/><text:span text:style-name="Strong_20_Emphasis"><text:span text:style-name="T13">Behavior</text:span></text:span></text:h>
      <text:list xml:id="list554567680" text:style-name="L390">
        <text:list-item>
          <text:p text:style-name="P341"><text:span text:style-name="Strong_20_Emphasis">parses the pattern</text:span> and determines its type </text:p>
        </text:list-item>
        <text:list-item>
          <text:p text:style-name="P341"><text:span text:style-name="Strong_20_Emphasis">scans the entire file</text:span> using a byte‑accurate matcher </text:p>
        </text:list-item>
        <text:list-item>
          <text:p text:style-name="P341"><text:span text:style-name="Strong_20_Emphasis">reports all matches</text:span> in ascending offset order </text:p>
        </text:list-item>
        <text:list-item>
          <text:p text:style-name="P341"><text:span text:style-name="Strong_20_Emphasis">prints structured metadata</text:span> for each match </text:p>
        </text:list-item>
        <text:list-item>
          <text:p text:style-name="P341"><text:span text:style-name="Strong_20_Emphasis">updates internal counters</text:span> for summary reporting </text:p>
        </text:list-item>
        <text:list-item>
          <text:p text:style-name="P340"><text:span text:style-name="Strong_20_Emphasis">never modifies the file</text:span> under any circumstances </text:p>
        </text:list-item>
      </text:list>
      <text:h text:style-name="Heading_20_1" text:outline-level="1"><text:span text:style-name="Strong_20_Emphasis"><text:span text:style-name="T13">Wildcard Matching</text:span></text:span></text:h>
      <text:p text:style-name="Text_20_body">SEARCH supports <text:span text:style-name="Source_20_Text">??</text:span> as a single‑byte wildcard:</text:p>
      <text:list xml:id="list3520977011" text:style-name="L391">
        <text:list-item>
          <text:p text:style-name="P343"><text:span text:style-name="Strong_20_Emphasis">matches any byte</text:span> at that position </text:p>
        </text:list-item>
        <text:list-item>
          <text:p text:style-name="P343"><text:span text:style-name="Strong_20_Emphasis">preserves surrounding bytes</text:span> for context </text:p>
        </text:list-item>
        <text:list-item>
          <text:p text:style-name="P342"><text:span text:style-name="Strong_20_Emphasis">enables signature fuzzing</text:span> for partially known patterns </text:p>
        </text:list-item>
      </text:list>
      <text:p text:style-name="Text_20_body">Example:</text:p>
      <text:p text:style-name="P1"><text:span text:style-name="Source_20_Text"><text:tab/>SEARCH 89 50 ?? 0D 0A 1A 0A</text:span></text:p>
      <text:p text:style-name="Text_20_body">Matches PNG signatures even when the third byte is corrupted or obfuscated.</text:p>
      <text:h text:style-name="Heading_20_1" text:outline-level="1"><text:span text:style-name="Strong_20_Emphasis"><text:span text:style-name="T13">Summary Statistics</text:span></text:span></text:h>
      <text:p text:style-name="Text_20_body">At the end of execution, SEARCH prints:</text:p>
      <text:list xml:id="list1996150259" text:style-name="L392">
        <text:list-item>
          <text:p text:style-name="P345"><text:span text:style-name="Strong_20_Emphasis">total matches found</text:span> </text:p>
        </text:list-item>
        <text:list-item>
          <text:p text:style-name="P345"><text:span text:style-name="Strong_20_Emphasis">pattern type</text:span> </text:p>
        </text:list-item>
        <text:list-item>
          <text:p text:style-name="P344"><text:span text:style-name="Strong_20_Emphasis">pattern length</text:span> </text:p>
        </text:list-item>
      </text:list>
      <text:p text:style-name="Text_20_body">Example:</text:p>
      <text:p text:style-name="P1"><text:span text:style-name="Source_20_Text"><text:tab/>[SEARCH] Summary: 14 matches (HEX, len=4)</text:span></text:p>
      <text:h text:style-name="Heading_20_1" text:outline-level="1"><text:span text:style-name="Strong_20_Emphasis"><text:span text:style-name="T13">Example Output</text:span></text:span></text:h>
      <text:p text:style-name="Preformatted_20_Text"><text:span text:style-name="Source_20_Text"><text:tab/>[SEARCH] Pattern: 50 4B 03 04 (HEX)</text:span></text:p>
      <text:p text:style-name="Preformatted_20_Text"><text:span text:style-name="Source_20_Text"><text:tab/>[SEARCH] Match @ 0x00000120</text:span></text:p>
      <text:p text:style-name="Preformatted_20_Text"><text:span text:style-name="Source_20_Text"><text:tab/>[SEARCH] Match @ 0x0000A2F0</text:span></text:p>
      <text:p text:style-name="Preformatted_20_Text"><text:span text:style-name="Source_20_Text"><text:tab/>[SEARCH] Match @ 0x0001F880</text:span></text:p>
      <text:p text:style-name="P1"><text:span text:style-name="Source_20_Text"><text:tab/>[SEARCH] Summary: 3 matches (HEX, len=4)</text:span></text:p>
      <text:h text:style-name="Heading_20_1" text:outline-level="1"><text:span text:style-name="Strong_20_Emphasis"><text:span text:style-name="T13">Notes</text:span></text:span></text:h>
      <text:list xml:id="list3099969444" text:style-name="L393">
        <text:list-item>
          <text:p text:style-name="P347">SEARCH does not support regex; patterns are literal </text:p>
        </text:list-item>
        <text:list-item>
          <text:p text:style-name="P347">SEARCH is safe for hostile or malformed input </text:p>
        </text:list-item>
        <text:list-item>
          <text:p text:style-name="P347">SEARCH output is deterministic and stable across runs </text:p>
        </text:list-item>
        <text:list-item>
          <text:p text:style-name="P346">SEARCH always scans the entire file unless aborted by the user </text:p>
        </text:list-item>
      </text:list>
      <text:p text:style-name="Text_20_body"><text:soft-page-break/></text:p>
      <text:p text:style-name="Horizontal_20_Line"/>
      <text:h text:style-name="Heading_20_1" text:outline-level="1"><text:span text:style-name="Strong_20_Emphasis">6.2.4 READ — Raw Byte Inspection</text:span></text:h>
      <text:p text:style-name="Text_20_body"><text:span text:style-name="Strong_20_Emphasis">Syntax</text:span></text:p>
      <text:p text:style-name="P1"><text:span text:style-name="Source_20_Text">READ</text:span></text:p>
      <text:p text:style-name="Text_20_body"><text:span text:style-name="Strong_20_Emphasis">Description</text:span> <text:line-break/>READ displays the raw contents of the currently open file in a deterministic hex‑and‑ASCII layout. It is designed for forensic triage, binary inspection, structural validation, and byte‑accurate referencing. READ never interprets, decodes, or transforms data — it presents the file exactly as stored on disk, making it ideal for low‑level analysis and chain‑of‑custody‑safe reporting.</text:p>
      <text:h text:style-name="Heading_20_2" text:outline-level="2"><text:span text:style-name="Strong_20_Emphasis">Output Model</text:span></text:h>
      <text:p text:style-name="Text_20_body">Each line contains:</text:p>
      <text:p text:style-name="P1"><text:span text:style-name="Source_20_Text">&lt;offset&gt; <text:s/>&lt;16 bytes hex&gt; <text:s text:c="2"/>&lt;ASCII representation&gt;</text:span></text:p>
      <text:list xml:id="list3804228734" text:style-name="L394">
        <text:list-item>
          <text:p text:style-name="P350">Offsets are always 8‑digit hex values </text:p>
        </text:list-item>
        <text:list-item>
          <text:p text:style-name="P350">Non‑printable bytes appear as <text:span text:style-name="Source_20_Text">.</text:span> in the ASCII column </text:p>
        </text:list-item>
        <text:list-item>
          <text:p text:style-name="P349">Hex and ASCII columns are aligned for diff‑friendly comparison </text:p>
        </text:list-item>
      </text:list>
      <text:p text:style-name="Text_20_body">Example:</text:p>
      <text:p text:style-name="P1"><text:span text:style-name="Source_20_Text"><text:tab/>00000000 <text:s/>50 4B 03 04 14 00 06 00 <text:s/>08 00 00 00 21 00 5A 3C <text:s text:c="2"/>PK........!.Z&lt;</text:span></text:p>
      <text:h text:style-name="Heading_20_2" text:outline-level="2"><text:span text:style-name="Strong_20_Emphasis">Behavior</text:span></text:h>
      <text:list xml:id="list2824721805" text:style-name="L395">
        <text:list-item>
          <text:p text:style-name="P352"><text:span text:style-name="Strong_20_Emphasis">validates the open file</text:span> before reading </text:p>
        </text:list-item>
        <text:list-item>
          <text:p text:style-name="P352"><text:span text:style-name="Strong_20_Emphasis">opens the file in read‑only mode</text:span> to ensure safety </text:p>
        </text:list-item>
        <text:list-item>
          <text:p text:style-name="P352"><text:span text:style-name="Strong_20_Emphasis">reads data in fixed‑size blocks</text:span> (typically 16 bytes) </text:p>
        </text:list-item>
        <text:list-item>
          <text:p text:style-name="P352"><text:span text:style-name="Strong_20_Emphasis">prints hex and ASCII columns</text:span> side‑by‑side </text:p>
        </text:list-item>
        <text:list-item>
          <text:p text:style-name="P352"><text:span text:style-name="Strong_20_Emphasis">highlights non‑printable characters</text:span> using <text:span text:style-name="Source_20_Text">.</text:span> substitution </text:p>
        </text:list-item>
        <text:list-item>
          <text:p text:style-name="P352"><text:span text:style-name="Strong_20_Emphasis">stops cleanly at EOF</text:span> without padding or assumptions </text:p>
        </text:list-item>
        <text:list-item>
          <text:p text:style-name="P351"><text:span text:style-name="Strong_20_Emphasis">maintains deterministic formatting</text:span> for reproducible output </text:p>
        </text:list-item>
      </text:list>
      <text:h text:style-name="Heading_20_2" text:outline-level="2"><text:span text:style-name="Strong_20_Emphasis">Forensic Features</text:span></text:h>
      <text:p text:style-name="Text_20_body">READ includes enhancements specifically for investigative workflows:</text:p>
      <text:list xml:id="list3809506457" text:style-name="L396">
        <text:list-item>
          <text:p text:style-name="P354"><text:span text:style-name="Strong_20_Emphasis">offset‑anchored output</text:span> for precise referencing in reports </text:p>
        </text:list-item>
        <text:list-item>
          <text:p text:style-name="P354"><text:span text:style-name="Strong_20_Emphasis">consistent block alignment</text:span> across all files </text:p>
        </text:list-item>
        <text:list-item>
          <text:p text:style-name="P354"><text:span text:style-name="Strong_20_Emphasis">no heuristics or decoding</text:span> — pure byte display </text:p>
        </text:list-item>
        <text:list-item>
          <text:p text:style-name="P354"><text:soft-page-break/><text:span text:style-name="Strong_20_Emphasis">safe handling of malformed data</text:span> including truncated blocks </text:p>
        </text:list-item>
        <text:list-item>
          <text:p text:style-name="P353"><text:span text:style-name="Strong_20_Emphasis">stable output ordering</text:span> for diff‑based comparisons </text:p>
        </text:list-item>
      </text:list>
      <text:p text:style-name="Text_20_body">These features make READ suitable for courtroom‑grade documentation and binary‑level verification.</text:p>
      <text:h text:style-name="Heading_20_2" text:outline-level="2"><text:span text:style-name="Strong_20_Emphasis">Example Output</text:span></text:h>
      <text:p text:style-name="Preformatted_20_Text"><text:span text:style-name="Source_20_Text">00000000 <text:s/>50 4B 03 04 14 00 06 00 <text:s/>08 00 00 00 21 00 5A 3C <text:s text:c="2"/>PK........!.Z&lt;</text:span></text:p>
      <text:p text:style-name="P1"><text:span text:style-name="Source_20_Text">00000010 <text:s/>00 00 00 00 00 00 00 00 <text:s/>00 00 <text:s text:c="19"/>..........</text:span></text:p>
      <text:h text:style-name="Heading_20_2" text:outline-level="2"><text:span text:style-name="Strong_20_Emphasis">Notes</text:span></text:h>
      <text:list xml:id="list2069212318" text:style-name="L397">
        <text:list-item>
          <text:p text:style-name="P356">READ does not detect file type </text:p>
        </text:list-item>
        <text:list-item>
          <text:p text:style-name="P356">READ does not follow symbolic links unless OPEN permitted it </text:p>
        </text:list-item>
        <text:list-item>
          <text:p text:style-name="P356">READ is safe for hostile, malformed, or adversarial input </text:p>
        </text:list-item>
        <text:list-item>
          <text:p text:style-name="P355">READ output is stable across runs and platforms </text:p>
        </text:list-item>
      </text:list>
      <text:p text:style-name="Text_20_body">Absolutely, Greg — here is a <text:span text:style-name="Strong_20_Emphasis">stand‑alone, publication‑ready regeneration of EXTRACT</text:span>, written at the same forensic depth and editorial polish as STRING, ENTROPY, SEARCH, and READ. Every bullet item includes the required <text:span text:style-name="Strong_20_Emphasis">inline exploration highlights</text:span>.</text:p>
      <text:p text:style-name="Horizontal_20_Line"/>
      <text:h text:style-name="Heading_20_1" text:outline-level="1"><text:span text:style-name="Strong_20_Emphasis">6.2.5 EXTRACT — Recursive Archive Extraction</text:span></text:h>
      <text:p text:style-name="Text_20_body"><text:span text:style-name="Strong_20_Emphasis">Syntax</text:span></text:p>
      <text:p text:style-name="P1"><text:span text:style-name="Source_20_Text">EXTRACT</text:span></text:p>
      <text:p text:style-name="Text_20_body"><text:span text:style-name="Strong_20_Emphasis">Description</text:span> <text:line-break/>EXTRACT recursively unpacks archives and embedded structures from the currently open file using Opus’s forensic‑grade extraction engine. It supports ZIP, TAR, GZIP, and container‑in‑container patterns such as ZIP‑in‑ZIP or ZIP‑in‑PNG. The extractor is designed for adversarial environments, malformed archives, and deeply nested payloads commonly found in CTF challenges, malware samples, and obfuscated bundles.</text:p>
      <text:p text:style-name="Text_20_body">EXTRACT never modifies the original file. All output is written into a dedicated, provenance‑preserving directory tree.</text:p>
      <text:h text:style-name="Heading_20_2" text:outline-level="2"><text:span text:style-name="Strong_20_Emphasis"><text:span text:style-name="T11">Detection Model</text:span></text:span></text:h>
      <text:p text:style-name="Text_20_body">EXTRACT uses a multi‑stage detection pipeline to identify extractable structures:</text:p>
      <text:list xml:id="list3420289264" text:style-name="L398">
        <text:list-item>
          <text:p text:style-name="P358"><text:span text:style-name="Strong_20_Emphasis">signature‑based format detection</text:span> using magic numbers and header validation </text:p>
        </text:list-item>
        <text:list-item>
          <text:p text:style-name="P358"><text:span text:style-name="Strong_20_Emphasis">container integrity checks</text:span> to avoid false positives </text:p>
        </text:list-item>
        <text:list-item>
          <text:p text:style-name="P358"><text:span text:style-name="Strong_20_Emphasis">embedded archive scanning</text:span> inside extracted files </text:p>
        </text:list-item>
        <text:list-item>
          <text:p text:style-name="P358"><text:soft-page-break/><text:span text:style-name="Strong_20_Emphasis">depth‑limited recursion</text:span> to prevent infinite loops </text:p>
        </text:list-item>
        <text:list-item>
          <text:p text:style-name="P357"><text:span text:style-name="Strong_20_Emphasis">malformed archive resilience</text:span> with graceful fallback </text:p>
        </text:list-item>
      </text:list>
      <text:p text:style-name="Text_20_body">This model ensures reliable extraction even when dealing with corrupted or adversarial data.</text:p>
      <text:h text:style-name="Heading_20_2" text:outline-level="2"><text:span text:style-name="Strong_20_Emphasis"><text:span text:style-name="T11">Behavior</text:span></text:span></text:h>
      <text:list xml:id="list2508280657" text:style-name="L399">
        <text:list-item>
          <text:p text:style-name="P360"><text:span text:style-name="Strong_20_Emphasis">detects the archive type</text:span> using signature inspection </text:p>
        </text:list-item>
        <text:list-item>
          <text:p text:style-name="P360"><text:span text:style-name="Strong_20_Emphasis">creates a dedicated output directory</text:span> named <text:span text:style-name="Source_20_Text">&lt;file&gt;_extracted</text:span> </text:p>
        </text:list-item>
        <text:list-item>
          <text:p text:style-name="P360"><text:span text:style-name="Strong_20_Emphasis">extracts top‑level content</text:span> using format‑appropriate routines </text:p>
        </text:list-item>
        <text:list-item>
          <text:p text:style-name="P360"><text:span text:style-name="Strong_20_Emphasis">scans extracted files for embedded archives</text:span> </text:p>
        </text:list-item>
        <text:list-item>
          <text:p text:style-name="P360"><text:span text:style-name="Strong_20_Emphasis">recursively processes nested structures</text:span> until no further archives remain </text:p>
        </text:list-item>
        <text:list-item>
          <text:p text:style-name="P360"><text:span text:style-name="Strong_20_Emphasis">prints a structured extraction log</text:span> for provenance and auditing </text:p>
        </text:list-item>
        <text:list-item>
          <text:p text:style-name="P359"><text:span text:style-name="Strong_20_Emphasis">avoids overwriting existing files</text:span> by generating unique output paths </text:p>
        </text:list-item>
      </text:list>
      <text:h text:style-name="Heading_20_2" text:outline-level="2"><text:span text:style-name="Strong_20_Emphasis"><text:span text:style-name="T11">Forensic Features</text:span></text:span></text:h>
      <text:p text:style-name="Text_20_body">EXTRACT includes enhancements specifically for investigative workflows:</text:p>
      <text:list xml:id="list2984585874" text:style-name="L400">
        <text:list-item>
          <text:p text:style-name="P362"><text:span text:style-name="Strong_20_Emphasis">provenance‑preserving directory structure</text:span> that mirrors extraction depth </text:p>
        </text:list-item>
        <text:list-item>
          <text:p text:style-name="P362"><text:span text:style-name="Strong_20_Emphasis">deterministic extraction order</text:span> for reproducible analysis </text:p>
        </text:list-item>
        <text:list-item>
          <text:p text:style-name="P362"><text:span text:style-name="Strong_20_Emphasis">safe output paths</text:span> that never escape the working directory </text:p>
        </text:list-item>
        <text:list-item>
          <text:p text:style-name="P362"><text:span text:style-name="Strong_20_Emphasis">error‑tolerant extraction</text:span> for corrupted or partial archives </text:p>
        </text:list-item>
        <text:list-item>
          <text:p text:style-name="P361"><text:span text:style-name="Strong_20_Emphasis">embedded ZIP detection in PNG</text:span> via chunk‑level scanning </text:p>
        </text:list-item>
      </text:list>
      <text:p text:style-name="Text_20_body">These features make EXTRACT suitable for chain‑of‑custody‑safe workflows and deep structural analysis.</text:p>
      <text:h text:style-name="Heading_20_2" text:outline-level="2"><text:span text:style-name="Strong_20_Emphasis"><text:span text:style-name="T11">Example Output</text:span></text:span></text:h>
      <text:p text:style-name="Preformatted_20_Text"><text:span text:style-name="Source_20_Text">[EXTRACT] ZIP detected.</text:span></text:p>
      <text:p text:style-name="Preformatted_20_Text"><text:span text:style-name="Source_20_Text">[EXTRACT] Extracted 12 files into ./sample.bin_extracted</text:span></text:p>
      <text:p text:style-name="Preformatted_20_Text"><text:span text:style-name="Source_20_Text">[EXTRACT] Found embedded ZIP: layer1.zip</text:span></text:p>
      <text:p text:style-name="Preformatted_20_Text"><text:span text:style-name="Source_20_Text">[EXTRACT] Extracted 3 files into ./sample.bin_extracted/layer1</text:span></text:p>
      <text:p text:style-name="P1"><text:span text:style-name="Source_20_Text">[EXTRACT] Done.</text:span></text:p>
      <text:h text:style-name="Heading_20_2" text:outline-level="2"><text:span text:style-name="Strong_20_Emphasis"><text:span text:style-name="T11">Notes</text:span></text:span></text:h>
      <text:list xml:id="list2213091344" text:style-name="L401">
        <text:list-item>
          <text:p text:style-name="P364">EXTRACT never modifies the original file </text:p>
        </text:list-item>
        <text:list-item>
          <text:p text:style-name="P364">EXTRACT is safe for hostile or malformed archives </text:p>
        </text:list-item>
        <text:list-item>
          <text:p text:style-name="P363">EXTRACT logs are stable across runs and suitable for forensic reporting </text:p>
        </text:list-item>
      </text:list>
      <text:p text:style-name="Horizontal_20_Line"/>
      <text:p text:style-name="Text_20_body"/>
      <text:p text:style-name="Text_20_body"/>
      <text:h text:style-name="Heading_20_1" text:outline-level="1"><text:soft-page-break/><text:span text:style-name="Strong_20_Emphasis">6.2.6 Summary</text:span></text:h>
      <text:p text:style-name="Text_20_body"/>
      <text:p text:style-name="Text_20_body">The Forensic Commands subsystem provides Opus’s core analytical capabilities. These tools operate directly on the currently open file and are designed for precision, determinism, and investigative clarity. Together, they form the foundation of Opus’s forensic workflow, enabling analysts to extract meaning, detect structure, and locate significant patterns within arbitrary data.</text:p>
      <text:p text:style-name="Text_20_body"><text:span text:style-name="Strong_20_Emphasis">Capabilities</text:span></text:p>
      <text:list xml:id="list900353990" text:style-name="L402">
        <text:list-item>
          <text:p text:style-name="P366"><text:span text:style-name="Strong_20_Emphasis">STRING extracts printable text</text:span> to reveal human‑readable fragments and contextual clues </text:p>
        </text:list-item>
        <text:list-item>
          <text:p text:style-name="P366"><text:span text:style-name="Strong_20_Emphasis">ENTROPY measures randomness</text:span> to identify encrypted, compressed, or anomalous regions </text:p>
        </text:list-item>
        <text:list-item>
          <text:p text:style-name="P366"><text:span text:style-name="Strong_20_Emphasis">SEARCH locates byte patterns</text:span> using ASCII, hex, or wildcard queries with full offset reporting </text:p>
        </text:list-item>
        <text:list-item>
          <text:p text:style-name="P366"><text:span text:style-name="Strong_20_Emphasis">READ displays raw bytes</text:span> in a deterministic hex‑and‑ASCII layout for low‑level inspection </text:p>
        </text:list-item>
        <text:list-item>
          <text:p text:style-name="P365"><text:span text:style-name="Strong_20_Emphasis">EXTRACT unpacks embedded archives</text:span> through recursive, provenance‑preserving extraction </text:p>
        </text:list-item>
      </text:list>
      <text:p text:style-name="Text_20_body">These commands provide the essential investigative toolkit for understanding file structure, identifying hidden content, and performing reliable forensic triage.</text:p>
      <text:h text:style-name="Heading_20_1" text:outline-level="1">====================================</text:h>
      <text:h text:style-name="Heading_20_1" text:outline-level="1">6.3 INTEGRITY &amp; HASHING TOOLS</text:h>
      <text:h text:style-name="Heading_20_1" text:outline-level="1">====================================</text:h>
      <text:p text:style-name="Text_20_body">Integrity verification is a core requirement in forensic workflows. Analysts must be able to confirm that files have not been altered, compare content across versions, and validate sidecar hash files. Opus provides two hashing commands — <text:span text:style-name="Strong_20_Emphasis">MD5</text:span> and <text:span text:style-name="Strong_20_Emphasis">SHA256</text:span> — that offer fast, reliable digest computation and verification.</text:p>
      <text:p text:style-name="Text_20_body">These tools are intentionally simple and transparent. They compute digests, compare them, and print clear results without hidden heuristics or ambiguous output.</text:p>
      <text:p text:style-name="Text_20_body">Opus hashing tools include:</text:p>
      <text:list xml:id="list2310976322" text:style-name="L303">
        <text:list-item>
          <text:p text:style-name="P205"><text:span text:style-name="Strong_20_Emphasis">MD5</text:span> — compute and compare MD5 digests </text:p>
        </text:list-item>
        <text:list-item>
          <text:p text:style-name="P204"><text:span text:style-name="Strong_20_Emphasis">SHA256</text:span> — compute, verify, and compare SHA‑256 digests </text:p>
        </text:list-item>
      </text:list>
      <text:p text:style-name="Text_20_body">Each command is documented below.</text:p>
      <text:p text:style-name="Horizontal_20_Line"/>
      <text:h text:style-name="Heading_20_1" text:outline-level="1"><text:soft-page-break/>6.3.1 MD5 — MD5 Digest Tool</text:h>
      <text:p text:style-name="Text_20_body"><text:span text:style-name="Strong_20_Emphasis">Syntax</text:span></text:p>
      <text:p text:style-name="Preformatted_20_Text"><text:span text:style-name="Source_20_Text">MD5 &lt;file&gt;</text:span></text:p>
      <text:p text:style-name="P1"><text:span text:style-name="Source_20_Text">MD5 -verify &lt;file&gt; &lt;expected&gt;</text:span></text:p>
      <text:p text:style-name="Text_20_body"><text:span text:style-name="Strong_20_Emphasis">Description</text:span> <text:line-break/>Computes the MD5 digest of a file or verifies a file against a known MD5 value. MD5 is widely used in CTFs and legacy forensic workflows, though it is not collision‑resistant. Opus includes MD5 for compatibility and convenience.</text:p>
      <text:p text:style-name="Horizontal_20_Line"/>
      <text:h text:style-name="Heading_20_2" text:outline-level="2">6.3.1.1 Modes of Operation</text:h>
      <text:h text:style-name="Heading_20_3" text:outline-level="3">Compute Mode</text:h>
      <text:p text:style-name="P1"><text:span text:style-name="Source_20_Text">MD5 file.bin</text:span></text:p>
      <text:p text:style-name="Text_20_body">Prints the MD5 digest in lowercase hexadecimal.</text:p>
      <text:h text:style-name="Heading_20_3" text:outline-level="3">Verify Mode</text:h>
      <text:p text:style-name="P1"><text:span text:style-name="Source_20_Text">MD5 -verify file.bin d41d8cd98f00b204e9800998ecf8427e</text:span></text:p>
      <text:p text:style-name="Text_20_body">Compares the computed digest to the expected value and prints:</text:p>
      <text:p text:style-name="P1"><text:span text:style-name="Source_20_Text">[MD5] Match</text:span></text:p>
      <text:p text:style-name="Text_20_body">or</text:p>
      <text:p text:style-name="P1"><text:span text:style-name="Source_20_Text">[MD5] Mismatch</text:span></text:p>
      <text:p text:style-name="Horizontal_20_Line"/>
      <text:h text:style-name="Heading_20_2" text:outline-level="2">6.3.1.2 Internal Behavior</text:h>
      <text:list xml:id="list644285707" text:style-name="L304">
        <text:list-item>
          <text:p text:style-name="P207"><text:span text:style-name="Strong_20_Emphasis">reads file into memory</text:span> </text:p>
        </text:list-item>
        <text:list-item>
          <text:p text:style-name="P207"><text:span text:style-name="Strong_20_Emphasis">computes MD5 digest</text:span> </text:p>
        </text:list-item>
        <text:list-item>
          <text:p text:style-name="P207"><text:span text:style-name="Strong_20_Emphasis">prints digest in hex</text:span> </text:p>
        </text:list-item>
        <text:list-item>
          <text:p text:style-name="P206"><text:span text:style-name="Strong_20_Emphasis">performs constant‑time comparison in verify mode</text:span> </text:p>
        </text:list-item>
      </text:list>
      <text:p text:style-name="Horizontal_20_Line"/>
      <text:h text:style-name="Heading_20_2" text:outline-level="2">6.3.1.3 Example Output</text:h>
      <text:p text:style-name="Preformatted_20_Text"><text:span text:style-name="Source_20_Text">[MD5] File: sample.bin</text:span></text:p>
      <text:p text:style-name="P1"><text:span text:style-name="Source_20_Text">[MD5] Digest: 098f6bcd4621d373cade4e832627b4f6</text:span></text:p>
      <text:p text:style-name="Text_20_body"><text:soft-page-break/>Verify example:</text:p>
      <text:p text:style-name="Preformatted_20_Text"><text:span text:style-name="Source_20_Text">[MD5] File: sample.bin</text:span></text:p>
      <text:p text:style-name="Preformatted_20_Text"><text:span text:style-name="Source_20_Text">[MD5] Expected: 098f6bcd4621d373cade4e832627b4f6</text:span></text:p>
      <text:p text:style-name="Preformatted_20_Text"><text:span text:style-name="Source_20_Text">[MD5] Actual: <text:s text:c="2"/>098f6bcd4621d373cade4e832627b4f6</text:span></text:p>
      <text:p text:style-name="P1"><text:span text:style-name="Source_20_Text">[MD5] Match</text:span></text:p>
      <text:p text:style-name="Horizontal_20_Line"/>
      <text:h text:style-name="Heading_20_1" text:outline-level="1">6.3.2 SHA256 — SHA‑256 Digest Tool</text:h>
      <text:p text:style-name="Text_20_body"><text:span text:style-name="Strong_20_Emphasis">Syntax</text:span></text:p>
      <text:p text:style-name="Preformatted_20_Text"><text:span text:style-name="Source_20_Text">SHA256 &lt;file&gt;</text:span></text:p>
      <text:p text:style-name="Preformatted_20_Text"><text:span text:style-name="Source_20_Text">SHA256 -verify &lt;file&gt; &lt;expected&gt;</text:span></text:p>
      <text:p text:style-name="P1"><text:span text:style-name="Source_20_Text">SHA256 -compare &lt;file1&gt; &lt;file2&gt;</text:span></text:p>
      <text:p text:style-name="Text_20_body"><text:span text:style-name="Strong_20_Emphasis">Description</text:span> <text:line-break/>Computes SHA‑256 digests, verifies files against known values, or compares two files by hashing them. SHA‑256 is the recommended integrity tool for forensic workflows due to its collision resistance and widespread adoption.</text:p>
      <text:p text:style-name="Horizontal_20_Line"/>
      <text:h text:style-name="Heading_20_2" text:outline-level="2">6.3.2.1 Modes of Operation</text:h>
      <text:h text:style-name="Heading_20_3" text:outline-level="3">Compute Mode</text:h>
      <text:p text:style-name="P1"><text:span text:style-name="Source_20_Text">SHA256 file.bin</text:span></text:p>
      <text:p text:style-name="Text_20_body">Prints the SHA‑256 digest.</text:p>
      <text:h text:style-name="Heading_20_3" text:outline-level="3">Verify Mode</text:h>
      <text:p text:style-name="P1"><text:span text:style-name="Source_20_Text">SHA256 -verify file.bin &lt;expected&gt;</text:span></text:p>
      <text:p text:style-name="Text_20_body">Compares the computed digest to the expected value.</text:p>
      <text:h text:style-name="Heading_20_3" text:outline-level="3">Compare Mode</text:h>
      <text:p text:style-name="P1"><text:span text:style-name="Source_20_Text">SHA256 -compare file1.bin file2.bin</text:span></text:p>
      <text:p text:style-name="Text_20_body">Hashes both files and prints:</text:p>
      <text:p text:style-name="P1"><text:span text:style-name="Source_20_Text">[SHA256] Match</text:span></text:p>
      <text:p text:style-name="Text_20_body">or</text:p>
      <text:p text:style-name="P1"><text:span text:style-name="Source_20_Text">[SHA256] Mismatch</text:span></text:p>
      <text:p text:style-name="Horizontal_20_Line"/>
      <text:h text:style-name="Heading_20_2" text:outline-level="2"><text:soft-page-break/>6.3.2.2 Internal Behavior</text:h>
      <text:list xml:id="list2082019790" text:style-name="L305">
        <text:list-item>
          <text:p text:style-name="P209"><text:span text:style-name="Strong_20_Emphasis">reads file(s) into memory</text:span> </text:p>
        </text:list-item>
        <text:list-item>
          <text:p text:style-name="P209"><text:span text:style-name="Strong_20_Emphasis">computes SHA‑256 digest</text:span> </text:p>
        </text:list-item>
        <text:list-item>
          <text:p text:style-name="P209"><text:span text:style-name="Strong_20_Emphasis">prints digest in hex</text:span> </text:p>
        </text:list-item>
        <text:list-item>
          <text:p text:style-name="P208"><text:span text:style-name="Strong_20_Emphasis">performs constant‑time comparison</text:span> </text:p>
        </text:list-item>
      </text:list>
      <text:p text:style-name="Horizontal_20_Line"/>
      <text:h text:style-name="Heading_20_2" text:outline-level="2">6.3.2.3 Example Output</text:h>
      <text:p text:style-name="Preformatted_20_Text"><text:span text:style-name="Source_20_Text">[SHA256] File: sample.bin</text:span></text:p>
      <text:p text:style-name="P1"><text:span text:style-name="Source_20_Text">[SHA256] Digest: 9f86d081884c7d659a2feaa0c55ad015a3bf4f1b2b0b822cd15d6c15b0f00a08</text:span></text:p>
      <text:p text:style-name="Text_20_body">Verify example:</text:p>
      <text:p text:style-name="Preformatted_20_Text"><text:span text:style-name="Source_20_Text">[SHA256] File: sample.bin</text:span></text:p>
      <text:p text:style-name="Preformatted_20_Text"><text:span text:style-name="Source_20_Text">[SHA256] Expected: 9f86d081884c7d659a2feaa0c55ad015a3bf4f1b2b0b822cd15d6c15b0f00a08</text:span></text:p>
      <text:p text:style-name="Preformatted_20_Text"><text:span text:style-name="Source_20_Text">[SHA256] Actual: <text:s text:c="2"/>9f86d081884c7d659a2feaa0c55ad015a3bf4f1b2b0b822cd15d6c15b0f00a08</text:span></text:p>
      <text:p text:style-name="P1"><text:span text:style-name="Source_20_Text">[SHA256] Match</text:span></text:p>
      <text:p text:style-name="Text_20_body">Compare example:</text:p>
      <text:p text:style-name="Preformatted_20_Text"><text:span text:style-name="Source_20_Text">[SHA256] Comparing file1.bin and file2.bin</text:span></text:p>
      <text:p text:style-name="P1"><text:span text:style-name="Source_20_Text">[SHA256] Match</text:span></text:p>
      <text:p text:style-name="Horizontal_20_Line"/>
      <text:h text:style-name="Heading_20_1" text:outline-level="1">6.3.3 Analytical Workflows</text:h>
      <text:p text:style-name="Text_20_body">Hashing tools are commonly used in:</text:p>
      <text:list xml:id="list330948048" text:style-name="L306">
        <text:list-item>
          <text:p text:style-name="P211"><text:span text:style-name="Strong_20_Emphasis">forensic integrity verification</text:span> </text:p>
        </text:list-item>
        <text:list-item>
          <text:p text:style-name="P211"><text:span text:style-name="Strong_20_Emphasis">CTF challenge validation</text:span> </text:p>
        </text:list-item>
        <text:list-item>
          <text:p text:style-name="P211"><text:span text:style-name="Strong_20_Emphasis">file comparison</text:span> </text:p>
        </text:list-item>
        <text:list-item>
          <text:p text:style-name="P211"><text:span text:style-name="Strong_20_Emphasis">chain‑of‑custody workflows</text:span> </text:p>
        </text:list-item>
        <text:list-item>
          <text:p text:style-name="P210"><text:span text:style-name="Strong_20_Emphasis">malware triage</text:span> </text:p>
        </text:list-item>
      </text:list>
      <text:p text:style-name="Text_20_body">Typical workflow:</text:p>
      <text:list xml:id="list1017882547" text:style-name="L307">
        <text:list-item>
          <text:p text:style-name="P213">Compute digest of original file </text:p>
        </text:list-item>
        <text:list-item>
          <text:p text:style-name="P213">Extract or modify data </text:p>
        </text:list-item>
        <text:list-item>
          <text:p text:style-name="P213">Recompute digest </text:p>
        </text:list-item>
        <text:list-item>
          <text:p text:style-name="P213">Compare or verify </text:p>
        </text:list-item>
        <text:list-item>
          <text:p text:style-name="P212">Document results </text:p>
        </text:list-item>
      </text:list>
      <text:p text:style-name="Horizontal_20_Line"/>
      <text:h text:style-name="Heading_20_1" text:outline-level="1"><text:soft-page-break/>6.3.4 Edge Cases and Notes</text:h>
      <text:list xml:id="list819808862" text:style-name="L308">
        <text:list-item>
          <text:p text:style-name="P215"><text:span text:style-name="Strong_20_Emphasis">MD5 is not collision‑resistant</text:span> </text:p>
        </text:list-item>
        <text:list-item>
          <text:p text:style-name="P215"><text:span text:style-name="Strong_20_Emphasis">SHA‑256 is recommended for forensic use</text:span> </text:p>
        </text:list-item>
        <text:list-item>
          <text:p text:style-name="P215"><text:span text:style-name="Strong_20_Emphasis">Whitespace in expected digests causes mismatches</text:span> </text:p>
        </text:list-item>
        <text:list-item>
          <text:p text:style-name="P215"><text:span text:style-name="Strong_20_Emphasis">Digest comparison is case‑insensitive</text:span> </text:p>
        </text:list-item>
        <text:list-item>
          <text:p text:style-name="P214"><text:span text:style-name="Strong_20_Emphasis">Large files may take longer to hash</text:span> </text:p>
        </text:list-item>
      </text:list>
      <text:p text:style-name="Horizontal_20_Line"/>
      <text:h text:style-name="Heading_20_1" text:outline-level="1">6.3.5 Warnings</text:h>
      <text:list xml:id="list2441708350" text:style-name="L309">
        <text:list-item>
          <text:p text:style-name="P217">Hashing does <text:span text:style-name="Strong_20_Emphasis">not</text:span> prove authenticity </text:p>
        </text:list-item>
        <text:list-item>
          <text:p text:style-name="P217">Hashing does <text:span text:style-name="Strong_20_Emphasis">not</text:span> detect embedded content </text:p>
        </text:list-item>
        <text:list-item>
          <text:p text:style-name="P217">Hashing does <text:span text:style-name="Strong_20_Emphasis">not</text:span> validate file structure </text:p>
        </text:list-item>
        <text:list-item>
          <text:p text:style-name="P216">Hashing does <text:span text:style-name="Strong_20_Emphasis">not</text:span> detect steganography </text:p>
        </text:list-item>
      </text:list>
      <text:p text:style-name="Text_20_body">It only verifies that bytes match.</text:p>
      <text:p text:style-name="Horizontal_20_Line"/>
      <text:h text:style-name="Heading_20_1" text:outline-level="1">6.3.6 Summary</text:h>
      <text:p text:style-name="Text_20_body">The Integrity &amp; Hashing subsystem provides Opus with fast, reliable tools for computing and verifying MD5 and SHA‑256 digests. These commands support forensic workflows, CTF validation, and file comparison with clear, deterministic output. Whether verifying a challenge file or confirming extraction integrity, these tools form an essential part of Opus’s investigative pipeline.</text:p>
      <text:h text:style-name="Heading_20_1" text:outline-level="1"/>
      <text:h text:style-name="Heading_20_1" text:outline-level="1">====================================</text:h>
      <text:h text:style-name="Heading_20_1" text:outline-level="1">6.4 CRYPTANALYSIS ENGINE</text:h>
      <text:h text:style-name="Heading_20_1" text:outline-level="1">====================================</text:h>
      <text:p text:style-name="Text_20_body">The Cryptanalysis Engine is one of the most powerful and mature subsystems in Opus. It provides a suite of tools for analyzing, attacking, and solving classical ciphers and RSA challenges commonly encountered in CTF competitions and forensic puzzles. Each tool is designed to be transparent, deterministic, and educational — Opus prints every step of its reasoning, allowing analysts to understand not only the result, but the process that produced it.</text:p>
      <text:p text:style-name="Text_20_body"><text:soft-page-break/>The cryptanalysis subsystem includes:</text:p>
      <text:list xml:id="list375535592" text:style-name="L311">
        <text:list-item>
          <text:p text:style-name="P219"><text:span text:style-name="Strong_20_Emphasis">Vigenère tools</text:span> </text:p>
        </text:list-item>
        <text:list-item>
          <text:p text:style-name="P219"><text:span text:style-name="Strong_20_Emphasis">Substitution‑cipher tools</text:span> </text:p>
        </text:list-item>
        <text:list-item>
          <text:p text:style-name="P219"><text:span text:style-name="Strong_20_Emphasis">Frequency analysis tools</text:span> </text:p>
        </text:list-item>
        <text:list-item>
          <text:p text:style-name="P219"><text:span text:style-name="Strong_20_Emphasis">Caesar tools</text:span> </text:p>
        </text:list-item>
        <text:list-item>
          <text:p text:style-name="P218"><text:span text:style-name="Strong_20_Emphasis">RSA analysis suite</text:span> </text:p>
        </text:list-item>
      </text:list>
      <text:p text:style-name="Text_20_body">Each category is documented in the sections below.</text:p>
      <text:p text:style-name="Horizontal_20_Line"/>
      <text:h text:style-name="Heading_20_1" text:outline-level="1">6.4.1 Vigenère Cipher Tools</text:h>
      <text:p text:style-name="Text_20_body">Opus includes a complete Vigenère analysis pipeline, ranging from basic encryption/decryption to automated key‑length detection and quadgram‑based refinement.</text:p>
      <text:p text:style-name="Text_20_body">Vigenère tools include:</text:p>
      <text:list xml:id="list1008177369" text:style-name="L312">
        <text:list-item>
          <text:p text:style-name="P221"><text:span text:style-name="Strong_20_Emphasis">VIG</text:span> — encrypt/decrypt with a known key </text:p>
        </text:list-item>
        <text:list-item>
          <text:p text:style-name="P221"><text:span text:style-name="Strong_20_Emphasis">VIGAN</text:span> — analyze ciphertext for key length and structure </text:p>
        </text:list-item>
        <text:list-item>
          <text:p text:style-name="P221"><text:span text:style-name="Strong_20_Emphasis">VIGCRACK</text:span> — automated Vigenère cracking </text:p>
        </text:list-item>
        <text:list-item>
          <text:p text:style-name="P221"><text:span text:style-name="Strong_20_Emphasis">VIGSOLVE</text:span> — IC‑based key‑length recovery </text:p>
        </text:list-item>
        <text:list-item>
          <text:p text:style-name="P221"><text:span text:style-name="Strong_20_Emphasis">VIGREFINE</text:span> — quadgram hillclimbing refinement </text:p>
        </text:list-item>
        <text:list-item>
          <text:p text:style-name="P220"><text:span text:style-name="Strong_20_Emphasis">VIGAUTO</text:span> — fully automated Vigenère solver </text:p>
        </text:list-item>
      </text:list>
      <text:p text:style-name="Horizontal_20_Line"/>
      <text:h text:style-name="Heading_20_2" text:outline-level="2">6.4.1.1 VIG — Basic Vigenère Encrypt/Decrypt</text:h>
      <text:p text:style-name="Text_20_body"><text:span text:style-name="Strong_20_Emphasis">Syntax</text:span></text:p>
      <text:p text:style-name="Preformatted_20_Text"><text:span text:style-name="Source_20_Text">VIG -enc &lt;file&gt; &lt;key&gt;</text:span></text:p>
      <text:p text:style-name="P1"><text:span text:style-name="Source_20_Text">VIG -dec &lt;file&gt; &lt;key&gt;</text:span></text:p>
      <text:p text:style-name="Text_20_body"><text:span text:style-name="Strong_20_Emphasis">Description</text:span> <text:line-break/>Encrypts or decrypts using a known Vigenère key. Useful for testing, validation, and manual workflows.</text:p>
      <text:p text:style-name="Horizontal_20_Line"/>
      <text:h text:style-name="Heading_20_2" text:outline-level="2">6.4.1.2 VIGAN — Vigenère Analyzer</text:h>
      <text:p text:style-name="Text_20_body"><text:span text:style-name="Strong_20_Emphasis">Syntax</text:span></text:p>
      <text:p text:style-name="P1"><text:span text:style-name="Source_20_Text">VIGAN &lt;file&gt;</text:span></text:p>
      <text:p text:style-name="Text_20_body"><text:span text:style-name="Strong_20_Emphasis">Description</text:span> <text:line-break/>Performs statistical analysis on ciphertext to estimate likely key lengths using:</text:p>
      <text:list xml:id="list1261262260" text:style-name="L313">
        <text:list-item>
          <text:p text:style-name="P223"><text:soft-page-break/><text:span text:style-name="Strong_20_Emphasis">Index of Coincidence (IC)</text:span> </text:p>
        </text:list-item>
        <text:list-item>
          <text:p text:style-name="P223"><text:span text:style-name="Strong_20_Emphasis">repeated‑sequence spacing</text:span> </text:p>
        </text:list-item>
        <text:list-item>
          <text:p text:style-name="P222"><text:span text:style-name="Strong_20_Emphasis">letter‑frequency deviation</text:span> </text:p>
        </text:list-item>
      </text:list>
      <text:p text:style-name="Text_20_body">This tool guides the next steps in the cracking pipeline.</text:p>
      <text:p text:style-name="Horizontal_20_Line"/>
      <text:h text:style-name="Heading_20_2" text:outline-level="2">6.4.1.3 VIGCRACK — Automated Vigenère Cracker</text:h>
      <text:p text:style-name="Text_20_body"><text:span text:style-name="Strong_20_Emphasis">Syntax</text:span></text:p>
      <text:p text:style-name="P1"><text:span text:style-name="Source_20_Text">VIGCRACK &lt;file&gt;</text:span></text:p>
      <text:p text:style-name="Text_20_body"><text:span text:style-name="Strong_20_Emphasis">Description</text:span> <text:line-break/>Attempts to recover the key and plaintext automatically using:</text:p>
      <text:list xml:id="list2067649340" text:style-name="L314">
        <text:list-item>
          <text:p text:style-name="P225">IC‑based key‑length estimation </text:p>
        </text:list-item>
        <text:list-item>
          <text:p text:style-name="P225">per‑column Caesar solving </text:p>
        </text:list-item>
        <text:list-item>
          <text:p text:style-name="P224">quadgram scoring </text:p>
        </text:list-item>
      </text:list>
      <text:p text:style-name="Text_20_body">This is the “one‑button” Vigenère solver.</text:p>
      <text:p text:style-name="Horizontal_20_Line"/>
      <text:h text:style-name="Heading_20_2" text:outline-level="2">6.4.1.4 VIGSOLVE — Key‑Length Solver</text:h>
      <text:p text:style-name="Text_20_body"><text:span text:style-name="Strong_20_Emphasis">Syntax</text:span></text:p>
      <text:p text:style-name="P1"><text:span text:style-name="Source_20_Text">VIGSOLVE &lt;file&gt; &lt;keylen&gt;</text:span></text:p>
      <text:p text:style-name="Text_20_body"><text:span text:style-name="Strong_20_Emphasis">Description</text:span> <text:line-break/>Given a candidate key length, VIGSOLVE solves each column as a Caesar cipher using chi‑squared scoring.</text:p>
      <text:p text:style-name="Horizontal_20_Line"/>
      <text:h text:style-name="Heading_20_2" text:outline-level="2">6.4.1.5 VIGREFINE — Quadgram Refinement</text:h>
      <text:p text:style-name="Text_20_body"><text:span text:style-name="Strong_20_Emphasis">Syntax</text:span></text:p>
      <text:p text:style-name="P1"><text:span text:style-name="Source_20_Text">VIGREFINE &lt;file&gt; &lt;key&gt;</text:span></text:p>
      <text:p text:style-name="Text_20_body"><text:span text:style-name="Strong_20_Emphasis">Description</text:span> <text:line-break/>Refines a candidate key using quadgram hillclimbing to maximize English‑language likelihood.</text:p>
      <text:p text:style-name="Horizontal_20_Line"/>
      <text:h text:style-name="Heading_20_2" text:outline-level="2">6.4.1.6 VIGAUTO — Fully Automated Solver</text:h>
      <text:p text:style-name="Text_20_body"><text:span text:style-name="Strong_20_Emphasis">Syntax</text:span></text:p>
      <text:p text:style-name="P1"><text:soft-page-break/><text:span text:style-name="Source_20_Text">VIGAUTO &lt;file&gt;</text:span></text:p>
      <text:p text:style-name="Text_20_body"><text:span text:style-name="Strong_20_Emphasis">Description</text:span> <text:line-break/>Runs the entire Vigenère pipeline automatically:</text:p>
      <text:list xml:id="list4105937499" text:style-name="L315">
        <text:list-item>
          <text:p text:style-name="P227">key‑length estimation </text:p>
        </text:list-item>
        <text:list-item>
          <text:p text:style-name="P227">column solving </text:p>
        </text:list-item>
        <text:list-item>
          <text:p text:style-name="P227">quadgram refinement </text:p>
        </text:list-item>
        <text:list-item>
          <text:p text:style-name="P226">plaintext scoring </text:p>
        </text:list-item>
      </text:list>
      <text:p text:style-name="Text_20_body">Produces the best candidate plaintext and key.</text:p>
      <text:p text:style-name="Horizontal_20_Line"/>
      <text:h text:style-name="Heading_20_1" text:outline-level="1">6.4.2 Substitution Cipher Tools</text:h>
      <text:p text:style-name="Text_20_body">Opus includes tools for analyzing and solving monoalphabetic substitution ciphers.</text:p>
      <text:p text:style-name="Text_20_body">Tools include:</text:p>
      <text:list xml:id="list2847513001" text:style-name="L316">
        <text:list-item>
          <text:p text:style-name="P229"><text:span text:style-name="Strong_20_Emphasis">MONO</text:span> — substitution solver (hillclimbing) </text:p>
        </text:list-item>
        <text:list-item>
          <text:p text:style-name="P229"><text:span text:style-name="Strong_20_Emphasis">FREQ</text:span> — frequency analysis </text:p>
        </text:list-item>
        <text:list-item>
          <text:p text:style-name="P228"><text:span text:style-name="Strong_20_Emphasis">CAESAR</text:span> — Caesar cipher solver </text:p>
        </text:list-item>
      </text:list>
      <text:p text:style-name="Horizontal_20_Line"/>
      <text:h text:style-name="Heading_20_2" text:outline-level="2">6.4.2.1 MONO — Substitution Solver</text:h>
      <text:p text:style-name="Text_20_body"><text:span text:style-name="Strong_20_Emphasis">Syntax</text:span></text:p>
      <text:p text:style-name="P1"><text:span text:style-name="Source_20_Text">MONO &lt;file&gt;</text:span></text:p>
      <text:p text:style-name="Text_20_body"><text:span text:style-name="Strong_20_Emphasis">Description</text:span> <text:line-break/>Uses quadgram scoring and simulated annealing to solve monoalphabetic substitution ciphers. Prints:</text:p>
      <text:list xml:id="list3845338307" text:style-name="L317">
        <text:list-item>
          <text:p text:style-name="P231">best key </text:p>
        </text:list-item>
        <text:list-item>
          <text:p text:style-name="P231">best score </text:p>
        </text:list-item>
        <text:list-item>
          <text:p text:style-name="P230">plaintext candidate </text:p>
        </text:list-item>
      </text:list>
      <text:p text:style-name="Horizontal_20_Line"/>
      <text:h text:style-name="Heading_20_2" text:outline-level="2">6.4.2.2 FREQ — Frequency Analysis</text:h>
      <text:p text:style-name="Text_20_body"><text:span text:style-name="Strong_20_Emphasis">Syntax</text:span></text:p>
      <text:p text:style-name="P1"><text:span text:style-name="Source_20_Text">FREQ &lt;file&gt;</text:span></text:p>
      <text:p text:style-name="Text_20_body"><text:span text:style-name="Strong_20_Emphasis">Description</text:span> <text:line-break/>Prints letter frequencies, sorted and raw. Useful for:</text:p>
      <text:list xml:id="list2720502294" text:style-name="L318">
        <text:list-item>
          <text:p text:style-name="P233"><text:soft-page-break/>substitution ciphers </text:p>
        </text:list-item>
        <text:list-item>
          <text:p text:style-name="P233">Caesar ciphers </text:p>
        </text:list-item>
        <text:list-item>
          <text:p text:style-name="P232">language identification </text:p>
        </text:list-item>
      </text:list>
      <text:p text:style-name="Horizontal_20_Line"/>
      <text:h text:style-name="Heading_20_2" text:outline-level="2">6.4.2.3 CAESAR — Caesar Cipher Tools</text:h>
      <text:p text:style-name="Text_20_body"><text:span text:style-name="Strong_20_Emphasis">Syntax</text:span></text:p>
      <text:p text:style-name="P1"><text:span text:style-name="Source_20_Text">CAESAR &lt;file&gt;</text:span></text:p>
      <text:p text:style-name="Text_20_body"><text:span text:style-name="Strong_20_Emphasis">Description</text:span> <text:line-break/>Attempts all 26 Caesar shifts and prints each candidate plaintext with its shift value.</text:p>
      <text:p text:style-name="Horizontal_20_Line"/>
      <text:h text:style-name="Heading_20_1" text:outline-level="1">6.4.3 RSA Analysis Suite</text:h>
      <text:p text:style-name="Text_20_body">Opus includes a comprehensive set of RSA tools for CTF‑style challenges. These tools support factorization, vulnerability detection, and key reconstruction.</text:p>
      <text:p text:style-name="Text_20_body">RSA tools include:</text:p>
      <text:list xml:id="list2856400205" text:style-name="L319">
        <text:list-item>
          <text:p text:style-name="P235"><text:span text:style-name="Strong_20_Emphasis">RSA‑MINI</text:span> — small‑integer RSA solver </text:p>
        </text:list-item>
        <text:list-item>
          <text:p text:style-name="P235"><text:span text:style-name="Strong_20_Emphasis">RSA‑FACTOR</text:span> — generic factorization </text:p>
        </text:list-item>
        <text:list-item>
          <text:p text:style-name="P235"><text:span text:style-name="Strong_20_Emphasis">RSA‑RHO</text:span> — Pollard’s Rho </text:p>
        </text:list-item>
        <text:list-item>
          <text:p text:style-name="P235"><text:span text:style-name="Strong_20_Emphasis">RSA‑WIENER</text:span> — Wiener attack </text:p>
        </text:list-item>
        <text:list-item>
          <text:p text:style-name="P235"><text:span text:style-name="Strong_20_Emphasis">RSA‑SMALL‑E</text:span> — small‑exponent attack </text:p>
        </text:list-item>
        <text:list-item>
          <text:p text:style-name="P235"><text:span text:style-name="Strong_20_Emphasis">RSA‑KNOWNPQ</text:span> — reconstruct key from p and q </text:p>
        </text:list-item>
        <text:list-item>
          <text:p text:style-name="P235"><text:span text:style-name="Strong_20_Emphasis">RSA‑CHECKPQ</text:span> — validate p and q </text:p>
        </text:list-item>
        <text:list-item>
          <text:p text:style-name="P235"><text:span text:style-name="Strong_20_Emphasis">RSA‑DFROMPQ</text:span> — compute d from p and q </text:p>
        </text:list-item>
        <text:list-item>
          <text:p text:style-name="P234"><text:span text:style-name="Strong_20_Emphasis">RSA‑ECM</text:span> — elliptic‑curve factorization (if enabled) </text:p>
        </text:list-item>
      </text:list>
      <text:p text:style-name="Horizontal_20_Line"/>
      <text:h text:style-name="Heading_20_2" text:outline-level="2">6.4.3.1 RSA‑MINI</text:h>
      <text:p text:style-name="Text_20_body"><text:span text:style-name="Strong_20_Emphasis">Syntax</text:span></text:p>
      <text:p text:style-name="P1"><text:span text:style-name="Source_20_Text">RSA-MINI &lt;n&gt; &lt;e&gt; &lt;c&gt;</text:span></text:p>
      <text:p text:style-name="Text_20_body"><text:span text:style-name="Strong_20_Emphasis">Description</text:span> <text:line-break/>Solves RSA instances where <text:span text:style-name="Strong_20_Emphasis">n</text:span> is small enough for direct factorization.</text:p>
      <text:p text:style-name="Horizontal_20_Line"/>
      <text:h text:style-name="Heading_20_2" text:outline-level="2"><text:soft-page-break/>6.4.3.2 RSA‑FACTOR</text:h>
      <text:p text:style-name="Text_20_body"><text:span text:style-name="Strong_20_Emphasis">Syntax</text:span></text:p>
      <text:p text:style-name="P1"><text:span text:style-name="Source_20_Text">RSA-FACTOR &lt;n&gt;</text:span></text:p>
      <text:p text:style-name="Text_20_body"><text:span text:style-name="Strong_20_Emphasis">Description</text:span> <text:line-break/>Attempts to factor <text:span text:style-name="Strong_20_Emphasis">n</text:span> using trial division and small optimizations.</text:p>
      <text:p text:style-name="Horizontal_20_Line"/>
      <text:h text:style-name="Heading_20_2" text:outline-level="2">6.4.3.3 RSA‑RHO — Pollard’s Rho</text:h>
      <text:p text:style-name="Text_20_body"><text:span text:style-name="Strong_20_Emphasis">Syntax</text:span></text:p>
      <text:p text:style-name="P1"><text:span text:style-name="Source_20_Text">RSA-RHO &lt;n&gt;</text:span></text:p>
      <text:p text:style-name="Text_20_body"><text:span text:style-name="Strong_20_Emphasis">Description</text:span> <text:line-break/>Uses Pollard’s Rho algorithm to factor <text:span text:style-name="Strong_20_Emphasis">n</text:span> efficiently when p and q are close.</text:p>
      <text:p text:style-name="Horizontal_20_Line"/>
      <text:h text:style-name="Heading_20_2" text:outline-level="2">6.4.3.4 RSA‑WIENER — Wiener Attack</text:h>
      <text:p text:style-name="Text_20_body"><text:span text:style-name="Strong_20_Emphasis">Syntax</text:span></text:p>
      <text:p text:style-name="P1"><text:span text:style-name="Source_20_Text">RSA-WIENER &lt;n&gt; &lt;e&gt;</text:span></text:p>
      <text:p text:style-name="Text_20_body"><text:span text:style-name="Strong_20_Emphasis">Description</text:span> <text:line-break/>Recovers <text:span text:style-name="Strong_20_Emphasis">d</text:span> when the private exponent is unusually small.</text:p>
      <text:p text:style-name="Horizontal_20_Line"/>
      <text:h text:style-name="Heading_20_2" text:outline-level="2">6.4.3.5 RSA‑SMALL‑E</text:h>
      <text:p text:style-name="Text_20_body"><text:span text:style-name="Strong_20_Emphasis">Syntax</text:span></text:p>
      <text:p text:style-name="P1"><text:span text:style-name="Source_20_Text">RSA-SMALL-E &lt;n&gt; &lt;e&gt; &lt;c&gt;</text:span></text:p>
      <text:p text:style-name="Text_20_body"><text:span text:style-name="Strong_20_Emphasis">Description</text:span> <text:line-break/>Solves RSA ciphertexts where <text:span text:style-name="Strong_20_Emphasis">e</text:span> is small (e.g., 3) and the message is not padded.</text:p>
      <text:p text:style-name="Horizontal_20_Line"/>
      <text:h text:style-name="Heading_20_2" text:outline-level="2">6.4.3.6 RSA‑KNOWNPQ</text:h>
      <text:p text:style-name="Text_20_body"><text:span text:style-name="Strong_20_Emphasis">Syntax</text:span></text:p>
      <text:p text:style-name="P1"><text:span text:style-name="Source_20_Text">RSA-KNOWNPQ &lt;p&gt; &lt;q&gt; &lt;e&gt; &lt;c&gt;</text:span></text:p>
      <text:p text:style-name="Text_20_body"><text:soft-page-break/><text:span text:style-name="Strong_20_Emphasis">Description</text:span> <text:line-break/>Reconstructs <text:span text:style-name="Strong_20_Emphasis">d</text:span>, computes <text:span text:style-name="Strong_20_Emphasis">φ(n)</text:span>, and decrypts the ciphertext.</text:p>
      <text:p text:style-name="Horizontal_20_Line"/>
      <text:h text:style-name="Heading_20_2" text:outline-level="2">6.4.3.7 RSA‑CHECKPQ</text:h>
      <text:p text:style-name="Text_20_body"><text:span text:style-name="Strong_20_Emphasis">Syntax</text:span></text:p>
      <text:p text:style-name="P1"><text:span text:style-name="Source_20_Text">RSA-CHECKPQ &lt;n&gt; &lt;p&gt; &lt;q&gt;</text:span></text:p>
      <text:p text:style-name="Text_20_body"><text:span text:style-name="Strong_20_Emphasis">Description</text:span> <text:line-break/>Validates that p × q = n.</text:p>
      <text:p text:style-name="Horizontal_20_Line"/>
      <text:h text:style-name="Heading_20_2" text:outline-level="2">6.4.3.8 RSA‑DFROMPQ</text:h>
      <text:p text:style-name="Text_20_body"><text:span text:style-name="Strong_20_Emphasis">Syntax</text:span></text:p>
      <text:p text:style-name="P1"><text:span text:style-name="Source_20_Text">RSA-DFROMPQ &lt;p&gt; &lt;q&gt; &lt;e&gt;</text:span></text:p>
      <text:p text:style-name="Text_20_body"><text:span text:style-name="Strong_20_Emphasis">Description</text:span> <text:line-break/>Computes the private exponent <text:span text:style-name="Strong_20_Emphasis">d</text:span>.</text:p>
      <text:p text:style-name="Horizontal_20_Line"/>
      <text:h text:style-name="Heading_20_2" text:outline-level="2">6.4.3.9 RSA‑ECM (optional)</text:h>
      <text:p text:style-name="Text_20_body"><text:span text:style-name="Strong_20_Emphasis">Syntax</text:span></text:p>
      <text:p text:style-name="P1"><text:span text:style-name="Source_20_Text">RSA-ECM &lt;n&gt;</text:span></text:p>
      <text:p text:style-name="Text_20_body"><text:span text:style-name="Strong_20_Emphasis">Description</text:span> <text:line-break/>Runs a lightweight ECM stage if compiled with GMP support.</text:p>
      <text:p text:style-name="Horizontal_20_Line"/>
      <text:h text:style-name="Heading_20_1" text:outline-level="1">6.4.4 Analytical Workflows</text:h>
      <text:p text:style-name="Text_20_body">Cryptanalysis tools are commonly used in:</text:p>
      <text:list xml:id="list15183113" text:style-name="L320">
        <text:list-item>
          <text:p text:style-name="P237"><text:span text:style-name="Strong_20_Emphasis">CTF crypto challenges</text:span> </text:p>
        </text:list-item>
        <text:list-item>
          <text:p text:style-name="P237"><text:span text:style-name="Strong_20_Emphasis">forensic decryption tasks</text:span> </text:p>
        </text:list-item>
        <text:list-item>
          <text:p text:style-name="P237"><text:span text:style-name="Strong_20_Emphasis">classical cipher analysis</text:span> </text:p>
        </text:list-item>
        <text:list-item>
          <text:p text:style-name="P237"><text:span text:style-name="Strong_20_Emphasis">RSA vulnerability exploitation</text:span> </text:p>
        </text:list-item>
        <text:list-item>
          <text:p text:style-name="P236"><text:span text:style-name="Strong_20_Emphasis">educational demonstrations</text:span> </text:p>
        </text:list-item>
      </text:list>
      <text:p text:style-name="Text_20_body">Typical workflow:</text:p>
      <text:list xml:id="list3766796603" text:style-name="L321">
        <text:list-item>
          <text:p text:style-name="P239"><text:soft-page-break/>Use STRING or SEARCH to identify ciphertext </text:p>
        </text:list-item>
        <text:list-item>
          <text:p text:style-name="P239">Use ENTROPY to confirm structure </text:p>
        </text:list-item>
        <text:list-item>
          <text:p text:style-name="P239">Use VIGAN or FREQ depending on cipher type </text:p>
        </text:list-item>
        <text:list-item>
          <text:p text:style-name="P239">Use VIGCRACK, MONO, or CAESAR to solve </text:p>
        </text:list-item>
        <text:list-item>
          <text:p text:style-name="P238">Use RSA tools for public‑key challenges </text:p>
        </text:list-item>
      </text:list>
      <text:p text:style-name="Horizontal_20_Line"/>
      <text:h text:style-name="Heading_20_1" text:outline-level="1">6.4.5 Summary</text:h>
      <text:p text:style-name="Text_20_body">The Cryptanalysis Engine provides Opus with a complete suite of tools for solving classical ciphers and RSA challenges. Through deterministic algorithms, quadgram scoring, IC analysis, and factorization routines, Opus offers analysts a transparent and powerful environment for cryptographic investigation.</text:p>
      <text:h text:style-name="Heading_20_1" text:outline-level="1">====================================</text:h>
      <text:h text:style-name="Heading_20_1" text:outline-level="1">6.5 BINARY INSPECTION TOOLS</text:h>
      <text:h text:style-name="Heading_20_1" text:outline-level="1">====================================</text:h>
      <text:p text:style-name="Text_20_body">Opus includes a set of lightweight binary‑inspection tools designed for CTF workflows, reverse‑engineering triage, and quick structural validation of ELF executables. These tools do not attempt to replace full disassemblers or analysis frameworks; instead, they provide fast, transparent insight into binary layout, PIE behavior, and return‑address timing.</text:p>
      <text:p text:style-name="Text_20_body">Binary inspection tools include:</text:p>
      <text:list xml:id="list1262740620" text:style-name="L324">
        <text:list-item>
          <text:p text:style-name="P241"><text:span text:style-name="Strong_20_Emphasis">ELFINFO</text:span> — inspect ELF structure </text:p>
        </text:list-item>
        <text:list-item>
          <text:p text:style-name="P241"><text:span text:style-name="Strong_20_Emphasis">PIECALC</text:span> — calculate PIE base from leaked addresses </text:p>
        </text:list-item>
        <text:list-item>
          <text:p text:style-name="P240"><text:span text:style-name="Strong_20_Emphasis">PIETIME</text:span> — estimate return‑address timing </text:p>
        </text:list-item>
      </text:list>
      <text:p text:style-name="Text_20_body">Each tool is documented in the sections below.</text:p>
      <text:p text:style-name="Horizontal_20_Line"/>
      <text:h text:style-name="Heading_20_1" text:outline-level="1">6.5.1 ELFINFO — ELF Structure Inspector</text:h>
      <text:p text:style-name="Text_20_body"><text:span text:style-name="Strong_20_Emphasis">Syntax</text:span></text:p>
      <text:p text:style-name="P1"><text:span text:style-name="Source_20_Text">ELFINFO &lt;file&gt;</text:span></text:p>
      <text:p text:style-name="Text_20_body"><text:span text:style-name="Strong_20_Emphasis">Description</text:span> <text:line-break/>ELFINFO parses the high‑level structure of an ELF binary and prints key metadata. It is designed for <text:soft-page-break/>quick triage and format validation, not deep disassembly. ELFINFO helps analysts confirm whether a file is a valid ELF, determine its architecture, and understand its segment and section layout.</text:p>
      <text:p text:style-name="Horizontal_20_Line"/>
      <text:h text:style-name="Heading_20_2" text:outline-level="2">6.5.1.1 Information Reported</text:h>
      <text:p text:style-name="Text_20_body">ELFINFO prints:</text:p>
      <text:list xml:id="list1079495675" text:style-name="L325">
        <text:list-item>
          <text:p text:style-name="P243"><text:span text:style-name="Strong_20_Emphasis">ELF class</text:span> (32‑bit or 64‑bit) </text:p>
        </text:list-item>
        <text:list-item>
          <text:p text:style-name="P243"><text:span text:style-name="Strong_20_Emphasis">endianness</text:span> </text:p>
        </text:list-item>
        <text:list-item>
          <text:p text:style-name="P243"><text:span text:style-name="Strong_20_Emphasis">machine architecture</text:span> </text:p>
        </text:list-item>
        <text:list-item>
          <text:p text:style-name="P243"><text:span text:style-name="Strong_20_Emphasis">entry point address</text:span> </text:p>
        </text:list-item>
        <text:list-item>
          <text:p text:style-name="P243"><text:span text:style-name="Strong_20_Emphasis">program header count</text:span> </text:p>
        </text:list-item>
        <text:list-item>
          <text:p text:style-name="P243"><text:span text:style-name="Strong_20_Emphasis">section header count</text:span> </text:p>
        </text:list-item>
        <text:list-item>
          <text:p text:style-name="P243"><text:span text:style-name="Strong_20_Emphasis">PIE / non‑PIE status</text:span> </text:p>
        </text:list-item>
        <text:list-item>
          <text:p text:style-name="P242"><text:span text:style-name="Strong_20_Emphasis">basic segment layout</text:span> </text:p>
        </text:list-item>
      </text:list>
      <text:p text:style-name="Text_20_body">This information is essential for exploitation workflows and binary triage.</text:p>
      <text:p text:style-name="Horizontal_20_Line"/>
      <text:h text:style-name="Heading_20_2" text:outline-level="2">6.5.1.2 Example Output</text:h>
      <text:p text:style-name="Preformatted_20_Text"><text:span text:style-name="Source_20_Text">[ELFINFO] File: chall</text:span></text:p>
      <text:p text:style-name="Preformatted_20_Text"><text:span text:style-name="Source_20_Text">[ELFINFO] ELF64, little-endian</text:span></text:p>
      <text:p text:style-name="Preformatted_20_Text"><text:span text:style-name="Source_20_Text">[ELFINFO] Machine: x86-64</text:span></text:p>
      <text:p text:style-name="Preformatted_20_Text"><text:span text:style-name="Source_20_Text">[ELFINFO] Entry point: 0x401080</text:span></text:p>
      <text:p text:style-name="Preformatted_20_Text"><text:span text:style-name="Source_20_Text">[ELFINFO] Program headers: 9</text:span></text:p>
      <text:p text:style-name="Preformatted_20_Text"><text:span text:style-name="Source_20_Text">[ELFINFO] Section headers: 31</text:span></text:p>
      <text:p text:style-name="P1"><text:span text:style-name="Source_20_Text">[ELFINFO] PIE: disabled</text:span></text:p>
      <text:p text:style-name="Horizontal_20_Line"/>
      <text:h text:style-name="Heading_20_1" text:outline-level="1">6.5.2 PIECALC — PIE Base Calculator</text:h>
      <text:p text:style-name="Text_20_body"><text:span text:style-name="Strong_20_Emphasis">Syntax</text:span></text:p>
      <text:p text:style-name="P1"><text:span text:style-name="Source_20_Text">PIECALC &lt;leaked_address&gt; &lt;symbol_offset&gt;</text:span></text:p>
      <text:p text:style-name="Text_20_body"><text:span text:style-name="Strong_20_Emphasis">Description</text:span> <text:line-break/>PIECALC computes the PIE (Position‑Independent Executable) base address using a leaked address and the known offset of a symbol. This is a common step in CTF exploitation workflows where ASLR must be bypassed.</text:p>
      <text:p text:style-name="Horizontal_20_Line"/>
      <text:h text:style-name="Heading_20_2" text:outline-level="2"><text:soft-page-break/>6.5.2.1 How It Works</text:h>
      <text:p text:style-name="Text_20_body">Given:</text:p>
      <text:list xml:id="list1072482667" text:style-name="L326">
        <text:list-item>
          <text:p text:style-name="P245">a leaked address (e.g., from a GOT entry or function pointer) </text:p>
        </text:list-item>
        <text:list-item>
          <text:p text:style-name="P244">the static offset of that symbol in the ELF </text:p>
        </text:list-item>
      </text:list>
      <text:p text:style-name="Text_20_body">PIECALC computes:</text:p>
      <text:p text:style-name="P1"><text:span text:style-name="Source_20_Text">base = leaked_address - symbol_offset</text:span></text:p>
      <text:p text:style-name="Text_20_body">It then prints the PIE base in hexadecimal.</text:p>
      <text:p text:style-name="Horizontal_20_Line"/>
      <text:h text:style-name="Heading_20_2" text:outline-level="2">6.5.2.2 Example Output</text:h>
      <text:p text:style-name="Preformatted_20_Text"><text:span text:style-name="Source_20_Text">[PIECALC] Leaked: 0x7ffff7dd18e0</text:span></text:p>
      <text:p text:style-name="Preformatted_20_Text"><text:span text:style-name="Source_20_Text">[PIECALC] Offset: 0x18e0</text:span></text:p>
      <text:p text:style-name="P1"><text:span text:style-name="Source_20_Text">[PIECALC] PIE base: 0x7ffff7dd0000</text:span></text:p>
      <text:p text:style-name="Horizontal_20_Line"/>
      <text:h text:style-name="Heading_20_1" text:outline-level="1">6.5.3 PIETIME — Return‑Address Timing Estimator</text:h>
      <text:p text:style-name="Text_20_body"><text:span text:style-name="Strong_20_Emphasis">Syntax</text:span></text:p>
      <text:p text:style-name="P1"><text:span text:style-name="Source_20_Text">PIETIME &lt;iterations&gt;</text:span></text:p>
      <text:p text:style-name="Text_20_body"><text:span text:style-name="Strong_20_Emphasis">Description</text:span> <text:line-break/>PIETIME performs repeated return‑address timing measurements to estimate the average time required for a return instruction to complete. This tool is primarily educational and is sometimes used in CTFs to demonstrate timing‑based exploitation concepts.</text:p>
      <text:p text:style-name="Horizontal_20_Line"/>
      <text:h text:style-name="Heading_20_2" text:outline-level="2">6.5.3.1 Behavior</text:h>
      <text:p text:style-name="Text_20_body">PIETIME:</text:p>
      <text:list xml:id="list2265336364" text:style-name="L327">
        <text:list-item>
          <text:p text:style-name="P247">runs a tight loop of return‑address operations </text:p>
        </text:list-item>
        <text:list-item>
          <text:p text:style-name="P247">measures timing using high‑resolution counters </text:p>
        </text:list-item>
        <text:list-item>
          <text:p text:style-name="P247">computes average cycle cost </text:p>
        </text:list-item>
        <text:list-item>
          <text:p text:style-name="P246">prints summary statistics </text:p>
        </text:list-item>
      </text:list>
      <text:p text:style-name="Text_20_body">This is not a side‑channel attack tool — it is a timing demonstrator.</text:p>
      <text:p text:style-name="Horizontal_20_Line"/>
      <text:h text:style-name="Heading_20_2" text:outline-level="2"><text:soft-page-break/>6.5.3.2 Example Output</text:h>
      <text:p text:style-name="Preformatted_20_Text"><text:span text:style-name="Source_20_Text">[PIETIME] Iterations: 1000000</text:span></text:p>
      <text:p text:style-name="P1"><text:span text:style-name="Source_20_Text">[PIETIME] Average return time: 32.4 cycles</text:span></text:p>
      <text:p text:style-name="Horizontal_20_Line"/>
      <text:h text:style-name="Heading_20_1" text:outline-level="1">6.5.4 Analytical Workflows</text:h>
      <text:p text:style-name="Text_20_body">Binary inspection tools are commonly used in:</text:p>
      <text:list xml:id="list2140007063" text:style-name="L328">
        <text:list-item>
          <text:p text:style-name="P249"><text:span text:style-name="Strong_20_Emphasis">CTF exploitation challenges</text:span> </text:p>
        </text:list-item>
        <text:list-item>
          <text:p text:style-name="P249"><text:span text:style-name="Strong_20_Emphasis">reverse‑engineering triage</text:span> </text:p>
        </text:list-item>
        <text:list-item>
          <text:p text:style-name="P249"><text:span text:style-name="Strong_20_Emphasis">PIE/ASLR bypass workflows</text:span> </text:p>
        </text:list-item>
        <text:list-item>
          <text:p text:style-name="P249"><text:span text:style-name="Strong_20_Emphasis">binary format validation</text:span> </text:p>
        </text:list-item>
        <text:list-item>
          <text:p text:style-name="P248"><text:span text:style-name="Strong_20_Emphasis">lightweight ELF inspection</text:span> </text:p>
        </text:list-item>
      </text:list>
      <text:p text:style-name="Text_20_body">Typical workflow:</text:p>
      <text:list xml:id="list3580844928" text:style-name="L329">
        <text:list-item>
          <text:p text:style-name="P251">Use <text:span text:style-name="Strong_20_Emphasis">ELFINFO</text:span> to confirm architecture and PIE status </text:p>
        </text:list-item>
        <text:list-item>
          <text:p text:style-name="P251">Use <text:span text:style-name="Strong_20_Emphasis">PIECALC</text:span> after obtaining a leaked address </text:p>
        </text:list-item>
        <text:list-item>
          <text:p text:style-name="P250">Use <text:span text:style-name="Strong_20_Emphasis">PIETIME</text:span> for timing‑based demonstrations or experiments </text:p>
        </text:list-item>
      </text:list>
      <text:p text:style-name="Text_20_body">These tools complement deeper analysis performed in external disassemblers.</text:p>
      <text:p text:style-name="Horizontal_20_Line"/>
      <text:h text:style-name="Heading_20_1" text:outline-level="1">6.5.5 Summary</text:h>
      <text:p text:style-name="Text_20_body">The Binary Inspection subsystem provides Opus with fast, transparent tools for analyzing ELF binaries, calculating PIE bases, and measuring return‑address timing. These tools are designed for CTF workflows and forensic triage, offering essential insight without the overhead of full disassembly frameworks.</text:p>
      <text:h text:style-name="Heading_20_1" text:outline-level="1">====================================</text:h>
      <text:h text:style-name="Heading_20_1" text:outline-level="1"><text:span text:style-name="Strong_20_Emphasis">6.6 UTILITY COMMANDS</text:span></text:h>
      <text:h text:style-name="Heading_20_1" text:outline-level="1">====================================</text:h>
      <text:p text:style-name="Text_20_body">Utility commands support the Opus environment by providing help, redisplaying menus, printing version information, clearing the screen, showing system time, and exiting the program. These commands do not operate on files or data; instead, they help analysts maintain orientation and control during long or complex workflows.</text:p>
      <text:p text:style-name="Text_20_body"><text:soft-page-break/>Utility commands include:</text:p>
      <text:list xml:id="list3799503091" text:style-name="L331">
        <text:list-item>
          <text:p text:style-name="P253"><text:span text:style-name="Strong_20_Emphasis">HELP</text:span> — display all commands with descriptions </text:p>
        </text:list-item>
        <text:list-item>
          <text:p text:style-name="P253"><text:span text:style-name="Strong_20_Emphasis">MENU</text:span> — redisplay the main Opus menu </text:p>
        </text:list-item>
        <text:list-item>
          <text:p text:style-name="P253"><text:span text:style-name="Strong_20_Emphasis">ABOUT</text:span> — show version and build information </text:p>
        </text:list-item>
        <text:list-item>
          <text:p text:style-name="P253"><text:span text:style-name="Strong_20_Emphasis">CLS</text:span> — clear the terminal screen </text:p>
        </text:list-item>
        <text:list-item>
          <text:p text:style-name="P253"><text:span text:style-name="Strong_20_Emphasis">TIME / T</text:span> — display current system time </text:p>
        </text:list-item>
        <text:list-item>
          <text:p text:style-name="P252"><text:span text:style-name="Strong_20_Emphasis">EXIT / Z</text:span> — exit Opus cleanly </text:p>
        </text:list-item>
      </text:list>
      <text:p text:style-name="Text_20_body">Each command is documented below.</text:p>
      <text:p text:style-name="Horizontal_20_Line"/>
      <text:h text:style-name="Heading_20_1" text:outline-level="1"><text:span text:style-name="Strong_20_Emphasis">6.6.1 HELP — Command Reference Overview</text:span></text:h>
      <text:p text:style-name="Text_20_body"><text:span text:style-name="Strong_20_Emphasis">Syntax</text:span></text:p>
      <text:p text:style-name="P1"><text:span text:style-name="Source_20_Text">HELP</text:span></text:p>
      <text:p text:style-name="Text_20_body"><text:span text:style-name="Strong_20_Emphasis">Description</text:span> <text:line-break/>Displays a complete list of available Opus commands, grouped by category. Unlike the startup menu, HELP can be invoked at any time, making it the primary discovery mechanism for both new and experienced analysts. The output is intentionally verbose and includes short descriptions for every command.</text:p>
      <text:p text:style-name="Text_20_body"><text:span text:style-name="Strong_20_Emphasis">Internal Behavior</text:span></text:p>
      <text:list xml:id="list3033497823" text:style-name="L332">
        <text:list-item>
          <text:p text:style-name="P255"><text:span text:style-name="Strong_20_Emphasis">category enumeration</text:span> </text:p>
        </text:list-item>
        <text:list-item>
          <text:p text:style-name="P255"><text:span text:style-name="Strong_20_Emphasis">command listing</text:span> </text:p>
        </text:list-item>
        <text:list-item>
          <text:p text:style-name="P255"><text:span text:style-name="Strong_20_Emphasis">description formatting</text:span> </text:p>
        </text:list-item>
        <text:list-item>
          <text:p text:style-name="P254"><text:span text:style-name="Strong_20_Emphasis">output pagination (if needed)</text:span> </text:p>
        </text:list-item>
      </text:list>
      <text:p text:style-name="Text_20_body"><text:span text:style-name="Strong_20_Emphasis">Example Output</text:span></text:p>
      <text:p text:style-name="Preformatted_20_Text"><text:span text:style-name="Source_20_Text">File Operations:</text:span></text:p>
      <text:p text:style-name="Preformatted_20_Text"><text:span text:style-name="Source_20_Text"><text:s text:c="2"/>OPEN <text:s text:c="5"/>Load a file for analysis</text:span></text:p>
      <text:p text:style-name="Preformatted_20_Text"><text:span text:style-name="Source_20_Text"><text:s text:c="2"/>CREATE <text:s text:c="3"/>Create a new file</text:span></text:p>
      <text:p text:style-name="Preformatted_20_Text"><text:span text:style-name="Source_20_Text"><text:s text:c="2"/>COPY <text:s text:c="5"/>Copy a file safely</text:span></text:p>
      <text:p text:style-name="Preformatted_20_Text"><text:span text:style-name="Source_20_Text"><text:s text:c="2"/>DEL <text:s text:c="6"/>Delete a file</text:span></text:p>
      <text:p text:style-name="Preformatted_20_Text"><text:span text:style-name="Source_20_Text"><text:s text:c="2"/>WIPEFS <text:s text:c="3"/>Wipe a directory tree</text:span></text:p>
      <text:p text:style-name="Preformatted_20_Text"><text:span text:style-name="Source_20_Text"><text:s text:c="2"/>READ <text:s text:c="5"/>Inspect raw file content</text:span></text:p>
      <text:p text:style-name="Preformatted_20_Text"><text:span text:style-name="Source_20_Text"><text:s text:c="2"/>EXTRACT <text:s text:c="2"/>Recursively extract archives</text:span></text:p>
      <text:p text:style-name="Preformatted_20_Text"/>
      <text:p text:style-name="Preformatted_20_Text"><text:span text:style-name="Source_20_Text">Forensic Analysis:</text:span></text:p>
      <text:p text:style-name="Preformatted_20_Text"><text:span text:style-name="Source_20_Text"><text:s text:c="2"/>ENTROPY <text:s text:c="2"/>Compute global and windowed entropy</text:span></text:p>
      <text:p text:style-name="Preformatted_20_Text"><text:span text:style-name="Source_20_Text"><text:s text:c="2"/>STRING <text:s text:c="3"/>Extract readable text and tokens</text:span></text:p>
      <text:p text:style-name="Preformatted_20_Text"><text:span text:style-name="Source_20_Text"><text:s text:c="2"/>SEARCH <text:s text:c="3"/>Pattern and signature matching</text:span></text:p>
      <text:p text:style-name="Preformatted_20_Text"><text:span text:style-name="Source_20_Text"><text:s text:c="2"/>LYZER <text:s text:c="4"/>Image anomaly inspection</text:span></text:p>
      <text:p text:style-name="Preformatted_20_Text"/>
      <text:p text:style-name="Preformatted_20_Text"><text:span text:style-name="Source_20_Text">Cryptanalysis:</text:span></text:p>
      <text:p text:style-name="Preformatted_20_Text"><text:span text:style-name="Source_20_Text"><text:s text:c="2"/>VIG <text:s text:c="6"/>Vigenère encrypt/decrypt</text:span></text:p>
      <text:p text:style-name="Preformatted_20_Text"><text:span text:style-name="Source_20_Text"><text:s text:c="2"/>VIGAN <text:s text:c="4"/>Vigenère analyzer</text:span></text:p>
      <text:p text:style-name="Preformatted_20_Text"><text:soft-page-break/><text:span text:style-name="Source_20_Text"><text:s text:c="2"/>VIGCRACK <text:s/>Automated Vigenère cracking</text:span></text:p>
      <text:p text:style-name="Preformatted_20_Text"><text:span text:style-name="Source_20_Text"><text:s text:c="2"/>MONO <text:s text:c="5"/>Substitution solver</text:span></text:p>
      <text:p text:style-name="Preformatted_20_Text"><text:span text:style-name="Source_20_Text"><text:s text:c="2"/>FREQ <text:s text:c="5"/>Frequency analysis</text:span></text:p>
      <text:p text:style-name="Preformatted_20_Text"><text:span text:style-name="Source_20_Text"><text:s text:c="2"/>CAESAR <text:s text:c="3"/>Caesar solver</text:span></text:p>
      <text:p text:style-name="Preformatted_20_Text"><text:span text:style-name="Source_20_Text"><text:s text:c="2"/>RSA-* <text:s text:c="4"/>RSA analysis tools</text:span></text:p>
      <text:p text:style-name="Preformatted_20_Text"/>
      <text:p text:style-name="Preformatted_20_Text"><text:span text:style-name="Source_20_Text">Binary Tools:</text:span></text:p>
      <text:p text:style-name="Preformatted_20_Text"><text:span text:style-name="Source_20_Text"><text:s text:c="2"/>ELFINFO <text:s text:c="2"/>Inspect ELF structure</text:span></text:p>
      <text:p text:style-name="Preformatted_20_Text"><text:span text:style-name="Source_20_Text"><text:s text:c="2"/>PIECALC <text:s text:c="2"/>Compute PIE base</text:span></text:p>
      <text:p text:style-name="Preformatted_20_Text"><text:span text:style-name="Source_20_Text"><text:s text:c="2"/>PIETIME <text:s text:c="2"/>Measure return timing</text:span></text:p>
      <text:p text:style-name="Preformatted_20_Text"/>
      <text:p text:style-name="Preformatted_20_Text"><text:span text:style-name="Source_20_Text">Designation Tools:</text:span></text:p>
      <text:p text:style-name="Preformatted_20_Text"><text:span text:style-name="Source_20_Text"><text:s text:c="2"/>DESIG <text:s text:c="6"/>Extract designation blocks</text:span></text:p>
      <text:p text:style-name="Preformatted_20_Text"><text:span text:style-name="Source_20_Text"><text:s text:c="2"/>DESIGDEC <text:s text:c="3"/>Decode designation content</text:span></text:p>
      <text:p text:style-name="Preformatted_20_Text"><text:span text:style-name="Source_20_Text"><text:s text:c="2"/>DESIGSOLVE <text:s/>Solve designation puzzles</text:span></text:p>
      <text:p text:style-name="Preformatted_20_Text"><text:span text:style-name="Source_20_Text"><text:s text:c="2"/>DESIGANALYZE Analyze designation structure</text:span></text:p>
      <text:p text:style-name="Preformatted_20_Text"/>
      <text:p text:style-name="Preformatted_20_Text"><text:span text:style-name="Source_20_Text">Utility:</text:span></text:p>
      <text:p text:style-name="Preformatted_20_Text"><text:span text:style-name="Source_20_Text"><text:s text:c="2"/>HELP <text:s text:c="5"/>Show all commands</text:span></text:p>
      <text:p text:style-name="Preformatted_20_Text"><text:span text:style-name="Source_20_Text"><text:s text:c="2"/>MENU <text:s text:c="5"/>Display main menu</text:span></text:p>
      <text:p text:style-name="Preformatted_20_Text"><text:span text:style-name="Source_20_Text"><text:s text:c="2"/>ABOUT <text:s text:c="4"/>Show version and build info</text:span></text:p>
      <text:p text:style-name="Preformatted_20_Text"><text:span text:style-name="Source_20_Text"><text:s text:c="2"/>CLS <text:s text:c="6"/>Clear screen</text:span></text:p>
      <text:p text:style-name="Preformatted_20_Text"><text:span text:style-name="Source_20_Text"><text:s text:c="2"/>TIME <text:s text:c="5"/>Show system time</text:span></text:p>
      <text:p text:style-name="P1"><text:span text:style-name="Source_20_Text"><text:s text:c="2"/>EXIT <text:s text:c="5"/>Exit Opus</text:span></text:p>
      <text:p text:style-name="Text_20_body"><text:span text:style-name="Strong_20_Emphasis">Edge Cases</text:span></text:p>
      <text:list xml:id="list1780147610" text:style-name="L333">
        <text:list-item>
          <text:p text:style-name="P257"><text:span text:style-name="Strong_20_Emphasis">Very small terminals</text:span> trigger pagination </text:p>
        </text:list-item>
        <text:list-item>
          <text:p text:style-name="P256"><text:span text:style-name="Strong_20_Emphasis">New commands</text:span> appear automatically </text:p>
        </text:list-item>
      </text:list>
      <text:p text:style-name="Horizontal_20_Line"/>
      <text:h text:style-name="Heading_20_1" text:outline-level="1"><text:span text:style-name="Strong_20_Emphasis">6.6.2 MENU — Display Main Menu</text:span></text:h>
      <text:p text:style-name="Text_20_body"><text:span text:style-name="Strong_20_Emphasis">Syntax</text:span></text:p>
      <text:p text:style-name="P1"><text:span text:style-name="Source_20_Text">MENU</text:span></text:p>
      <text:p text:style-name="Text_20_body"><text:span text:style-name="Strong_20_Emphasis">Description</text:span> <text:line-break/>Redisplays the main Opus menu — the same structured overview shown at startup. This is useful when output has scrolled far, or when analysts want a visual reset. The menu reinforces the structure of the toolkit and provides a high‑level map of available capabilities.</text:p>
      <text:p text:style-name="Text_20_body"><text:span text:style-name="Strong_20_Emphasis">Internal Behavior</text:span></text:p>
      <text:list xml:id="list3029279475" text:style-name="L334">
        <text:list-item>
          <text:p text:style-name="P259"><text:span text:style-name="Strong_20_Emphasis">menu template rendering</text:span> </text:p>
        </text:list-item>
        <text:list-item>
          <text:p text:style-name="P259"><text:span text:style-name="Strong_20_Emphasis">category grouping</text:span> </text:p>
        </text:list-item>
        <text:list-item>
          <text:p text:style-name="P258"><text:span text:style-name="Strong_20_Emphasis">alignment and spacing</text:span> </text:p>
        </text:list-item>
      </text:list>
      <text:p text:style-name="Text_20_body"><text:span text:style-name="Strong_20_Emphasis">Example Output</text:span></text:p>
      <text:p text:style-name="Preformatted_20_Text"><text:span text:style-name="Source_20_Text">==================== OPUS MENU ====================</text:span></text:p>
      <text:p text:style-name="Preformatted_20_Text"><text:span text:style-name="Source_20_Text">File Operations</text:span></text:p>
      <text:p text:style-name="Preformatted_20_Text"><text:span text:style-name="Source_20_Text">Forensic Analysis</text:span></text:p>
      <text:p text:style-name="Preformatted_20_Text"><text:soft-page-break/><text:span text:style-name="Source_20_Text">Cryptanalysis</text:span></text:p>
      <text:p text:style-name="Preformatted_20_Text"><text:span text:style-name="Source_20_Text">Binary Tools</text:span></text:p>
      <text:p text:style-name="Preformatted_20_Text"><text:span text:style-name="Source_20_Text">Designation Tools</text:span></text:p>
      <text:p text:style-name="Preformatted_20_Text"><text:span text:style-name="Source_20_Text">Utility Commands</text:span></text:p>
      <text:p text:style-name="P1"><text:span text:style-name="Source_20_Text">===================================================</text:span></text:p>
      <text:p text:style-name="Text_20_body"><text:span text:style-name="Strong_20_Emphasis">Edge Cases</text:span> <text:line-break/>None — MENU is intentionally simple and robust.</text:p>
      <text:p text:style-name="Horizontal_20_Line"/>
      <text:h text:style-name="Heading_20_1" text:outline-level="1"><text:span text:style-name="Strong_20_Emphasis">6.6.3 ABOUT — Opus Version &amp; Build Info</text:span></text:h>
      <text:p text:style-name="Text_20_body"><text:span text:style-name="Strong_20_Emphasis">Syntax</text:span></text:p>
      <text:p text:style-name="P1"><text:span text:style-name="Source_20_Text">ABOUT</text:span></text:p>
      <text:p text:style-name="Text_20_body"><text:span text:style-name="Strong_20_Emphasis">Description</text:span> <text:line-break/>Prints detailed information about the Opus build, including version number, build date, compiler version, enabled modules, and library dependencies. This is essential for reproducibility, debugging, and CTF writeups.</text:p>
      <text:p text:style-name="Text_20_body"><text:span text:style-name="Strong_20_Emphasis">Internal Behavior</text:span></text:p>
      <text:list xml:id="list555253430" text:style-name="L335">
        <text:list-item>
          <text:p text:style-name="P261"><text:span text:style-name="Strong_20_Emphasis">compile‑time macro expansion</text:span> </text:p>
        </text:list-item>
        <text:list-item>
          <text:p text:style-name="P261"><text:span text:style-name="Strong_20_Emphasis">library version queries</text:span> </text:p>
        </text:list-item>
        <text:list-item>
          <text:p text:style-name="P260"><text:span text:style-name="Strong_20_Emphasis">module enumeration</text:span> </text:p>
        </text:list-item>
      </text:list>
      <text:p text:style-name="Text_20_body"><text:span text:style-name="Strong_20_Emphasis">Example Output</text:span></text:p>
      <text:p text:style-name="Preformatted_20_Text"><text:span text:style-name="Source_20_Text">Opus v1.0</text:span></text:p>
      <text:p text:style-name="Preformatted_20_Text"><text:span text:style-name="Source_20_Text">Built: Jan 16 2026</text:span></text:p>
      <text:p text:style-name="Preformatted_20_Text"><text:span text:style-name="Source_20_Text">Compiler: GCC 13.2.0</text:span></text:p>
      <text:p text:style-name="Preformatted_20_Text"><text:span text:style-name="Source_20_Text">Modules Enabled:</text:span></text:p>
      <text:p text:style-name="Preformatted_20_Text"><text:span text:style-name="Source_20_Text"><text:s/>- Extraction Engine</text:span></text:p>
      <text:p text:style-name="Preformatted_20_Text"><text:span text:style-name="Source_20_Text"><text:s/>- Image Analysis Engine</text:span></text:p>
      <text:p text:style-name="Preformatted_20_Text"><text:span text:style-name="Source_20_Text"><text:s/>- Cryptanalysis Engine</text:span></text:p>
      <text:p text:style-name="Preformatted_20_Text"><text:span text:style-name="Source_20_Text"><text:s/>- RSA Tools</text:span></text:p>
      <text:p text:style-name="Preformatted_20_Text"><text:span text:style-name="Source_20_Text">Libraries:</text:span></text:p>
      <text:p text:style-name="Preformatted_20_Text"><text:span text:style-name="Source_20_Text"><text:s/>- GMP</text:span></text:p>
      <text:p text:style-name="P1"><text:span text:style-name="Source_20_Text"><text:s/>- libjpeg</text:span></text:p>
      <text:p text:style-name="Text_20_body"><text:span text:style-name="Strong_20_Emphasis">Edge Cases</text:span></text:p>
      <text:list xml:id="list2443161709" text:style-name="L336">
        <text:list-item>
          <text:p text:style-name="P262">Missing libraries trigger warnings </text:p>
        </text:list-item>
      </text:list>
      <text:p text:style-name="Horizontal_20_Line"/>
      <text:h text:style-name="Heading_20_1" text:outline-level="1"><text:span text:style-name="Strong_20_Emphasis">6.6.4 CLS — Clear Screen</text:span></text:h>
      <text:p text:style-name="Text_20_body"><text:span text:style-name="Strong_20_Emphasis">Syntax</text:span></text:p>
      <text:p text:style-name="P1"><text:soft-page-break/><text:span text:style-name="Source_20_Text">CLS</text:span></text:p>
      <text:p text:style-name="Text_20_body"><text:span text:style-name="Strong_20_Emphasis">Description</text:span> <text:line-break/>Clears the terminal screen using ANSI escape sequences. This is helpful during long analysis sessions where output scrolls rapidly and visual clarity is needed.</text:p>
      <text:p text:style-name="Text_20_body"><text:span text:style-name="Strong_20_Emphasis">Internal Behavior</text:span></text:p>
      <text:list xml:id="list3423602199" text:style-name="L337">
        <text:list-item>
          <text:p text:style-name="P264"><text:span text:style-name="Strong_20_Emphasis">ANSI clear‑screen sequence</text:span> </text:p>
        </text:list-item>
        <text:list-item>
          <text:p text:style-name="P263"><text:span text:style-name="Strong_20_Emphasis">cursor reset</text:span> </text:p>
        </text:list-item>
      </text:list>
      <text:p text:style-name="Text_20_body"><text:span text:style-name="Strong_20_Emphasis">Edge Cases</text:span></text:p>
      <text:list xml:id="list2975148845" text:style-name="L338">
        <text:list-item>
          <text:p text:style-name="P265">Non‑ANSI terminals may ignore the command </text:p>
        </text:list-item>
      </text:list>
      <text:p text:style-name="Horizontal_20_Line"/>
      <text:h text:style-name="Heading_20_1" text:outline-level="1"><text:span text:style-name="Strong_20_Emphasis">6.6.5 TIME / T — Display System Time</text:span></text:h>
      <text:p text:style-name="Text_20_body"><text:span text:style-name="Strong_20_Emphasis">Syntax</text:span></text:p>
      <text:p text:style-name="P1"><text:span text:style-name="Source_20_Text">TIME</text:span></text:p>
      <text:p text:style-name="Text_20_body">or</text:p>
      <text:p text:style-name="P1"><text:span text:style-name="Source_20_Text">T</text:span></text:p>
      <text:p text:style-name="Text_20_body"><text:span text:style-name="Strong_20_Emphasis">Description</text:span> <text:line-break/>Prints the current system time. Useful for timestamping analysis steps, documenting workflows, and correlating events.</text:p>
      <text:p text:style-name="Text_20_body"><text:span text:style-name="Strong_20_Emphasis">Internal Behavior</text:span></text:p>
      <text:list xml:id="list3904255687" text:style-name="L339">
        <text:list-item>
          <text:p text:style-name="P267"><text:span text:style-name="Strong_20_Emphasis">system time query</text:span> </text:p>
        </text:list-item>
        <text:list-item>
          <text:p text:style-name="P266"><text:span text:style-name="Strong_20_Emphasis">locale‑aware formatting</text:span> </text:p>
        </text:list-item>
      </text:list>
      <text:p text:style-name="Text_20_body"><text:span text:style-name="Strong_20_Emphasis">Example Output</text:span></text:p>
      <text:p text:style-name="P1"><text:span text:style-name="Source_20_Text">Current Time: 2026-01-16 22:46:03 EST</text:span></text:p>
      <text:p text:style-name="Horizontal_20_Line"/>
      <text:h text:style-name="Heading_20_1" text:outline-level="1"><text:span text:style-name="Strong_20_Emphasis">6.6.6 EXIT / Z — Exit Opus</text:span></text:h>
      <text:p text:style-name="Text_20_body"><text:span text:style-name="Strong_20_Emphasis">Syntax</text:span></text:p>
      <text:p text:style-name="P1"><text:span text:style-name="Source_20_Text">EXIT</text:span></text:p>
      <text:p text:style-name="Text_20_body">or</text:p>
      <text:p text:style-name="P1"><text:span text:style-name="Source_20_Text">Z</text:span></text:p>
      <text:p text:style-name="Text_20_body"><text:soft-page-break/><text:span text:style-name="Strong_20_Emphasis">Description</text:span> <text:line-break/>Shuts down Opus cleanly. This includes terminating background threads, flushing buffers, closing file handles, and printing a shutdown message. The alias <text:span text:style-name="Strong_20_Emphasis">Z</text:span> exists for speed during rapid CTF workflows.</text:p>
      <text:p text:style-name="Text_20_body"><text:span text:style-name="Strong_20_Emphasis">Internal Behavior</text:span></text:p>
      <text:list xml:id="list2938985398" text:style-name="L340">
        <text:list-item>
          <text:p text:style-name="P269"><text:span text:style-name="Strong_20_Emphasis">thread pool shutdown</text:span> </text:p>
        </text:list-item>
        <text:list-item>
          <text:p text:style-name="P269"><text:span text:style-name="Strong_20_Emphasis">resource cleanup</text:span> </text:p>
        </text:list-item>
        <text:list-item>
          <text:p text:style-name="P268"><text:span text:style-name="Strong_20_Emphasis">terminal reset</text:span> </text:p>
        </text:list-item>
      </text:list>
      <text:p text:style-name="Text_20_body"><text:span text:style-name="Strong_20_Emphasis">Example Output</text:span></text:p>
      <text:p text:style-name="Preformatted_20_Text"><text:span text:style-name="Source_20_Text">Shutting down Opus...</text:span></text:p>
      <text:p text:style-name="P1"><text:span text:style-name="Source_20_Text">Goodbye.</text:span></text:p>
      <text:p text:style-name="Horizontal_20_Line"><text:span text:style-name="Strong_20_Emphasis"/></text:p>
      <text:h text:style-name="Heading_20_1" text:outline-level="1"><text:span text:style-name="Strong_20_Emphasis">6.6.7 Summary</text:span></text:h>
      <text:p text:style-name="Text_20_body">The Utility Commands subsystem provides the essential environmental controls that make Opus comfortable and efficient to use during long investigative sessions. These commands do not analyze data; instead, they support navigation, orientation, and session management. Whether redisplaying the menu, clearing the screen, checking the time, reviewing available commands, or exiting cleanly, these tools ensure that analysts remain grounded and in control throughout their workflow.</text:p>
      <text:p text:style-name="Preformatted_20_Text"/>
      <text:h text:style-name="Heading_20_1" text:outline-level="1">====================================</text:h>
      <text:h text:style-name="Heading_20_1" text:outline-level="1"><text:span text:style-name="Strong_20_Emphasis">6.7 DESIGNATION TOOLS</text:span></text:h>
      <text:h text:style-name="Heading_20_1" text:outline-level="1">====================================</text:h>
      <text:p text:style-name="Text_20_body">Designation tools provide Opus with the ability to extract, decode, analyze, and solve designation blocks. These blocks typically contain symbolic fields, numeric values, or rule‑based structures that require interpretation. The subsystem does not guess or infer meaning; it processes designation data exactly as defined by the block’s format.</text:p>
      <text:p text:style-name="Text_20_body">Designation tools include:</text:p>
      <text:list xml:id="list41194067" text:style-name="L342">
        <text:list-item>
          <text:p text:style-name="P271"><text:span text:style-name="Strong_20_Emphasis">DESIG</text:span> — extract designation blocks </text:p>
        </text:list-item>
        <text:list-item>
          <text:p text:style-name="P271"><text:span text:style-name="Strong_20_Emphasis">DESIGDEC</text:span> — decode designation content </text:p>
        </text:list-item>
        <text:list-item>
          <text:p text:style-name="P271"><text:span text:style-name="Strong_20_Emphasis">DESIGSOLVE</text:span> — solve designation puzzles </text:p>
        </text:list-item>
        <text:list-item>
          <text:p text:style-name="P270"><text:span text:style-name="Strong_20_Emphasis">DESIGANALYZE</text:span> — analyze designation structure </text:p>
        </text:list-item>
      </text:list>
      <text:p text:style-name="Text_20_body">Each tool is documented below.</text:p>
      <text:p text:style-name="Horizontal_20_Line"><text:soft-page-break/></text:p>
      <text:h text:style-name="Heading_20_1" text:outline-level="1"><text:span text:style-name="Strong_20_Emphasis">6.7.1 DESIG — Extract Designation Blocks</text:span></text:h>
      <text:p text:style-name="Text_20_body"><text:span text:style-name="Strong_20_Emphasis">Syntax</text:span></text:p>
      <text:p text:style-name="P1"><text:span text:style-name="Source_20_Text">DESIG &lt;file&gt;</text:span></text:p>
      <text:p text:style-name="Text_20_body"><text:span text:style-name="Strong_20_Emphasis">Description</text:span> <text:line-break/>Scans a file for designation blocks and extracts them into standalone files. DESIG is typically the first step in a designation workflow, isolating the raw block for further processing.</text:p>
      <text:p text:style-name="Text_20_body"><text:span text:style-name="Strong_20_Emphasis">Internal Behavior</text:span></text:p>
      <text:list xml:id="list1877702287" text:style-name="L343">
        <text:list-item>
          <text:p text:style-name="P273"><text:span text:style-name="Strong_20_Emphasis">pattern‑based detection</text:span> </text:p>
        </text:list-item>
        <text:list-item>
          <text:p text:style-name="P273"><text:span text:style-name="Strong_20_Emphasis">offset reporting</text:span> </text:p>
        </text:list-item>
        <text:list-item>
          <text:p text:style-name="P273"><text:span text:style-name="Strong_20_Emphasis">raw block extraction</text:span> </text:p>
        </text:list-item>
        <text:list-item>
          <text:p text:style-name="P272"><text:span text:style-name="Strong_20_Emphasis">carved file creation</text:span> </text:p>
        </text:list-item>
      </text:list>
      <text:p text:style-name="Text_20_body"><text:span text:style-name="Strong_20_Emphasis">Example Output</text:span></text:p>
      <text:p text:style-name="Preformatted_20_Text"><text:span text:style-name="Source_20_Text">[DESIG] Found designation block at offset 0x1A20</text:span></text:p>
      <text:p text:style-name="P1"><text:span text:style-name="Source_20_Text">[DESIG] Extracted to desig_0001.bin</text:span></text:p>
      <text:p text:style-name="Horizontal_20_Line"/>
      <text:h text:style-name="Heading_20_1" text:outline-level="1"><text:span text:style-name="Strong_20_Emphasis">6.7.2 DESIGDEC — Decode Designation Content</text:span></text:h>
      <text:p text:style-name="Text_20_body"><text:span text:style-name="Strong_20_Emphasis">Syntax</text:span></text:p>
      <text:p text:style-name="P1"><text:span text:style-name="Source_20_Text">DESIGDEC &lt;file&gt;</text:span></text:p>
      <text:p text:style-name="Text_20_body"><text:span text:style-name="Strong_20_Emphasis">Description</text:span> <text:line-break/>Decodes a raw designation block into its structured fields. This may include symbolic identifiers, numeric values, or encoded markers depending on the block’s format.</text:p>
      <text:p text:style-name="Text_20_body"><text:span text:style-name="Strong_20_Emphasis">Internal Behavior</text:span></text:p>
      <text:list xml:id="list3529460423" text:style-name="L344">
        <text:list-item>
          <text:p text:style-name="P275"><text:span text:style-name="Strong_20_Emphasis">format validation</text:span> </text:p>
        </text:list-item>
        <text:list-item>
          <text:p text:style-name="P275"><text:span text:style-name="Strong_20_Emphasis">field extraction</text:span> </text:p>
        </text:list-item>
        <text:list-item>
          <text:p text:style-name="P275"><text:span text:style-name="Strong_20_Emphasis">symbol decoding</text:span> </text:p>
        </text:list-item>
        <text:list-item>
          <text:p text:style-name="P274"><text:span text:style-name="Strong_20_Emphasis">structured output formatting</text:span> </text:p>
        </text:list-item>
      </text:list>
      <text:p text:style-name="Text_20_body"><text:span text:style-name="Strong_20_Emphasis">Example Output</text:span></text:p>
      <text:p text:style-name="Preformatted_20_Text"><text:span text:style-name="Source_20_Text">[DESIGDEC] Block: desig_0001.bin</text:span></text:p>
      <text:p text:style-name="Preformatted_20_Text"><text:span text:style-name="Source_20_Text">[DESIGDEC] Field A: 0x14</text:span></text:p>
      <text:p text:style-name="Preformatted_20_Text"><text:span text:style-name="Source_20_Text">[DESIGDEC] Field B: SYMBOL_X</text:span></text:p>
      <text:p text:style-name="P1"><text:soft-page-break/><text:span text:style-name="Source_20_Text">[DESIGDEC] Field C: 42</text:span></text:p>
      <text:p text:style-name="Horizontal_20_Line"/>
      <text:h text:style-name="Heading_20_1" text:outline-level="1"><text:span text:style-name="Strong_20_Emphasis">6.7.3 DESIGSOLVE — Solve Designation Puzzles</text:span></text:h>
      <text:p text:style-name="Text_20_body"><text:span text:style-name="Strong_20_Emphasis">Syntax</text:span></text:p>
      <text:p text:style-name="P1"><text:span text:style-name="Source_20_Text">DESIGSOLVE &lt;file&gt;</text:span></text:p>
      <text:p text:style-name="Text_20_body"><text:span text:style-name="Strong_20_Emphasis">Description</text:span> <text:line-break/>Solves a designation puzzle by evaluating the rules encoded in the block. This may involve symbolic resolution, ordering constraints, or arithmetic relationships.</text:p>
      <text:p text:style-name="Text_20_body"><text:span text:style-name="Strong_20_Emphasis">Internal Behavior</text:span></text:p>
      <text:list xml:id="list1559154697" text:style-name="L345">
        <text:list-item>
          <text:p text:style-name="P277"><text:span text:style-name="Strong_20_Emphasis">rule evaluation</text:span> </text:p>
        </text:list-item>
        <text:list-item>
          <text:p text:style-name="P277"><text:span text:style-name="Strong_20_Emphasis">symbolic resolution</text:span> </text:p>
        </text:list-item>
        <text:list-item>
          <text:p text:style-name="P277"><text:span text:style-name="Strong_20_Emphasis">constraint solving</text:span> </text:p>
        </text:list-item>
        <text:list-item>
          <text:p text:style-name="P276"><text:span text:style-name="Strong_20_Emphasis">solution extraction</text:span> </text:p>
        </text:list-item>
      </text:list>
      <text:p text:style-name="Text_20_body"><text:span text:style-name="Strong_20_Emphasis">Example Output</text:span></text:p>
      <text:p text:style-name="Preformatted_20_Text"><text:span text:style-name="Source_20_Text">[DESIGSOLVE] Solving desig_0001.bin</text:span></text:p>
      <text:p text:style-name="Preformatted_20_Text"><text:span text:style-name="Source_20_Text">[DESIGSOLVE] Rule 1 satisfied</text:span></text:p>
      <text:p text:style-name="Preformatted_20_Text"><text:span text:style-name="Source_20_Text">[DESIGSOLVE] Rule 2 satisfied</text:span></text:p>
      <text:p text:style-name="P1"><text:span text:style-name="Source_20_Text">[DESIGSOLVE] Solution: KEY=73</text:span></text:p>
      <text:p text:style-name="Horizontal_20_Line"/>
      <text:h text:style-name="Heading_20_1" text:outline-level="1"><text:span text:style-name="Strong_20_Emphasis">6.7.4 DESIGANALYZE — Structural Analysis</text:span></text:h>
      <text:p text:style-name="Text_20_body"><text:span text:style-name="Strong_20_Emphasis">Syntax</text:span></text:p>
      <text:p text:style-name="P1"><text:span text:style-name="Source_20_Text">DESIGANALYZE &lt;file&gt;</text:span></text:p>
      <text:p text:style-name="Text_20_body"><text:span text:style-name="Strong_20_Emphasis">Description</text:span> <text:line-break/>Performs a structural analysis of a designation block, printing metadata, field relationships, and internal layout. This tool is useful for understanding unfamiliar formats or debugging malformed blocks.</text:p>
      <text:p text:style-name="Text_20_body"><text:span text:style-name="Strong_20_Emphasis">Internal Behavior</text:span></text:p>
      <text:list xml:id="list1572998407" text:style-name="L346">
        <text:list-item>
          <text:p text:style-name="P279"><text:span text:style-name="Strong_20_Emphasis">field enumeration</text:span> </text:p>
        </text:list-item>
        <text:list-item>
          <text:p text:style-name="P279"><text:span text:style-name="Strong_20_Emphasis">relationship mapping</text:span> </text:p>
        </text:list-item>
        <text:list-item>
          <text:p text:style-name="P279"><text:span text:style-name="Strong_20_Emphasis">size and offset reporting</text:span> </text:p>
        </text:list-item>
        <text:list-item>
          <text:p text:style-name="P278"><text:span text:style-name="Strong_20_Emphasis">consistency checks</text:span> </text:p>
        </text:list-item>
      </text:list>
      <text:p text:style-name="Text_20_body"><text:span text:style-name="Strong_20_Emphasis">Example Output</text:span></text:p>
      <text:p text:style-name="Preformatted_20_Text"><text:soft-page-break/><text:span text:style-name="Source_20_Text">[DESIGANALYZE] Block: desig_0001.bin</text:span></text:p>
      <text:p text:style-name="Preformatted_20_Text"><text:span text:style-name="Source_20_Text">[DESIGANALYZE] Total fields: 3</text:span></text:p>
      <text:p text:style-name="Preformatted_20_Text"><text:span text:style-name="Source_20_Text">[DESIGANALYZE] Field A @ offset 0x00 (1 byte)</text:span></text:p>
      <text:p text:style-name="Preformatted_20_Text"><text:span text:style-name="Source_20_Text">[DESIGANALYZE] Field B @ offset 0x01 (1 byte)</text:span></text:p>
      <text:p text:style-name="P1"><text:span text:style-name="Source_20_Text">[DESIGANALYZE] Field C @ offset 0x02 (2 bytes)</text:span></text:p>
      <text:p text:style-name="Horizontal_20_Line"/>
      <text:h text:style-name="Heading_20_1" text:outline-level="1"><text:span text:style-name="Strong_20_Emphasis">6.7.5 Analytical Workflows</text:span></text:h>
      <text:p text:style-name="Text_20_body">Designation tools are commonly used in:</text:p>
      <text:list xml:id="list3857464419" text:style-name="L347">
        <text:list-item>
          <text:p text:style-name="P281"><text:span text:style-name="Strong_20_Emphasis">CTF puzzle challenges</text:span> </text:p>
        </text:list-item>
        <text:list-item>
          <text:p text:style-name="P281"><text:span text:style-name="Strong_20_Emphasis">structured forensic puzzles</text:span> </text:p>
        </text:list-item>
        <text:list-item>
          <text:p text:style-name="P281"><text:span text:style-name="Strong_20_Emphasis">symbolic decoding tasks</text:span> </text:p>
        </text:list-item>
        <text:list-item>
          <text:p text:style-name="P280"><text:span text:style-name="Strong_20_Emphasis">custom binary formats</text:span> </text:p>
        </text:list-item>
      </text:list>
      <text:p text:style-name="Text_20_body">Typical workflow:</text:p>
      <text:list xml:id="list3423292452" text:style-name="L348">
        <text:list-item>
          <text:p text:style-name="P283">Use <text:span text:style-name="Strong_20_Emphasis">DESIG</text:span> to extract blocks </text:p>
        </text:list-item>
        <text:list-item>
          <text:p text:style-name="P283">Use <text:span text:style-name="Strong_20_Emphasis">DESIGDEC</text:span> to decode fields </text:p>
        </text:list-item>
        <text:list-item>
          <text:p text:style-name="P283">Use <text:span text:style-name="Strong_20_Emphasis">DESIGANALYZE</text:span> to understand structure </text:p>
        </text:list-item>
        <text:list-item>
          <text:p text:style-name="P282">Use <text:span text:style-name="Strong_20_Emphasis">DESIGSOLVE</text:span> to compute the final answer </text:p>
        </text:list-item>
      </text:list>
      <text:p text:style-name="Text_20_body">This mirrors Opus’s recursive, layered analysis philosophy.</text:p>
      <text:p text:style-name="Horizontal_20_Line"/>
      <text:h text:style-name="Heading_20_1" text:outline-level="1"><text:span text:style-name="Strong_20_Emphasis">6.7.6 Summary</text:span></text:h>
      <text:p text:style-name="Text_20_body">The Designation subsystem provides Opus with a focused toolkit for handling structured designation blocks. Through extraction, decoding, structural analysis, and rule‑based solving, these tools enable analysts to navigate symbolic and puzzle‑driven challenges with clarity and precision. Lightweight and deterministic, the subsystem integrates seamlessly into Opus’s broader investigative workflow.</text:p>
      <text:p text:style-name="Horizontal_20_Line"><text:span text:style-name="Source_20_Text"/></text:p>
      <text:h text:style-name="Heading_20_1" text:outline-level="1"><text:soft-page-break/></text:h>
      <text:h text:style-name="Heading_20_1" text:outline-level="1"/>
      <text:h text:style-name="Heading_20_1" text:outline-level="1"><text:span text:style-name="Source_20_Text"/></text:h>
      <text:h text:style-name="Heading_20_3" text:outline-level="3"><text:span text:style-name="Source_20_Text"/></text:h>
      <text:h text:style-name="Heading_20_1" text:outline-level="1">====================================</text:h>
      <text:h text:style-name="Heading_20_1" text:outline-level="1"><text:span text:style-name="Strong_20_Emphasis">CHAPTER 7 — SUBSYSTEMS (DEEP TECHNICAL)</text:span></text:h>
      <text:h text:style-name="Heading_20_1" text:outline-level="1">====================================</text:h>
      <text:p text:style-name="Text_20_body"/>
      <text:p text:style-name="Text_20_body">Opus is built on a collection of tightly engineered subsystems, each responsible for a specific domain of forensic or cryptanalytic functionality. While Chapter 6 documented the <text:span text:style-name="Emphasis">commands</text:span> that analysts interact with, this chapter documents the <text:span text:style-name="Emphasis">engines</text:span> that power those commands. These subsystems operate beneath the surface, coordinating complex workflows, enforcing safety guarantees, and providing the analytical depth that defines Opus.</text:p>
      <text:p text:style-name="Text_20_body">This chapter is intentionally long, dense, and deeply explanatory. It is designed to give analysts a complete mental model of how Opus behaves internally — not at the code level, but at the architectural and conceptual level. Understanding these subsystems is essential for mastering Opus, especially when working with multi‑layer extraction, entropy interpretation, JPEG steganalysis, or cryptanalysis refinement.</text:p>
      <text:h text:style-name="Heading_20_1" text:outline-level="1"><text:soft-page-break/>====================================</text:h>
      <text:h text:style-name="Heading_20_1" text:outline-level="1"><text:span text:style-name="Strong_20_Emphasis">7.1 EXTRACTION ENGINE</text:span></text:h>
      <text:h text:style-name="Heading_20_1" text:outline-level="1">====================================</text:h>
      <text:p text:style-name="Text_20_body">The Extraction Engine is the beating heart of Opus — the subsystem responsible for recursively unwrapping complex, layered, and obfuscated data structures. It is designed to handle the messy realities of real‑world forensic work, where files are rarely what they appear to be and where meaningful content is often buried beneath multiple layers of compression, encoding, or corruption.</text:p>
      <text:p text:style-name="Text_20_body">This section provides a deep, narrative‑heavy explanation of how the Extraction Engine operates, why it is designed the way it is, and how analysts can interpret its behavior.</text:p>
      <text:p text:style-name="Horizontal_20_Line"/>
      <text:h text:style-name="Heading_20_2" text:outline-level="2"><text:span text:style-name="Strong_20_Emphasis">7.1.1 Philosophy of the Extraction Engine</text:span></text:h>
      <text:p text:style-name="Text_20_body">The Extraction Engine is built around several core principles:</text:p>
      <text:list xml:id="list815925506" text:style-name="L118">
        <text:list-item>
          <text:p text:style-name="P20"><text:a xlink:type="simple" xlink:href="guide://action?prefill=Tell%20me%20more%20about%3A%20Recursion%20as%20a%20first‑class%20concept" text:style-name="Internet_20_link" text:visited-style-name="Visited_20_Internet_20_Link"><text:span text:style-name="Strong_20_Emphasis">Recursion as a first‑class concept</text:span></text:a> </text:p>
        </text:list-item>
        <text:list-item>
          <text:p text:style-name="P20"><text:a xlink:type="simple" xlink:href="guide://action?prefill=Tell%20me%20more%20about%3A%20Safety%20through%20controlled%20file%20operations" text:style-name="Internet_20_link" text:visited-style-name="Visited_20_Internet_20_Link"><text:span text:style-name="Strong_20_Emphasis">Safety through controlled file operations</text:span></text:a> </text:p>
        </text:list-item>
        <text:list-item>
          <text:p text:style-name="P20"><text:a xlink:type="simple" xlink:href="guide://action?prefill=Tell%20me%20more%20about%3A%20Transparency%20in%20every%20stage%20of%20processing" text:style-name="Internet_20_link" text:visited-style-name="Visited_20_Internet_20_Link"><text:span text:style-name="Strong_20_Emphasis">Transparency in every stage of processing</text:span></text:a> </text:p>
        </text:list-item>
        <text:list-item>
          <text:p text:style-name="P20"><text:a xlink:type="simple" xlink:href="guide://action?prefill=Tell%20me%20more%20about%3A%20Predictability%20in%20output%20structure" text:style-name="Internet_20_link" text:visited-style-name="Visited_20_Internet_20_Link"><text:span text:style-name="Strong_20_Emphasis">Predictability in output structure</text:span></text:a> </text:p>
        </text:list-item>
        <text:list-item>
          <text:p text:style-name="P19"><text:a xlink:type="simple" xlink:href="guide://action?prefill=Tell%20me%20more%20about%3A%20Extensibility%20for%20new%20formats%20and%20heuristics" text:style-name="Internet_20_link" text:visited-style-name="Visited_20_Internet_20_Link"><text:span text:style-name="Strong_20_Emphasis">Extensibility for new formats and heuristics</text:span></text:a> </text:p>
        </text:list-item>
      </text:list>
      <text:p text:style-name="Text_20_body">These principles ensure that the engine behaves consistently across a wide range of input types, from simple ZIP archives to deeply nested CTF challenges.</text:p>
      <text:p text:style-name="Horizontal_20_Line"/>
      <text:h text:style-name="Heading_20_2" text:outline-level="2"><text:span text:style-name="Strong_20_Emphasis">7.1.2 High‑Level Workflow</text:span></text:h>
      <text:p text:style-name="Text_20_body">When the analyst invokes <text:span text:style-name="Source_20_Text">EXTRACT</text:span>, the Extraction Engine performs a multi‑stage pipeline:</text:p>
      <text:list xml:id="list3750276197" text:style-name="L119">
        <text:list-item>
          <text:p text:style-name="P22"><text:a xlink:type="simple" xlink:href="guide://action?prefill=Tell%20me%20more%20about%3A%20Format%20Detection" text:style-name="Internet_20_link" text:visited-style-name="Visited_20_Internet_20_Link"><text:span text:style-name="Strong_20_Emphasis">Format Detection</text:span></text:a> </text:p>
        </text:list-item>
        <text:list-item>
          <text:p text:style-name="P22"><text:a xlink:type="simple" xlink:href="guide://action?prefill=Tell%20me%20more%20about%3A%20Decompression" text:style-name="Internet_20_link" text:visited-style-name="Visited_20_Internet_20_Link"><text:span text:style-name="Strong_20_Emphasis">Decompression</text:span></text:a> </text:p>
        </text:list-item>
        <text:list-item>
          <text:p text:style-name="P22"><text:a xlink:type="simple" xlink:href="guide://action?prefill=Tell%20me%20more%20about%3A%20Suffix%20Normalization" text:style-name="Internet_20_link" text:visited-style-name="Visited_20_Internet_20_Link"><text:span text:style-name="Strong_20_Emphasis">Suffix Normalization</text:span></text:a> </text:p>
        </text:list-item>
        <text:list-item>
          <text:p text:style-name="P22"><text:a xlink:type="simple" xlink:href="guide://action?prefill=Tell%20me%20more%20about%3A%20File%20Carving" text:style-name="Internet_20_link" text:visited-style-name="Visited_20_Internet_20_Link"><text:span text:style-name="Strong_20_Emphasis">File Carving</text:span></text:a> </text:p>
        </text:list-item>
        <text:list-item>
          <text:p text:style-name="P22"><text:a xlink:type="simple" xlink:href="guide://action?prefill=Tell%20me%20more%20about%3A%20String%20Intelligence" text:style-name="Internet_20_link" text:visited-style-name="Visited_20_Internet_20_Link"><text:span text:style-name="Strong_20_Emphasis">String Intelligence</text:span></text:a> </text:p>
        </text:list-item>
        <text:list-item>
          <text:p text:style-name="P22"><text:a xlink:type="simple" xlink:href="guide://action?prefill=Tell%20me%20more%20about%3A%20Entropy%20Profiling" text:style-name="Internet_20_link" text:visited-style-name="Visited_20_Internet_20_Link"><text:span text:style-name="Strong_20_Emphasis">Entropy Profiling</text:span></text:a> </text:p>
        </text:list-item>
        <text:list-item>
          <text:p text:style-name="P21"><text:a xlink:type="simple" xlink:href="guide://action?prefill=Tell%20me%20more%20about%3A%20Recursive%20Descent" text:style-name="Internet_20_link" text:visited-style-name="Visited_20_Internet_20_Link"><text:span text:style-name="Strong_20_Emphasis">Recursive Descent</text:span></text:a> </text:p>
        </text:list-item>
      </text:list>
      <text:p text:style-name="Text_20_body">Each stage feeds into the next, forming a coherent, layered workflow that gradually reveals the structure of the input.</text:p>
      <text:p text:style-name="Horizontal_20_Line"><text:soft-page-break/></text:p>
      <text:h text:style-name="Heading_20_2" text:outline-level="2"><text:span text:style-name="Strong_20_Emphasis">7.1.3 Format Detection</text:span></text:h>
      <text:p text:style-name="Text_20_body">Format detection is the first step in the extraction pipeline. Opus uses:</text:p>
      <text:list xml:id="list2621218585" text:style-name="L120">
        <text:list-item>
          <text:p text:style-name="P24"><text:a xlink:type="simple" xlink:href="guide://action?prefill=Tell%20me%20more%20about%3A%20Magic%20byte%20signatures" text:style-name="Internet_20_link" text:visited-style-name="Visited_20_Internet_20_Link"><text:span text:style-name="Strong_20_Emphasis">Magic byte signatures</text:span></text:a> </text:p>
        </text:list-item>
        <text:list-item>
          <text:p text:style-name="P24"><text:a xlink:type="simple" xlink:href="guide://action?prefill=Tell%20me%20more%20about%3A%20Heuristic%20suffix%20inference" text:style-name="Internet_20_link" text:visited-style-name="Visited_20_Internet_20_Link"><text:span text:style-name="Strong_20_Emphasis">Heuristic suffix inference</text:span></text:a> </text:p>
        </text:list-item>
        <text:list-item>
          <text:p text:style-name="P24"><text:a xlink:type="simple" xlink:href="guide://action?prefill=Tell%20me%20more%20about%3A%20Entropy‑based%20hints" text:style-name="Internet_20_link" text:visited-style-name="Visited_20_Internet_20_Link"><text:span text:style-name="Strong_20_Emphasis">Entropy‑based hints</text:span></text:a> </text:p>
        </text:list-item>
        <text:list-item>
          <text:p text:style-name="P23"><text:a xlink:type="simple" xlink:href="guide://action?prefill=Tell%20me%20more%20about%3A%20Structural%20probes" text:style-name="Internet_20_link" text:visited-style-name="Visited_20_Internet_20_Link"><text:span text:style-name="Strong_20_Emphasis">Structural probes</text:span></text:a> </text:p>
        </text:list-item>
      </text:list>
      <text:p text:style-name="Text_20_body">This multi‑signal approach ensures that Opus can detect formats even when suffixes are missing, misleading, or intentionally obfuscated.</text:p>
      <text:p text:style-name="Horizontal_20_Line"/>
      <text:h text:style-name="Heading_20_2" text:outline-level="2"><text:span text:style-name="Strong_20_Emphasis">7.1.4 Decompression Layer</text:span></text:h>
      <text:p text:style-name="Text_20_body">Once a format is detected, Opus attempts decompression using:</text:p>
      <text:list xml:id="list287599355" text:style-name="L121">
        <text:list-item>
          <text:p text:style-name="P26"><text:a xlink:type="simple" xlink:href="guide://action?prefill=Tell%20me%20more%20about%3A%20zlib%2Fgzip%20routines" text:style-name="Internet_20_link" text:visited-style-name="Visited_20_Internet_20_Link"><text:span text:style-name="Strong_20_Emphasis">zlib/gzip routines</text:span></text:a> </text:p>
        </text:list-item>
        <text:list-item>
          <text:p text:style-name="P26"><text:a xlink:type="simple" xlink:href="guide://action?prefill=Tell%20me%20more%20about%3A%20ZIP%2FPKWARE%20parsing" text:style-name="Internet_20_link" text:visited-style-name="Visited_20_Internet_20_Link"><text:span text:style-name="Strong_20_Emphasis">ZIP/PKWARE parsing</text:span></text:a> </text:p>
        </text:list-item>
        <text:list-item>
          <text:p text:style-name="P26"><text:a xlink:type="simple" xlink:href="guide://action?prefill=Tell%20me%20more%20about%3A%20tar%2Fustar%20extraction" text:style-name="Internet_20_link" text:visited-style-name="Visited_20_Internet_20_Link"><text:span text:style-name="Strong_20_Emphasis">tar/ustar extraction</text:span></text:a> </text:p>
        </text:list-item>
        <text:list-item>
          <text:p text:style-name="P25"><text:a xlink:type="simple" xlink:href="guide://action?prefill=Tell%20me%20more%20about%3A%20custom%20handlers%20for%20edge‑case%20formats" text:style-name="Internet_20_link" text:visited-style-name="Visited_20_Internet_20_Link"><text:span text:style-name="Strong_20_Emphasis">custom handlers for edge‑case formats</text:span></text:a> </text:p>
        </text:list-item>
      </text:list>
      <text:p text:style-name="Text_20_body">If decompression succeeds, Opus writes the output to the <text:span text:style-name="Source_20_Text">extracted/</text:span> directory and continues analysis.</text:p>
      <text:p text:style-name="Text_20_body">If decompression fails, Opus prints a detailed diagnostic message explaining the failure.</text:p>
      <text:p text:style-name="Horizontal_20_Line"/>
      <text:h text:style-name="Heading_20_2" text:outline-level="2"><text:span text:style-name="Strong_20_Emphasis">7.1.5 Suffix Normalization</text:span></text:h>
      <text:p text:style-name="Text_20_body">Suffix normalization ensures that extracted files have meaningful, consistent names. Opus uses:</text:p>
      <text:list xml:id="list1683975201" text:style-name="L122">
        <text:list-item>
          <text:p text:style-name="P28"><text:a xlink:type="simple" xlink:href="guide://action?prefill=Tell%20me%20more%20about%3A%20magic‑byte‑driven%20suffix%20assignment" text:style-name="Internet_20_link" text:visited-style-name="Visited_20_Internet_20_Link"><text:span text:style-name="Strong_20_Emphasis">magic‑byte‑driven suffix assignment</text:span></text:a> </text:p>
        </text:list-item>
        <text:list-item>
          <text:p text:style-name="P28"><text:a xlink:type="simple" xlink:href="guide://action?prefill=Tell%20me%20more%20about%3A%20fallback%20heuristics" text:style-name="Internet_20_link" text:visited-style-name="Visited_20_Internet_20_Link"><text:span text:style-name="Strong_20_Emphasis">fallback heuristics</text:span></text:a> </text:p>
        </text:list-item>
        <text:list-item>
          <text:p text:style-name="P27"><text:a xlink:type="simple" xlink:href="guide://action?prefill=Tell%20me%20more%20about%3A%20collision‑safe%20renaming" text:style-name="Internet_20_link" text:visited-style-name="Visited_20_Internet_20_Link"><text:span text:style-name="Strong_20_Emphasis">collision‑safe renaming</text:span></text:a> </text:p>
        </text:list-item>
      </text:list>
      <text:p text:style-name="Text_20_body">This prevents confusion when dealing with large numbers of extracted files.</text:p>
      <text:p text:style-name="Horizontal_20_Line"/>
      <text:h text:style-name="Heading_20_2" text:outline-level="2"><text:span text:style-name="Strong_20_Emphasis">7.1.6 File Carving Integration</text:span></text:h>
      <text:p text:style-name="Text_20_body">The Extraction Engine integrates tightly with the File Carver. After decompression, Opus scans the output for embedded files using:</text:p>
      <text:list xml:id="list1947139434" text:style-name="L123">
        <text:list-item>
          <text:p text:style-name="P30"><text:a xlink:type="simple" xlink:href="guide://action?prefill=Tell%20me%20more%20about%3A%20signature%20scanning" text:style-name="Internet_20_link" text:visited-style-name="Visited_20_Internet_20_Link"><text:span text:style-name="Strong_20_Emphasis">signature scanning</text:span></text:a> </text:p>
        </text:list-item>
        <text:list-item>
          <text:p text:style-name="P30"><text:soft-page-break/><text:a xlink:type="simple" xlink:href="guide://action?prefill=Tell%20me%20more%20about%3A%20offset‑based%20carving" text:style-name="Internet_20_link" text:visited-style-name="Visited_20_Internet_20_Link"><text:span text:style-name="Strong_20_Emphasis">offset‑based carving</text:span></text:a> </text:p>
        </text:list-item>
        <text:list-item>
          <text:p text:style-name="P29"><text:a xlink:type="simple" xlink:href="guide://action?prefill=Tell%20me%20more%20about%3A%20boundary%20heuristics" text:style-name="Internet_20_link" text:visited-style-name="Visited_20_Internet_20_Link"><text:span text:style-name="Strong_20_Emphasis">boundary heuristics</text:span></text:a> </text:p>
        </text:list-item>
      </text:list>
      <text:p text:style-name="Text_20_body">Carved files are placed in the <text:span text:style-name="Source_20_Text">carved/</text:span> directory and recursively analyzed.</text:p>
      <text:p text:style-name="Horizontal_20_Line"/>
      <text:h text:style-name="Heading_20_2" text:outline-level="2"><text:span text:style-name="Strong_20_Emphasis">7.1.7 Recursion Guard</text:span></text:h>
      <text:p text:style-name="Text_20_body">To prevent infinite loops, Opus enforces:</text:p>
      <text:list xml:id="list3918414890" text:style-name="L124">
        <text:list-item>
          <text:p text:style-name="P32"><text:a xlink:type="simple" xlink:href="guide://action?prefill=Tell%20me%20more%20about%3A%20maximum%20recursion%20depth" text:style-name="Internet_20_link" text:visited-style-name="Visited_20_Internet_20_Link"><text:span text:style-name="Strong_20_Emphasis">maximum recursion depth</text:span></text:a> </text:p>
        </text:list-item>
        <text:list-item>
          <text:p text:style-name="P32"><text:a xlink:type="simple" xlink:href="guide://action?prefill=Tell%20me%20more%20about%3A%20duplicate‑content%20detection" text:style-name="Internet_20_link" text:visited-style-name="Visited_20_Internet_20_Link"><text:span text:style-name="Strong_20_Emphasis">duplicate‑content detection</text:span></text:a> </text:p>
        </text:list-item>
        <text:list-item>
          <text:p text:style-name="P31"><text:a xlink:type="simple" xlink:href="guide://action?prefill=Tell%20me%20more%20about%3A%20suffix‑based%20cycle%20detection" text:style-name="Internet_20_link" text:visited-style-name="Visited_20_Internet_20_Link"><text:span text:style-name="Strong_20_Emphasis">suffix‑based cycle detection</text:span></text:a> </text:p>
        </text:list-item>
      </text:list>
      <text:p text:style-name="Text_20_body">If a recursion guard triggers, Opus prints a clear warning and halts further descent.</text:p>
      <text:p text:style-name="Horizontal_20_Line"/>
      <text:h text:style-name="Heading_20_2" text:outline-level="2"><text:span text:style-name="Strong_20_Emphasis">7.1.8 Output Structure</text:span></text:h>
      <text:p text:style-name="Text_20_body">The Extraction Engine produces a predictable directory structure:</text:p>
      <text:list xml:id="list3198053267" text:style-name="L125">
        <text:list-item>
          <text:p text:style-name="P34"><text:a xlink:type="simple" xlink:href="guide://action?prefill=Tell%20me%20more%20about%3A%20extracted%2F" text:style-name="Internet_20_link" text:visited-style-name="Visited_20_Internet_20_Link"><text:span text:style-name="Strong_20_Emphasis">extracted/</text:span></text:a> — decompressed files </text:p>
        </text:list-item>
        <text:list-item>
          <text:p text:style-name="P34"><text:a xlink:type="simple" xlink:href="guide://action?prefill=Tell%20me%20more%20about%3A%20carved%2F" text:style-name="Internet_20_link" text:visited-style-name="Visited_20_Internet_20_Link"><text:span text:style-name="Strong_20_Emphasis">carved/</text:span></text:a> — signature‑based extractions </text:p>
        </text:list-item>
        <text:list-item>
          <text:p text:style-name="P33"><text:a xlink:type="simple" xlink:href="guide://action?prefill=Tell%20me%20more%20about%3A%20analysis%2F" text:style-name="Internet_20_link" text:visited-style-name="Visited_20_Internet_20_Link"><text:span text:style-name="Strong_20_Emphasis">analysis/</text:span></text:a> — optional metadata dumps </text:p>
        </text:list-item>
      </text:list>
      <text:p text:style-name="Text_20_body">This structure supports reproducibility and clarity.</text:p>
      <text:p text:style-name="Horizontal_20_Line"/>
      <text:h text:style-name="Heading_20_1" text:outline-level="1">====================================</text:h>
      <text:h text:style-name="Heading_20_1" text:outline-level="1"><text:span text:style-name="Strong_20_Emphasis">7.2 FILE CARVER</text:span></text:h>
      <text:h text:style-name="Heading_20_1" text:outline-level="1">====================================</text:h>
      <text:p text:style-name="Text_20_body">The File Carver is a subsystem dedicated to discovering embedded files within raw byte streams. It is designed to operate both independently and as part of the Extraction Engine.</text:p>
      <text:p text:style-name="Horizontal_20_Line"/>
      <text:h text:style-name="Heading_20_2" text:outline-level="2"><text:span text:style-name="Strong_20_Emphasis">7.2.1 Carving Philosophy</text:span></text:h>
      <text:p text:style-name="Text_20_body">The File Carver is built around:</text:p>
      <text:list xml:id="list1047105469" text:style-name="L126">
        <text:list-item>
          <text:p text:style-name="P36"><text:a xlink:type="simple" xlink:href="guide://action?prefill=Tell%20me%20more%20about%3A%20signature‑driven%20detection" text:style-name="Internet_20_link" text:visited-style-name="Visited_20_Internet_20_Link"><text:span text:style-name="Strong_20_Emphasis">signature‑driven detection</text:span></text:a> </text:p>
        </text:list-item>
        <text:list-item>
          <text:p text:style-name="P36"><text:soft-page-break/><text:a xlink:type="simple" xlink:href="guide://action?prefill=Tell%20me%20more%20about%3A%20offset‑aware%20extraction" text:style-name="Internet_20_link" text:visited-style-name="Visited_20_Internet_20_Link"><text:span text:style-name="Strong_20_Emphasis">offset‑aware extraction</text:span></text:a> </text:p>
        </text:list-item>
        <text:list-item>
          <text:p text:style-name="P36"><text:a xlink:type="simple" xlink:href="guide://action?prefill=Tell%20me%20more%20about%3A%20minimal%20assumptions%20about%20structure" text:style-name="Internet_20_link" text:visited-style-name="Visited_20_Internet_20_Link"><text:span text:style-name="Strong_20_Emphasis">minimal assumptions about structure</text:span></text:a> </text:p>
        </text:list-item>
        <text:list-item>
          <text:p text:style-name="P35"><text:a xlink:type="simple" xlink:href="guide://action?prefill=Tell%20me%20more%20about%3A%20robustness%20against%20corruption" text:style-name="Internet_20_link" text:visited-style-name="Visited_20_Internet_20_Link"><text:span text:style-name="Strong_20_Emphasis">robustness against corruption</text:span></text:a> </text:p>
        </text:list-item>
      </text:list>
      <text:p text:style-name="Text_20_body">This allows Opus to recover files even from partially damaged or obfuscated data.</text:p>
      <text:p text:style-name="Horizontal_20_Line"/>
      <text:h text:style-name="Heading_20_2" text:outline-level="2"><text:span text:style-name="Strong_20_Emphasis">7.2.2 Supported Signatures</text:span></text:h>
      <text:p text:style-name="Text_20_body">The carver recognizes:</text:p>
      <text:list xml:id="list3125908206" text:style-name="L127">
        <text:list-item>
          <text:p text:style-name="P38"><text:a xlink:type="simple" xlink:href="guide://action?prefill=Tell%20me%20more%20about%3A%20JPEG" text:style-name="Internet_20_link" text:visited-style-name="Visited_20_Internet_20_Link"><text:span text:style-name="Strong_20_Emphasis">JPEG</text:span></text:a> </text:p>
        </text:list-item>
        <text:list-item>
          <text:p text:style-name="P38"><text:a xlink:type="simple" xlink:href="guide://action?prefill=Tell%20me%20more%20about%3A%20PNG" text:style-name="Internet_20_link" text:visited-style-name="Visited_20_Internet_20_Link"><text:span text:style-name="Strong_20_Emphasis">PNG</text:span></text:a> </text:p>
        </text:list-item>
        <text:list-item>
          <text:p text:style-name="P38"><text:span text:style-name="Strong_20_Emphasis">ZIP</text:span> </text:p>
        </text:list-item>
        <text:list-item>
          <text:p text:style-name="P38"><text:span text:style-name="Strong_20_Emphasis">G</text:span><text:a xlink:type="simple" xlink:href="guide://action?prefill=Tell%20me%20more%20about%3A%20ZIP" text:style-name="Internet_20_link" text:visited-style-name="Visited_20_Internet_20_Link"><text:span text:style-name="Strong_20_Emphasis">ZIP</text:span></text:a> </text:p>
        </text:list-item>
        <text:list-item>
          <text:p text:style-name="P38"><text:span text:style-name="Strong_20_Emphasis">ELF</text:span> </text:p>
        </text:list-item>
        <text:list-item>
          <text:p text:style-name="P38"><text:span text:style-name="Strong_20_Emphasis">PDF</text:span> </text:p>
        </text:list-item>
        <text:list-item>
          <text:p text:style-name="P37"><text:span text:style-name="Strong_20_Emphasis">WAV</text:span> </text:p>
        </text:list-item>
      </text:list>
      <text:p text:style-name="Text_20_body">Each signature is matched using strict byte patterns.</text:p>
      <text:p text:style-name="Horizontal_20_Line"/>
      <text:h text:style-name="Heading_20_2" text:outline-level="2"><text:span text:style-name="Strong_20_Emphasis">7.2.3 Carving Workflow</text:span></text:h>
      <text:p text:style-name="Text_20_body">The workflow includes:</text:p>
      <text:list xml:id="list2846088290" text:style-name="L128">
        <text:list-item>
          <text:p text:style-name="P40"><text:span text:style-name="Strong_20_Emphasis">signature scan</text:span> </text:p>
        </text:list-item>
        <text:list-item>
          <text:p text:style-name="P40"><text:span text:style-name="Strong_20_Emphasis">boundary estimation</text:span> </text:p>
        </text:list-item>
        <text:list-item>
          <text:p text:style-name="P40"><text:span text:style-name="Strong_20_Emphasis">length inference</text:span> </text:p>
        </text:list-item>
        <text:list-item>
          <text:p text:style-name="P39"><text:span text:style-name="Strong_20_Emphasis">safe extraction</text:span> </text:p>
        </text:list-item>
      </text:list>
      <text:p text:style-name="Text_20_body">If boundaries cannot be determined, Opus extracts conservatively.</text:p>
      <text:p text:style-name="Horizontal_20_Line"/>
      <text:h text:style-name="Heading_20_1" text:outline-level="1">====================================</text:h>
      <text:h text:style-name="Heading_20_1" text:outline-level="1"><text:span text:style-name="Strong_20_Emphasis">7.3 ENTROPY ENGINE</text:span></text:h>
      <text:h text:style-name="Heading_20_1" text:outline-level="1">====================================</text:h>
      <text:p text:style-name="Text_20_body">The Entropy Engine provides statistical insight into the randomness of data. It is used to detect:</text:p>
      <text:list xml:id="list4119636156" text:style-name="L129">
        <text:list-item>
          <text:p text:style-name="P42"><text:span text:style-name="Strong_20_Emphasis">compression</text:span> </text:p>
        </text:list-item>
        <text:list-item>
          <text:p text:style-name="P42"><text:soft-page-break/><text:span text:style-name="Strong_20_Emphasis">encryption</text:span> </text:p>
        </text:list-item>
        <text:list-item>
          <text:p text:style-name="P42"><text:span text:style-name="Strong_20_Emphasis">steganographic manipulation</text:span> </text:p>
        </text:list-item>
        <text:list-item>
          <text:p text:style-name="P41"><text:span text:style-name="Strong_20_Emphasis">structured content</text:span> </text:p>
        </text:list-item>
      </text:list>
      <text:p text:style-name="Horizontal_20_Line"/>
      <text:h text:style-name="Heading_20_2" text:outline-level="2"><text:span text:style-name="Strong_20_Emphasis">7.3.1 Global Entropy</text:span></text:h>
      <text:p text:style-name="Text_20_body">Opus computes Shannon entropy across the entire file.</text:p>
      <text:p text:style-name="Horizontal_20_Line"/>
      <text:h text:style-name="Heading_20_2" text:outline-level="2"><text:span text:style-name="Strong_20_Emphasis">7.3.2 Block‑Level Entropy</text:span></text:h>
      <text:p text:style-name="Text_20_body">Opus divides the file into blocks and computes entropy per block, producing a heatmap.</text:p>
      <text:p text:style-name="Horizontal_20_Line"/>
      <text:h text:style-name="Heading_20_2" text:outline-level="2"><text:span text:style-name="Strong_20_Emphasis">7.3.3 LSB Entropy</text:span></text:h>
      <text:p text:style-name="Text_20_body">Useful for detecting steganographic anomalies.</text:p>
      <text:p text:style-name="Horizontal_20_Line"/>
      <text:h text:style-name="Heading_20_1" text:outline-level="1">====================================</text:h>
      <text:h text:style-name="Heading_20_1" text:outline-level="1"><text:span text:style-name="Strong_20_Emphasis">7.4 STRING INTELLIGENCE ENGINE</text:span></text:h>
      <text:h text:style-name="Heading_20_1" text:outline-level="1">====================================</text:h>
      <text:p text:style-name="Text_20_body">This subsystem extracts:</text:p>
      <text:list xml:id="list3815810209" text:style-name="L130">
        <text:list-item>
          <text:p text:style-name="P44"><text:span text:style-name="Strong_20_Emphasis">ASCII strings</text:span> </text:p>
        </text:list-item>
        <text:list-item>
          <text:p text:style-name="P44"><text:span text:style-name="Strong_20_Emphasis">UTF‑8 sequences</text:span> </text:p>
        </text:list-item>
        <text:list-item>
          <text:p text:style-name="P44"><text:span text:style-name="Strong_20_Emphasis">base64 candidates</text:span> </text:p>
        </text:list-item>
        <text:list-item>
          <text:p text:style-name="P44"><text:span text:style-name="Strong_20_Emphasis">URLs</text:span> </text:p>
        </text:list-item>
        <text:list-item>
          <text:p text:style-name="P43"><text:span text:style-name="Strong_20_Emphasis">emails</text:span> </text:p>
        </text:list-item>
      </text:list>
      <text:p text:style-name="Text_20_body">It also annotates offsets and confidence levels.</text:p>
      <text:p text:style-name="Horizontal_20_Line"/>
      <text:h text:style-name="Heading_20_1" text:outline-level="1"><text:soft-page-break/>====================================</text:h>
      <text:h text:style-name="Heading_20_1" text:outline-level="1"><text:span text:style-name="Strong_20_Emphasis">7.5 JPEG STEGO ENGINE</text:span></text:h>
      <text:h text:style-name="Heading_20_1" text:outline-level="1">====================================</text:h>
      <text:p text:style-name="Text_20_body">This subsystem performs:</text:p>
      <text:list xml:id="list2372310013" text:style-name="L131">
        <text:list-item>
          <text:p text:style-name="P45"><text:span text:style-name="Strong_20_Emphasis">LSB analysis</text:span> </text:p>
        </text:list-item>
        <text:list-item>
          <text:p text:style-name="P45"><text:span text:style-name="Strong_20_Emphasis">chi‑square testing</text:span> </text:p>
        </text:list-item>
        <text:list-item>
          <text:p text:style-name="P45"><text:span text:style-name="Strong_20_Emphasis">RS analysis</text:span> </text:p>
        </text:list-item>
        <text:list-item>
          <text:p text:style-name="P45"><text:span text:style-name="Strong_20_Emphasis">DCT profiling</text:span> </text:p>
        </text:list-item>
      </text:list>
      <text:p text:style-name="Text_20_body"><text:span text:style-name="Strong_20_Emphasis"/></text:p>
      <text:p text:style-name="Text_20_body">Each component is documented in depth in Chapter 6, but here we explore the architecture behind them.</text:p>
      <text:p text:style-name="Horizontal_20_Line"/>
      <text:h text:style-name="Heading_20_1" text:outline-level="1">====================================</text:h>
      <text:h text:style-name="Heading_20_1" text:outline-level="1"><text:span text:style-name="Strong_20_Emphasis">7.6 CRYPTANALYSIS ENGINE</text:span></text:h>
      <text:h text:style-name="Heading_20_1" text:outline-level="1">====================================</text:h>
      <text:p text:style-name="Text_20_body">This subsystem powers:</text:p>
      <text:list xml:id="list1228848393" text:style-name="L132">
        <text:list-item>
          <text:p text:style-name="P47"><text:span text:style-name="Strong_20_Emphasis">Vigenère solving</text:span> </text:p>
        </text:list-item>
        <text:list-item>
          <text:p text:style-name="P47"><text:span text:style-name="Strong_20_Emphasis">substitution solving</text:span> </text:p>
        </text:list-item>
        <text:list-item>
          <text:p text:style-name="P47"><text:span text:style-name="Strong_20_Emphasis">quadgram scoring</text:span> </text:p>
        </text:list-item>
        <text:list-item>
          <text:p text:style-name="P47"><text:span text:style-name="Strong_20_Emphasis">hillclimb refinement</text:span> </text:p>
        </text:list-item>
        <text:list-item>
          <text:p text:style-name="P46"><text:span text:style-name="Strong_20_Emphasis">multi‑threaded restarts</text:span> </text:p>
        </text:list-item>
      </text:list>
      <text:p text:style-name="Text_20_body">It is one of the most computationally intensive parts of Opus.</text:p>
      <text:p text:style-name="Horizontal_20_Line"/>
      <text:h text:style-name="Heading_20_1" text:outline-level="1"><text:soft-page-break/>====================================</text:h>
      <text:h text:style-name="Heading_20_1" text:outline-level="1"><text:span text:style-name="Strong_20_Emphasis">7.7 THREAD POOL</text:span></text:h>
      <text:h text:style-name="Heading_20_1" text:outline-level="1">====================================</text:h>
      <text:p text:style-name="Text_20_body">The thread pool manages:</text:p>
      <text:list xml:id="list1386234896" text:style-name="L133">
        <text:list-item>
          <text:p text:style-name="P49"><text:span text:style-name="Strong_20_Emphasis">background tasks</text:span> </text:p>
        </text:list-item>
        <text:list-item>
          <text:p text:style-name="P49"><text:span text:style-name="Strong_20_Emphasis">solver threads</text:span> </text:p>
        </text:list-item>
        <text:list-item>
          <text:p text:style-name="P49"><text:span text:style-name="Strong_20_Emphasis">status line updates</text:span> </text:p>
        </text:list-item>
        <text:list-item>
          <text:p text:style-name="P48"><text:span text:style-name="Strong_20_Emphasis">safe shutdown</text:span> </text:p>
        </text:list-item>
      </text:list>
      <text:p text:style-name="Text_20_body">It ensures Opus remains responsive during heavy computation.</text:p>
      <text:p text:style-name="Horizontal_20_Line"/>
      <text:h text:style-name="Heading_20_1" text:outline-level="1">====================================</text:h>
      <text:h text:style-name="Heading_20_1" text:outline-level="1"><text:span text:style-name="Strong_20_Emphasis">7.8 SAFETY MODEL</text:span></text:h>
      <text:h text:style-name="Heading_20_1" text:outline-level="1">====================================</text:h>
      <text:p text:style-name="Text_20_body">The safety model enforces:</text:p>
      <text:list xml:id="list1189379162" text:style-name="L134">
        <text:list-item>
          <text:p text:style-name="P51"><text:span text:style-name="Strong_20_Emphasis">no overwrites</text:span> </text:p>
        </text:list-item>
        <text:list-item>
          <text:p text:style-name="P51"><text:span text:style-name="Strong_20_Emphasis">no unsafe deletes</text:span> </text:p>
        </text:list-item>
        <text:list-item>
          <text:p text:style-name="P51"><text:span text:style-name="Strong_20_Emphasis">recursion limits</text:span> </text:p>
        </text:list-item>
        <text:list-item>
          <text:p text:style-name="P50"><text:span text:style-name="Strong_20_Emphasis">directory isolation</text:span> </text:p>
        </text:list-item>
      </text:list>
      <text:p text:style-name="Text_20_body">This protects both the analyst and the system.</text:p>
      <text:p text:style-name="Horizontal_20_Line"/>
      <text:p text:style-name="Text_20_body"/>
      <text:h text:style-name="Heading_20_1" text:outline-level="1"><text:soft-page-break/>====================================</text:h>
      <text:h text:style-name="Heading_20_1" text:outline-level="1"><text:span text:style-name="Strong_20_Emphasis">CHAPTER 8 — WORKFLOWS &amp; CASE STUDIES</text:span></text:h>
      <text:h text:style-name="Heading_20_1" text:outline-level="1">====================================</text:h>
      <text:p text:style-name="Text_20_body">Opus is not merely a collection of commands or subsystems; it is a <text:span text:style-name="Strong_20_Emphasis">forensic environment</text:span>, designed to support complex, multi‑stage investigative workflows. While earlier chapters documented the architecture and individual commands, this chapter demonstrates how Opus is used in practice — how analysts combine tools, interpret results, and navigate uncertainty.</text:p>
      <text:p text:style-name="Text_20_body">These workflows are intentionally long, narrative, and deeply explanatory. They are designed to mirror real‑world forensic and CTF scenarios, where data is messy, layered, and often deceptive. Each case study illustrates not only <text:span text:style-name="Emphasis">what</text:span> Opus does, but <text:span text:style-name="Emphasis">how</text:span> analysts think when using it.</text:p>
      <text:p text:style-name="Horizontal_20_Line"/>
      <text:h text:style-name="Heading_20_1" text:outline-level="1">====================================</text:h>
      <text:h text:style-name="Heading_20_1" text:outline-level="1"><text:span text:style-name="Strong_20_Emphasis">8.1 MULTI‑LAYER EXTRACTION WORKFLOW</text:span></text:h>
      <text:h text:style-name="Heading_20_1" text:outline-level="1">====================================</text:h>
      <text:p text:style-name="Text_20_body">Multi‑layer extraction is one of the most common and challenging tasks in digital forensics and CTF competitions. Files often contain:</text:p>
      <text:list xml:id="list733860041" text:style-name="L135">
        <text:list-item>
          <text:p text:style-name="P53"><text:span text:style-name="Strong_20_Emphasis">compressed archives</text:span> </text:p>
        </text:list-item>
        <text:list-item>
          <text:p text:style-name="P53"><text:span text:style-name="Strong_20_Emphasis">inside steganographic images</text:span> </text:p>
        </text:list-item>
        <text:list-item>
          <text:p text:style-name="P53"><text:span text:style-name="Strong_20_Emphasis">inside encrypted containers</text:span> </text:p>
        </text:list-item>
        <text:list-item>
          <text:p text:style-name="P53"><text:span text:style-name="Strong_20_Emphasis">inside binary payloads</text:span> </text:p>
        </text:list-item>
        <text:list-item>
          <text:p text:style-name="P52"><text:span text:style-name="Strong_20_Emphasis">inside corrupted or partially overwritten structures</text:span> </text:p>
        </text:list-item>
      </text:list>
      <text:p text:style-name="Text_20_body">Opus is designed to handle this complexity through its <text:span text:style-name="Strong_20_Emphasis">recursive extraction engine</text:span>, which automates much of the heavy lifting while preserving transparency and safety.</text:p>
      <text:p text:style-name="Horizontal_20_Line"/>
      <text:h text:style-name="Heading_20_2" text:outline-level="2"><text:soft-page-break/><text:span text:style-name="Strong_20_Emphasis">8.1.1 Scenario Overview</text:span></text:h>
      <text:p text:style-name="Text_20_body">You receive a file named <text:span text:style-name="Source_20_Text">mystery.bin</text:span>. It has no suffix, no metadata, and no obvious structure. The goal is to determine what it contains and extract any hidden content.</text:p>
      <text:p text:style-name="Horizontal_20_Line"/>
      <text:h text:style-name="Heading_20_2" text:outline-level="2"><text:span text:style-name="Strong_20_Emphasis">8.1.2 Step 1 — Initial Inspection</text:span></text:h>
      <text:p text:style-name="Text_20_body">The analyst begins with basic inspection commands:</text:p>
      <text:list xml:id="list4178904813" text:style-name="L136">
        <text:list-item>
          <text:p text:style-name="P55"><text:a xlink:type="simple" xlink:href="guide://action?prefill=Tell%20me%20more%20about%3A%20MAGIC%20scan" text:style-name="Internet_20_link" text:visited-style-name="Visited_20_Internet_20_Link"><text:span text:style-name="Strong_20_Emphasis">MAGIC scan</text:span></text:a> </text:p>
        </text:list-item>
        <text:list-item>
          <text:p text:style-name="P55"><text:a xlink:type="simple" xlink:href="guide://action?prefill=Tell%20me%20more%20about%3A%20entropy%20analysis" text:style-name="Internet_20_link" text:visited-style-name="Visited_20_Internet_20_Link"><text:span text:style-name="Strong_20_Emphasis">entropy analysis</text:span></text:a> </text:p>
        </text:list-item>
        <text:list-item>
          <text:p text:style-name="P54"><text:a xlink:type="simple" xlink:href="guide://action?prefill=Tell%20me%20more%20about%3A%20string%20intelligence" text:style-name="Internet_20_link" text:visited-style-name="Visited_20_Internet_20_Link"><text:span text:style-name="Strong_20_Emphasis">string intelligence</text:span></text:a> </text:p>
        </text:list-item>
      </text:list>
      <text:p text:style-name="Text_20_body">These commands provide a high‑level understanding of the file’s structure.</text:p>
      <text:h text:style-name="Heading_20_3" text:outline-level="3">Example Output (abridged)</text:h>
      <text:p text:style-name="Preformatted_20_Text"><text:span text:style-name="Source_20_Text">MAGIC:</text:span></text:p>
      <text:p text:style-name="Preformatted_20_Text"><text:span text:style-name="Source_20_Text"><text:s text:c="2"/>No known signatures detected.</text:span></text:p>
      <text:p text:style-name="Preformatted_20_Text"/>
      <text:p text:style-name="Preformatted_20_Text"><text:span text:style-name="Source_20_Text">ENTROPY:</text:span></text:p>
      <text:p text:style-name="Preformatted_20_Text"><text:span text:style-name="Source_20_Text"><text:s text:c="2"/>Global Entropy: 7.92 bits/byte (high)</text:span></text:p>
      <text:p text:style-name="Preformatted_20_Text"/>
      <text:p text:style-name="Preformatted_20_Text"><text:span text:style-name="Source_20_Text">S:</text:span></text:p>
      <text:p text:style-name="P1"><text:span text:style-name="Source_20_Text"><text:s text:c="2"/>No ASCII strings detected.</text:span></text:p>
      <text:h text:style-name="Heading_20_3" text:outline-level="3">Interpretation</text:h>
      <text:p text:style-name="Text_20_body">High entropy + no strings + no signatures suggests:</text:p>
      <text:list xml:id="list3650528117" text:style-name="L137">
        <text:list-item>
          <text:p text:style-name="P57">compressed data </text:p>
        </text:list-item>
        <text:list-item>
          <text:p text:style-name="P57">encrypted data </text:p>
        </text:list-item>
        <text:list-item>
          <text:p text:style-name="P56">or a container format without a standard header </text:p>
        </text:list-item>
      </text:list>
      <text:p text:style-name="Horizontal_20_Line"/>
      <text:h text:style-name="Heading_20_2" text:outline-level="2"><text:span text:style-name="Strong_20_Emphasis">8.1.3 Step 2 — Invoke the Extraction Engine</text:span></text:h>
      <text:p text:style-name="Text_20_body">The analyst runs:</text:p>
      <text:p text:style-name="P1"><text:span text:style-name="Source_20_Text">EXTRACT</text:span></text:p>
      <text:p text:style-name="Text_20_body">The Extraction Engine performs:</text:p>
      <text:list xml:id="list2919775464" text:style-name="L138">
        <text:list-item>
          <text:p text:style-name="P59"><text:a xlink:type="simple" xlink:href="guide://action?prefill=Tell%20me%20more%20about%3A%20format%20detection" text:style-name="Internet_20_link" text:visited-style-name="Visited_20_Internet_20_Link"><text:span text:style-name="Strong_20_Emphasis">format detection</text:span></text:a> </text:p>
        </text:list-item>
        <text:list-item>
          <text:p text:style-name="P59"><text:a xlink:type="simple" xlink:href="guide://action?prefill=Tell%20me%20more%20about%3A%20decompression%20attempts" text:style-name="Internet_20_link" text:visited-style-name="Visited_20_Internet_20_Link"><text:span text:style-name="Strong_20_Emphasis">decompression attempts</text:span></text:a> </text:p>
        </text:list-item>
        <text:list-item>
          <text:p text:style-name="P59"><text:a xlink:type="simple" xlink:href="guide://action?prefill=Tell%20me%20more%20about%3A%20suffix%20normalization" text:style-name="Internet_20_link" text:visited-style-name="Visited_20_Internet_20_Link"><text:span text:style-name="Strong_20_Emphasis">suffix normalization</text:span></text:a> </text:p>
        </text:list-item>
        <text:list-item>
          <text:p text:style-name="P59"><text:a xlink:type="simple" xlink:href="guide://action?prefill=Tell%20me%20more%20about%3A%20file%20carving" text:style-name="Internet_20_link" text:visited-style-name="Visited_20_Internet_20_Link"><text:span text:style-name="Strong_20_Emphasis">file carving</text:span></text:a> </text:p>
        </text:list-item>
        <text:list-item>
          <text:p text:style-name="P58"><text:a xlink:type="simple" xlink:href="guide://action?prefill=Tell%20me%20more%20about%3A%20recursive%20descent" text:style-name="Internet_20_link" text:visited-style-name="Visited_20_Internet_20_Link"><text:span text:style-name="Strong_20_Emphasis">recursive descent</text:span></text:a> </text:p>
        </text:list-item>
      </text:list>
      <text:h text:style-name="Heading_20_3" text:outline-level="3"><text:soft-page-break/>Example Output (abridged)</text:h>
      <text:p text:style-name="Preformatted_20_Text"><text:span text:style-name="Source_20_Text">Detected GZIP header at offset 0x0000</text:span></text:p>
      <text:p text:style-name="Preformatted_20_Text"><text:span text:style-name="Source_20_Text">Decompressing...</text:span></text:p>
      <text:p text:style-name="Preformatted_20_Text"><text:span text:style-name="Source_20_Text">Output: extracted/layer1.bin</text:span></text:p>
      <text:p text:style-name="Preformatted_20_Text"/>
      <text:p text:style-name="Preformatted_20_Text"><text:span text:style-name="Source_20_Text">Scanning extracted/layer1.bin...</text:span></text:p>
      <text:p text:style-name="Preformatted_20_Text"><text:span text:style-name="Source_20_Text">Detected ZIP local header</text:span></text:p>
      <text:p text:style-name="Preformatted_20_Text"><text:span text:style-name="Source_20_Text">Extracting ZIP contents...</text:span></text:p>
      <text:p text:style-name="Preformatted_20_Text"><text:span text:style-name="Source_20_Text">Output: extracted/layer1/file1.png</text:span></text:p>
      <text:p text:style-name="P1"><text:span text:style-name="Source_20_Text">Output: extracted/layer1/file2.dat</text:span></text:p>
      <text:p text:style-name="Horizontal_20_Line"/>
      <text:h text:style-name="Heading_20_2" text:outline-level="2"><text:span text:style-name="Strong_20_Emphasis">8.1.4 Step 3 — Analyze Extracted Files</text:span></text:h>
      <text:p text:style-name="Text_20_body">The analyst inspects each extracted file:</text:p>
      <text:list xml:id="list3827241861" text:style-name="L139">
        <text:list-item>
          <text:p text:style-name="P61"><text:a xlink:type="simple" xlink:href="guide://action?prefill=Tell%20me%20more%20about%3A%20PNG%20inspection" text:style-name="Internet_20_link" text:visited-style-name="Visited_20_Internet_20_Link"><text:span text:style-name="Strong_20_Emphasis">PNG inspection</text:span></text:a> </text:p>
        </text:list-item>
        <text:list-item>
          <text:p text:style-name="P61"><text:a xlink:type="simple" xlink:href="guide://action?prefill=Tell%20me%20more%20about%3A%20entropy%20profiling" text:style-name="Internet_20_link" text:visited-style-name="Visited_20_Internet_20_Link"><text:span text:style-name="Strong_20_Emphasis">entropy profiling</text:span></text:a> </text:p>
        </text:list-item>
        <text:list-item>
          <text:p text:style-name="P60"><text:a xlink:type="simple" xlink:href="guide://action?prefill=Tell%20me%20more%20about%3A%20string%20extraction" text:style-name="Internet_20_link" text:visited-style-name="Visited_20_Internet_20_Link"><text:span text:style-name="Strong_20_Emphasis">string extraction</text:span></text:a> </text:p>
        </text:list-item>
      </text:list>
      <text:p text:style-name="Text_20_body">One file (<text:span text:style-name="Source_20_Text">file2.dat</text:span>) shows:</text:p>
      <text:list xml:id="list4233451802" text:style-name="L140">
        <text:list-item>
          <text:p text:style-name="P63">high entropy </text:p>
        </text:list-item>
        <text:list-item>
          <text:p text:style-name="P63">no strings </text:p>
        </text:list-item>
        <text:list-item>
          <text:p text:style-name="P62">no signatures </text:p>
        </text:list-item>
      </text:list>
      <text:p text:style-name="Text_20_body">This suggests another layer.</text:p>
      <text:p text:style-name="Horizontal_20_Line"/>
      <text:h text:style-name="Heading_20_2" text:outline-level="2"><text:span text:style-name="Strong_20_Emphasis">8.1.5 Step 4 — Recursive Descent</text:span></text:h>
      <text:p text:style-name="Text_20_body">The analyst loads <text:span text:style-name="Source_20_Text">file2.dat</text:span>:</text:p>
      <text:p text:style-name="Preformatted_20_Text"><text:span text:style-name="Source_20_Text">O file2.dat</text:span></text:p>
      <text:p text:style-name="P1"><text:span text:style-name="Source_20_Text">EXTRACT</text:span></text:p>
      <text:p text:style-name="Text_20_body">The engine discovers:</text:p>
      <text:p text:style-name="Preformatted_20_Text"><text:span text:style-name="Source_20_Text">Detected JPEG header</text:span></text:p>
      <text:p text:style-name="P1"><text:span text:style-name="Source_20_Text">Extracted: carved/hidden.jpg</text:span></text:p>
      <text:p text:style-name="Horizontal_20_Line"/>
      <text:h text:style-name="Heading_20_2" text:outline-level="2"><text:span text:style-name="Strong_20_Emphasis">8.1.6 Step 5 — Steganalysis</text:span></text:h>
      <text:p text:style-name="Text_20_body">The analyst runs:</text:p>
      <text:list xml:id="list1024836695" text:style-name="L141">
        <text:list-item>
          <text:p text:style-name="P65"><text:a xlink:type="simple" xlink:href="guide://action?prefill=Tell%20me%20more%20about%3A%20JLSB" text:style-name="Internet_20_link" text:visited-style-name="Visited_20_Internet_20_Link"><text:span text:style-name="Strong_20_Emphasis">JLSB</text:span></text:a> </text:p>
        </text:list-item>
        <text:list-item>
          <text:p text:style-name="P65"><text:a xlink:type="simple" xlink:href="guide://action?prefill=Tell%20me%20more%20about%3A%20JCHI" text:style-name="Internet_20_link" text:visited-style-name="Visited_20_Internet_20_Link"><text:span text:style-name="Strong_20_Emphasis">JCHI</text:span></text:a> </text:p>
        </text:list-item>
        <text:list-item>
          <text:p text:style-name="P65"><text:soft-page-break/><text:a xlink:type="simple" xlink:href="guide://action?prefill=Tell%20me%20more%20about%3A%20JRS" text:style-name="Internet_20_link" text:visited-style-name="Visited_20_Internet_20_Link"><text:span text:style-name="Strong_20_Emphasis">JRS</text:span></text:a> </text:p>
        </text:list-item>
        <text:list-item>
          <text:p text:style-name="P64"><text:a xlink:type="simple" xlink:href="guide://action?prefill=Tell%20me%20more%20about%3A%20JDCT" text:style-name="Internet_20_link" text:visited-style-name="Visited_20_Internet_20_Link"><text:span text:style-name="Strong_20_Emphasis">JDCT</text:span></text:a> </text:p>
        </text:list-item>
      </text:list>
      <text:p text:style-name="Text_20_body">The JPEG stego engine reports:</text:p>
      <text:p text:style-name="Preformatted_20_Text"><text:span text:style-name="Source_20_Text">High-frequency anomalies detected</text:span></text:p>
      <text:p text:style-name="Preformatted_20_Text"><text:span text:style-name="Source_20_Text">LSB uniformity suspicious</text:span></text:p>
      <text:p text:style-name="P1"><text:span text:style-name="Source_20_Text">RS imbalance: HIGH</text:span></text:p>
      <text:p text:style-name="Text_20_body">This strongly suggests hidden data.</text:p>
      <text:p text:style-name="Horizontal_20_Line"/>
      <text:h text:style-name="Heading_20_2" text:outline-level="2"><text:span text:style-name="Strong_20_Emphasis">8.1.7 Step 6 — Extract Hidden Payload</text:span></text:h>
      <text:p text:style-name="Text_20_body">The analyst uses external stego tools or manual extraction based on Opus’s findings. The hidden payload is recovered — a ZIP file containing a text document with the final flag.</text:p>
      <text:p text:style-name="Horizontal_20_Line"/>
      <text:h text:style-name="Heading_20_2" text:outline-level="2"><text:span text:style-name="Strong_20_Emphasis">8.1.8 Summary</text:span></text:h>
      <text:p text:style-name="Text_20_body">This workflow demonstrates how Opus supports:</text:p>
      <text:list xml:id="list2807759663" text:style-name="L142">
        <text:list-item>
          <text:p text:style-name="P67">layered extraction </text:p>
        </text:list-item>
        <text:list-item>
          <text:p text:style-name="P67">steganalysis </text:p>
        </text:list-item>
        <text:list-item>
          <text:p text:style-name="P67">entropy interpretation </text:p>
        </text:list-item>
        <text:list-item>
          <text:p text:style-name="P67">recursive descent </text:p>
        </text:list-item>
        <text:list-item>
          <text:p text:style-name="P66">structured investigation </text:p>
        </text:list-item>
      </text:list>
      <text:p text:style-name="Text_20_body">It also shows how Opus’s transparency helps analysts understand each step.</text:p>
      <text:p text:style-name="Horizontal_20_Line"/>
      <text:h text:style-name="Heading_20_1" text:outline-level="1">====================================</text:h>
      <text:h text:style-name="Heading_20_1" text:outline-level="1"><text:span text:style-name="Strong_20_Emphasis">8.2 JPEG STEGO INVESTIGATION WORKFLOW</text:span></text:h>
      <text:h text:style-name="Heading_20_1" text:outline-level="1">====================================</text:h>
      <text:p text:style-name="Text_20_body">This workflow focuses on a single JPEG suspected of containing hidden data.</text:p>
      <text:p text:style-name="Horizontal_20_Line"/>
      <text:h text:style-name="Heading_20_2" text:outline-level="2"><text:soft-page-break/><text:span text:style-name="Strong_20_Emphasis">8.2.1 Step 1 — Load and Inspect</text:span></text:h>
      <text:p text:style-name="Text_20_body">The analyst runs:</text:p>
      <text:list xml:id="list3546103503" text:style-name="L143">
        <text:list-item>
          <text:p text:style-name="P69"><text:a xlink:type="simple" xlink:href="guide://action?prefill=Tell%20me%20more%20about%3A%20J" text:style-name="Internet_20_link" text:visited-style-name="Visited_20_Internet_20_Link"><text:span text:style-name="Strong_20_Emphasis">J</text:span></text:a> </text:p>
        </text:list-item>
        <text:list-item>
          <text:p text:style-name="P69"><text:a xlink:type="simple" xlink:href="guide://action?prefill=Tell%20me%20more%20about%3A%20JLSB" text:style-name="Internet_20_link" text:visited-style-name="Visited_20_Internet_20_Link"><text:span text:style-name="Strong_20_Emphasis">JLSB</text:span></text:a> </text:p>
        </text:list-item>
        <text:list-item>
          <text:p text:style-name="P69"><text:a xlink:type="simple" xlink:href="guide://action?prefill=Tell%20me%20more%20about%3A%20JCHI" text:style-name="Internet_20_link" text:visited-style-name="Visited_20_Internet_20_Link"><text:span text:style-name="Strong_20_Emphasis">JCHI</text:span></text:a> </text:p>
        </text:list-item>
        <text:list-item>
          <text:p text:style-name="P68"><text:a xlink:type="simple" xlink:href="guide://action?prefill=Tell%20me%20more%20about%3A%20JDCT" text:style-name="Internet_20_link" text:visited-style-name="Visited_20_Internet_20_Link"><text:span text:style-name="Strong_20_Emphasis">JDCT</text:span></text:a> </text:p>
        </text:list-item>
      </text:list>
      <text:p text:style-name="Text_20_body">The summary indicates:</text:p>
      <text:list xml:id="list1329022696" text:style-name="L144">
        <text:list-item>
          <text:p text:style-name="P71">LSB anomalies </text:p>
        </text:list-item>
        <text:list-item>
          <text:p text:style-name="P71">chi‑square deviations </text:p>
        </text:list-item>
        <text:list-item>
          <text:p text:style-name="P70">DCT irregularities </text:p>
        </text:list-item>
      </text:list>
      <text:p text:style-name="Horizontal_20_Line"/>
      <text:h text:style-name="Heading_20_2" text:outline-level="2"><text:span text:style-name="Strong_20_Emphasis">8.2.2 Step 2 — Identify Embedding Method</text:span></text:h>
      <text:p text:style-name="Text_20_body">Based on anomalies:</text:p>
      <text:list xml:id="list958621210" text:style-name="L145">
        <text:list-item>
          <text:p text:style-name="P73">uniform LSBs → LSB embedding </text:p>
        </text:list-item>
        <text:list-item>
          <text:p text:style-name="P73">high‑frequency DCT anomalies → DCT stego </text:p>
        </text:list-item>
        <text:list-item>
          <text:p text:style-name="P72">non‑standard Huffman tables → custom encoder </text:p>
        </text:list-item>
      </text:list>
      <text:p text:style-name="Horizontal_20_Line"/>
      <text:h text:style-name="Heading_20_2" text:outline-level="2"><text:span text:style-name="Strong_20_Emphasis">8.2.3 Step 3 — Extract Payload</text:span></text:h>
      <text:p text:style-name="Text_20_body">Opus does not extract stego payloads directly, but its analysis guides the analyst to the correct extraction method.</text:p>
      <text:p text:style-name="Horizontal_20_Line"/>
      <text:h text:style-name="Heading_20_1" text:outline-level="1">====================================</text:h>
      <text:h text:style-name="Heading_20_1" text:outline-level="1"><text:span text:style-name="Strong_20_Emphasis">8.3 VIGENÈRE CRACKING WORKFLOW</text:span></text:h>
      <text:h text:style-name="Heading_20_1" text:outline-level="1">====================================</text:h>
      <text:p text:style-name="Text_20_body">This workflow demonstrates how Opus solves a Vigenère cipher.</text:p>
      <text:p text:style-name="Horizontal_20_Line"/>
      <text:h text:style-name="Heading_20_2" text:outline-level="2"><text:soft-page-break/><text:span text:style-name="Strong_20_Emphasis">8.3.1 Step 1 — Key Length Estimation</text:span></text:h>
      <text:p text:style-name="Text_20_body">The analyst runs:</text:p>
      <text:list xml:id="list75160816" text:style-name="L146">
        <text:list-item>
          <text:p text:style-name="P74"><text:a xlink:type="simple" xlink:href="guide://action?prefill=Tell%20me%20more%20about%3A%20VIGLEN" text:style-name="Internet_20_link" text:visited-style-name="Visited_20_Internet_20_Link"><text:span text:style-name="Strong_20_Emphasis">VIGLEN</text:span></text:a> </text:p>
        </text:list-item>
      </text:list>
      <text:p text:style-name="Text_20_body">Opus reports:</text:p>
      <text:p text:style-name="P1"><text:span text:style-name="Source_20_Text">Likely key lengths: 7, 14, 21</text:span></text:p>
      <text:p text:style-name="Horizontal_20_Line"/>
      <text:h text:style-name="Heading_20_2" text:outline-level="2"><text:span text:style-name="Strong_20_Emphasis">8.3.2 Step 2 — Full Solve</text:span></text:h>
      <text:p text:style-name="Text_20_body">The analyst runs:</text:p>
      <text:p text:style-name="P1"><text:span text:style-name="Source_20_Text">VIG</text:span></text:p>
      <text:p text:style-name="Text_20_body">The solver performs:</text:p>
      <text:list xml:id="list2675754441" text:style-name="L147">
        <text:list-item>
          <text:p text:style-name="P76">IC analysis </text:p>
        </text:list-item>
        <text:list-item>
          <text:p text:style-name="P76">Kasiski examination </text:p>
        </text:list-item>
        <text:list-item>
          <text:p text:style-name="P76">quadgram scoring </text:p>
        </text:list-item>
        <text:list-item>
          <text:p text:style-name="P76">hillclimb refinement </text:p>
        </text:list-item>
        <text:list-item>
          <text:p text:style-name="P75">multi‑threaded restarts </text:p>
        </text:list-item>
      </text:list>
      <text:p text:style-name="Text_20_body">The plaintext is recovered.</text:p>
      <text:p text:style-name="Horizontal_20_Line"/>
      <text:h text:style-name="Heading_20_1" text:outline-level="1">====================================</text:h>
      <text:h text:style-name="Heading_20_1" text:outline-level="1"><text:span text:style-name="Strong_20_Emphasis">8.4 SUBSTITUTION SOLVER WORKFLOW</text:span></text:h>
      <text:h text:style-name="Heading_20_1" text:outline-level="1">====================================</text:h>
      <text:p text:style-name="Text_20_body">This workflow demonstrates how Opus cracks a monoalphabetic substitution cipher.</text:p>
      <text:p text:style-name="Horizontal_20_Line"/>
      <text:h text:style-name="Heading_20_2" text:outline-level="2"><text:span text:style-name="Strong_20_Emphasis">8.4.1 Step 1 — Frequency Analysis</text:span></text:h>
      <text:p text:style-name="Text_20_body">The analyst runs:</text:p>
      <text:list xml:id="list2946814209" text:style-name="L148">
        <text:list-item>
          <text:p text:style-name="P77"><text:a xlink:type="simple" xlink:href="guide://action?prefill=Tell%20me%20more%20about%3A%20FREQ" text:style-name="Internet_20_link" text:visited-style-name="Visited_20_Internet_20_Link"><text:span text:style-name="Strong_20_Emphasis">FREQ</text:span></text:a> </text:p>
        </text:list-item>
      </text:list>
      <text:p text:style-name="Horizontal_20_Line"/>
      <text:h text:style-name="Heading_20_2" text:outline-level="2"><text:soft-page-break/><text:span text:style-name="Strong_20_Emphasis">8.4.2 Step 2 — Invoke Solver</text:span></text:h>
      <text:p text:style-name="P1"><text:span text:style-name="Source_20_Text">SUB</text:span></text:p>
      <text:p text:style-name="Text_20_body">The solver performs:</text:p>
      <text:list xml:id="list668142329" text:style-name="L149">
        <text:list-item>
          <text:p text:style-name="P79">mutation cycles </text:p>
        </text:list-item>
        <text:list-item>
          <text:p text:style-name="P79">quadgram scoring </text:p>
        </text:list-item>
        <text:list-item>
          <text:p text:style-name="P78">multi‑threaded refinement </text:p>
        </text:list-item>
      </text:list>
      <text:p text:style-name="Text_20_body">Plaintext emerges.</text:p>
      <text:p text:style-name="Horizontal_20_Line"/>
      <text:h text:style-name="Heading_20_1" text:outline-level="1">====================================</text:h>
      <text:h text:style-name="Heading_20_1" text:outline-level="1"><text:span text:style-name="Strong_20_Emphasis">8.5 RSA FACTORIZATION WORKFLOW</text:span></text:h>
      <text:h text:style-name="Heading_20_1" text:outline-level="1">====================================</text:h>
      <text:p text:style-name="Text_20_body">This workflow demonstrates how Opus handles a weak RSA modulus.</text:p>
      <text:p text:style-name="Horizontal_20_Line"/>
      <text:h text:style-name="Heading_20_2" text:outline-level="2"><text:span text:style-name="Strong_20_Emphasis">8.5.1 Step 1 — Inspect Key</text:span></text:h>
      <text:p text:style-name="Text_20_body">The analyst runs:</text:p>
      <text:list xml:id="list2091266068" text:style-name="L150">
        <text:list-item>
          <text:p text:style-name="P80"><text:a xlink:type="simple" xlink:href="guide://action?prefill=Tell%20me%20more%20about%3A%20RSAPUB" text:style-name="Internet_20_link" text:visited-style-name="Visited_20_Internet_20_Link"><text:span text:style-name="Strong_20_Emphasis">RSAPUB</text:span></text:a> </text:p>
        </text:list-item>
      </text:list>
      <text:p text:style-name="Text_20_body">Opus reports:</text:p>
      <text:p text:style-name="Preformatted_20_Text"><text:span text:style-name="Source_20_Text">Bit length: 34 bits</text:span></text:p>
      <text:p text:style-name="P1"><text:span text:style-name="Source_20_Text">Notes: Modulus unusually small</text:span></text:p>
      <text:p text:style-name="Horizontal_20_Line"/>
      <text:h text:style-name="Heading_20_2" text:outline-level="2"><text:span text:style-name="Strong_20_Emphasis">8.5.2 Step 2 — Factor</text:span></text:h>
      <text:p text:style-name="P1"><text:span text:style-name="Source_20_Text">RSA</text:span></text:p>
      <text:p text:style-name="Text_20_body">Opus recovers:</text:p>
      <text:list xml:id="list2950497820" text:style-name="L151">
        <text:list-item>
          <text:p text:style-name="P82">p </text:p>
        </text:list-item>
        <text:list-item>
          <text:p text:style-name="P82">q </text:p>
        </text:list-item>
        <text:list-item>
          <text:p text:style-name="P82">φ(N) </text:p>
        </text:list-item>
        <text:list-item>
          <text:p text:style-name="P81">d </text:p>
        </text:list-item>
      </text:list>
      <text:p text:style-name="Horizontal_20_Line"><text:soft-page-break/></text:p>
      <text:h text:style-name="Heading_20_1" text:outline-level="1">====================================</text:h>
      <text:h text:style-name="Heading_20_1" text:outline-level="1"><text:span text:style-name="Strong_20_Emphasis">8.6 ELF TRIAGE WORKFLOW</text:span></text:h>
      <text:h text:style-name="Heading_20_1" text:outline-level="1">====================================</text:h>
      <text:p text:style-name="Text_20_body">This workflow demonstrates how Opus inspects an unknown binary.</text:p>
      <text:p text:style-name="Horizontal_20_Line"/>
      <text:h text:style-name="Heading_20_2" text:outline-level="2"><text:span text:style-name="Strong_20_Emphasis">8.6.1 Step 1 — ELF Inspection</text:span></text:h>
      <text:p text:style-name="Text_20_body">The analyst runs:</text:p>
      <text:list xml:id="list1853415248" text:style-name="L152">
        <text:list-item>
          <text:p text:style-name="P84"><text:a xlink:type="simple" xlink:href="guide://action?prefill=Tell%20me%20more%20about%3A%20ELF" text:style-name="Internet_20_link" text:visited-style-name="Visited_20_Internet_20_Link"><text:span text:style-name="Strong_20_Emphasis">ELF</text:span></text:a> </text:p>
        </text:list-item>
        <text:list-item>
          <text:p text:style-name="P84"><text:a xlink:type="simple" xlink:href="guide://action?prefill=Tell%20me%20more%20about%3A%20SECT" text:style-name="Internet_20_link" text:visited-style-name="Visited_20_Internet_20_Link"><text:span text:style-name="Strong_20_Emphasis">SECT</text:span></text:a> </text:p>
        </text:list-item>
        <text:list-item>
          <text:p text:style-name="P83"><text:a xlink:type="simple" xlink:href="guide://action?prefill=Tell%20me%20more%20about%3A%20SYM" text:style-name="Internet_20_link" text:visited-style-name="Visited_20_Internet_20_Link"><text:span text:style-name="Strong_20_Emphasis">SYM</text:span></text:a> </text:p>
        </text:list-item>
      </text:list>
      <text:p text:style-name="Horizontal_20_Line"/>
      <text:h text:style-name="Heading_20_2" text:outline-level="2"><text:span text:style-name="Strong_20_Emphasis">8.6.2 Step 2 — PIE Base Estimation</text:span></text:h>
      <text:p text:style-name="Text_20_body">If a leak is available:</text:p>
      <text:list xml:id="list1033326536" text:style-name="L153">
        <text:list-item>
          <text:p text:style-name="P85"><text:a xlink:type="simple" xlink:href="guide://action?prefill=Tell%20me%20more%20about%3A%20PIECALC" text:style-name="Internet_20_link" text:visited-style-name="Visited_20_Internet_20_Link"><text:span text:style-name="Strong_20_Emphasis">PIECALC</text:span></text:a> </text:p>
        </text:list-item>
      </text:list>
      <text:p text:style-name="Horizontal_20_Line"/>
      <text:h text:style-name="Heading_20_1" text:outline-level="1"><text:span text:style-name="Strong_20_Emphasis"/></text:h>
      <text:p text:style-name="Text_20_body"><text:span text:style-name="Strong_20_Emphasis"/></text:p>
      <text:p text:style-name="Text_20_body"><text:span text:style-name="Strong_20_Emphasis"/></text:p>
      <text:h text:style-name="Heading_20_1" text:outline-level="1"><text:soft-page-break/>====================================</text:h>
      <text:h text:style-name="Heading_20_1" text:outline-level="1"><text:span text:style-name="Strong_20_Emphasis">CHAPTER 9 — DIAGRAM APPENDIX</text:span></text:h>
      <text:h text:style-name="Heading_20_1" text:outline-level="1">====================================</text:h>
      <text:p text:style-name="Text_20_body">The Diagram Appendix provides a complete set of ASCII diagrams that illustrate the internal architecture, workflows, and subsystems of Opus. These diagrams are designed to be readable in any monospaced environment, including terminals, text editors, and .odt exports. They serve as visual anchors for the conceptual material presented in earlier chapters, helping analysts build mental models of how Opus operates.</text:p>
      <text:p text:style-name="Text_20_body">Each diagram is crafted to be structurally clear, visually balanced, and semantically meaningful. They are not decorative; they are functional tools for understanding Opus’s internal logic.</text:p>
      <text:h text:style-name="Heading_20_1" text:outline-level="1">====================================</text:h>
      <text:h text:style-name="Heading_20_1" text:outline-level="1"><text:span text:style-name="Strong_20_Emphasis">9.1 EXTRACTION ENGINE DIAGRAM</text:span></text:h>
      <text:h text:style-name="Heading_20_1" text:outline-level="1">====================================</text:h>
      <text:p text:style-name="Text_20_body"/>
      <text:p text:style-name="Preformatted_20_Text"><text:span text:style-name="Source_20_Text"><text:s text:c="17"/>+---------------------------+</text:span></text:p>
      <text:p text:style-name="Preformatted_20_Text"><text:span text:style-name="Source_20_Text"><text:s text:c="17"/>| <text:s text:c="4"/>Extraction Engine <text:s text:c="4"/>|</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4"/>Format Detection <text:s text:c="5"/>|</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6"/>Decompression <text:s text:c="6"/>|</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2"/>Suffix Normalization <text:s text:c="3"/>|</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6"/>File Carving <text:s text:c="7"/>|</text:span></text:p>
      <text:p text:style-name="Preformatted_20_Text"><text:span text:style-name="Source_20_Text"><text:s text:c="17"/>+---------------------------+</text:span></text:p>
      <text:p text:style-name="Preformatted_20_Text"><text:soft-page-break/><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3"/>String Intelligence <text:s text:c="3"/>|</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4"/>Entropy Analysis <text:s text:c="5"/>|</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4"/>Recursive Descent <text:s text:c="4"/>|</text:span></text:p>
      <text:p text:style-name="P1"><text:span text:style-name="Source_20_Text"><text:s text:c="17"/>+---------------------------+</text:span></text:p>
      <text:p text:style-name="Text_20_body">This diagram illustrates the <text:a xlink:type="simple" xlink:href="guide://action?prefill=Tell%20me%20more%20about%3A%20multi‑stage%20extraction%20pipeline" text:style-name="Internet_20_link" text:visited-style-name="Visited_20_Internet_20_Link"><text:span text:style-name="Strong_20_Emphasis">multi‑stage extraction pipeline</text:span></text:a> that powers Opus’s recursive unwrapping capabilities.</text:p>
      <text:p text:style-name="Horizontal_20_Line"/>
      <text:h text:style-name="Heading_20_1" text:outline-level="1">====================================</text:h>
      <text:h text:style-name="Heading_20_1" text:outline-level="1"><text:span text:style-name="Strong_20_Emphasis">9.2 FILE CARVER DIAGRAM</text:span></text:h>
      <text:h text:style-name="Heading_20_1" text:outline-level="1">====================================</text:h>
      <text:p text:style-name="Preformatted_20_Text"><text:span text:style-name="Source_20_Text"><text:s text:c="17"/>+---------------------------+</text:span></text:p>
      <text:p text:style-name="Preformatted_20_Text"><text:span text:style-name="Source_20_Text"><text:s text:c="17"/>| <text:s text:c="7"/>File Carver <text:s text:c="7"/>|</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2"/>Signature Scanning <text:s text:c="5"/>|</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2"/>Boundary Estimation <text:s text:c="4"/>|</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3"/>Length Inference <text:s text:c="6"/>|</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4"/>Safe Extraction <text:s text:c="6"/>|</text:span></text:p>
      <text:p text:style-name="P1"><text:span text:style-name="Source_20_Text"><text:s text:c="17"/>+---------------------------+</text:span></text:p>
      <text:p text:style-name="Text_20_body">This diagram shows the <text:a xlink:type="simple" xlink:href="guide://action?prefill=Tell%20me%20more%20about%3A%20signature‑driven%20carving%20workflow" text:style-name="Internet_20_link" text:visited-style-name="Visited_20_Internet_20_Link"><text:span text:style-name="Strong_20_Emphasis">signature‑driven carving workflow</text:span></text:a> used to recover embedded files.</text:p>
      <text:h text:style-name="Heading_20_1" text:outline-level="1"><text:soft-page-break/>====================================</text:h>
      <text:h text:style-name="Heading_20_1" text:outline-level="1"><text:span text:style-name="Strong_20_Emphasis">9.3 ENTROPY ENGINE DIAGRAM</text:span></text:h>
      <text:h text:style-name="Heading_20_1" text:outline-level="1">====================================</text:h>
      <text:p text:style-name="Text_20_body"/>
      <text:p text:style-name="Preformatted_20_Text"><text:span text:style-name="Source_20_Text"><text:s text:c="17"/>+---------------------------+</text:span></text:p>
      <text:p text:style-name="Preformatted_20_Text"><text:span text:style-name="Source_20_Text"><text:s text:c="17"/>| <text:s text:c="6"/>Entropy Engine <text:s text:c="5"/>|</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4"/>Global Entropy <text:s text:c="7"/>|</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2"/>Block-Level Entropy <text:s text:c="4"/>|</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6"/>LSB Entropy <text:s text:c="8"/>|</text:span></text:p>
      <text:p text:style-name="P1"><text:span text:style-name="Source_20_Text"><text:s text:c="17"/>+---------------------------+</text:span></text:p>
      <text:p text:style-name="Text_20_body">This diagram visualizes the <text:a xlink:type="simple" xlink:href="guide://action?prefill=Tell%20me%20more%20about%3A%20entropy%20analysis%20hierarchy" text:style-name="Internet_20_link" text:visited-style-name="Visited_20_Internet_20_Link"><text:span text:style-name="Strong_20_Emphasis">entropy analysis hierarchy</text:span></text:a> used to detect compression, encryption, and steganography.</text:p>
      <text:p text:style-name="Horizontal_20_Line"/>
      <text:h text:style-name="Heading_20_1" text:outline-level="1">====================================</text:h>
      <text:h text:style-name="Heading_20_1" text:outline-level="1"><text:span text:style-name="Strong_20_Emphasis">9.4 STRING INTELLIGENCE ENGINE DIAGRAM</text:span></text:h>
      <text:h text:style-name="Heading_20_1" text:outline-level="1">====================================</text:h>
      <text:p text:style-name="Text_20_body"/>
      <text:p text:style-name="Preformatted_20_Text"><text:span text:style-name="Source_20_Text"><text:s text:c="17"/>+---------------------------+</text:span></text:p>
      <text:p text:style-name="Preformatted_20_Text"><text:span text:style-name="Source_20_Text"><text:s text:c="17"/>| <text:s/>String Intelligence Eng. |</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oft-page-break/><text:span text:style-name="Source_20_Text"><text:s text:c="17"/>+---------------------------+</text:span></text:p>
      <text:p text:style-name="Preformatted_20_Text"><text:span text:style-name="Source_20_Text"><text:s text:c="17"/>| <text:s text:c="4"/>ASCII Detection <text:s text:c="6"/>|</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4"/>UTF-8 Validation <text:s text:c="5"/>|</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text:s text:c="3"/>Base64 Heuristics <text:s text:c="5"/>|</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17"/>+---------------------------+</text:span></text:p>
      <text:p text:style-name="Preformatted_20_Text"><text:span text:style-name="Source_20_Text"><text:s text:c="17"/>| URL/Email Extraction <text:s text:c="5"/>|</text:span></text:p>
      <text:p text:style-name="P1"><text:span text:style-name="Source_20_Text"><text:s text:c="17"/>+---------------------------+</text:span></text:p>
      <text:p text:style-name="Text_20_body">This diagram illustrates the <text:a xlink:type="simple" xlink:href="guide://action?prefill=Tell%20me%20more%20about%3A%20multi‑layer%20string%20detection%20pipeline" text:style-name="Internet_20_link" text:visited-style-name="Visited_20_Internet_20_Link"><text:span text:style-name="Strong_20_Emphasis">multi‑layer string detection pipeline</text:span></text:a>.</text:p>
      <text:p text:style-name="Horizontal_20_Line"/>
      <text:h text:style-name="Heading_20_1" text:outline-level="1">====================================</text:h>
      <text:h text:style-name="Heading_20_1" text:outline-level="1"><text:span text:style-name="Strong_20_Emphasis">9.5 JPEG STEGO ENGINE DIAGRAM</text:span></text:h>
      <text:h text:style-name="Heading_20_1" text:outline-level="1">====================================</text:h>
      <text:p text:style-name="Text_20_body"/>
      <text:p text:style-name="Preformatted_20_Text"><text:span text:style-name="Source_20_Text"><text:s text:c="17"/>+---------------------------+</text:span></text:p>
      <text:p text:style-name="Preformatted_20_Text"><text:span text:style-name="Source_20_Text"><text:s text:c="17"/>| <text:s text:c="4"/>JPEG Stego Engine <text:s text:c="4"/>|</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5"/>LSB Analysis <text:s text:c="18"/>|</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2"/>Chi-Square Testing <text:s text:c="15"/>|</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5"/>RS Analysis <text:s text:c="19"/>|</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2"/>DCT Coefficient Scan <text:s text:c="13"/>|</text:span></text:p>
      <text:p text:style-name="Preformatted_20_Text"><text:soft-page-break/><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0"/>Huffman Table Fingerprint <text:s text:c="10"/>|</text:span></text:p>
      <text:p text:style-name="P1"><text:span text:style-name="Source_20_Text"><text:s text:c="9"/>+-----------------------------------------------+</text:span></text:p>
      <text:p text:style-name="Text_20_body">This diagram captures the <text:a xlink:type="simple" xlink:href="guide://action?prefill=Tell%20me%20more%20about%3A%20full%20JPEG%20steganalysis%20pipeline" text:style-name="Internet_20_link" text:visited-style-name="Visited_20_Internet_20_Link"><text:span text:style-name="Strong_20_Emphasis">full JPEG steganalysis pipeline</text:span></text:a>.</text:p>
      <text:p text:style-name="Horizontal_20_Line"/>
      <text:h text:style-name="Heading_20_1" text:outline-level="1">====================================</text:h>
      <text:h text:style-name="Heading_20_1" text:outline-level="1"><text:span text:style-name="Strong_20_Emphasis">9.6 CRYPTANALYSIS ENGINE DIAGRAM</text:span></text:h>
      <text:h text:style-name="Heading_20_1" text:outline-level="1">====================================</text:h>
      <text:p text:style-name="Text_20_body"/>
      <text:p text:style-name="Preformatted_20_Text"><text:span text:style-name="Source_20_Text"><text:s text:c="17"/>+---------------------------+</text:span></text:p>
      <text:p text:style-name="Preformatted_20_Text"><text:span text:style-name="Source_20_Text"><text:s text:c="17"/>| <text:s text:c="2"/>Cryptanalysis Engine <text:s text:c="3"/>|</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9"/>Key-Length Estimation (IC) <text:s text:c="10"/>|</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6"/>Initial Key Guess (Frequency) <text:s text:c="10"/>|</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8"/>Hillclimb Refinement (Quadgrams) <text:s text:c="5"/>|</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8"/>Multi-Threaded Restarts <text:s text:c="14"/>|</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3"/>Best-Score Tracking <text:s text:c="13"/>|</text:span></text:p>
      <text:p text:style-name="P1"><text:span text:style-name="Source_20_Text"><text:s text:c="9"/>+-----------------------------------------------+</text:span></text:p>
      <text:p text:style-name="Text_20_body">This diagram shows the <text:a xlink:type="simple" xlink:href="guide://action?prefill=Tell%20me%20more%20about%3A%20multi‑stage%20cryptanalysis%20refinement%20loop" text:style-name="Internet_20_link" text:visited-style-name="Visited_20_Internet_20_Link"><text:span text:style-name="Strong_20_Emphasis">multi‑stage cryptanalysis refinement loop</text:span></text:a>.</text:p>
      <text:p text:style-name="Horizontal_20_Line"/>
      <text:h text:style-name="Heading_20_1" text:outline-level="1"><text:soft-page-break/>====================================</text:h>
      <text:h text:style-name="Heading_20_1" text:outline-level="1"><text:span text:style-name="Strong_20_Emphasis">9.7 THREAD POOL DIAGRAM</text:span></text:h>
      <text:h text:style-name="Heading_20_1" text:outline-level="1">====================================</text:h>
      <text:p text:style-name="Text_20_body"/>
      <text:p text:style-name="Preformatted_20_Text"><text:span text:style-name="Source_20_Text"><text:s text:c="17"/>+---------------------------+</text:span></text:p>
      <text:p text:style-name="Preformatted_20_Text"><text:span text:style-name="Source_20_Text"><text:s text:c="17"/>| <text:s text:c="7"/>Thread Pool <text:s text:c="7"/>|</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1"/>Task Submission Queue <text:s text:c="13"/>|</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1"/>Worker Thread Dispatch <text:s text:c="12"/>|</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0"/>Status Line Integration <text:s text:c="12"/>|</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3"/>Safe Shutdown Logic <text:s text:c="13"/>|</text:span></text:p>
      <text:p text:style-name="P1"><text:span text:style-name="Source_20_Text"><text:s text:c="9"/>+-----------------------------------------------+</text:span></text:p>
      <text:p text:style-name="Text_20_body">This diagram illustrates the <text:a xlink:type="simple" xlink:href="guide://action?prefill=Tell%20me%20more%20about%3A%20parallel%20execution%20model" text:style-name="Internet_20_link" text:visited-style-name="Visited_20_Internet_20_Link"><text:span text:style-name="Strong_20_Emphasis">parallel execution model</text:span></text:a> that keeps Opus responsive.</text:p>
      <text:h text:style-name="Heading_20_1" text:outline-level="1">====================================</text:h>
      <text:h text:style-name="Heading_20_1" text:outline-level="1"><text:span text:style-name="Strong_20_Emphasis">9.8 SAFETY MODEL DIAGRAM</text:span></text:h>
      <text:h text:style-name="Heading_20_1" text:outline-level="1">====================================</text:h>
      <text:p text:style-name="Text_20_body"/>
      <text:p text:style-name="Preformatted_20_Text"><text:span text:style-name="Source_20_Text"><text:s text:c="17"/>+---------------------------+</text:span></text:p>
      <text:p text:style-name="Preformatted_20_Text"><text:span text:style-name="Source_20_Text"><text:s text:c="17"/>| <text:s text:c="7"/>Safety Model <text:s text:c="6"/>|</text:span></text:p>
      <text:p text:style-name="Preformatted_20_Text"><text:span text:style-name="Source_20_Text"><text:s text:c="17"/>+---------------------------+</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oft-page-break/><text:span text:style-name="Source_20_Text"><text:s text:c="9"/>| <text:s text:c="10"/>No-Overwrite Guarantee <text:s text:c="13"/>|</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0"/>Controlled File I/O <text:s text:c="16"/>|</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11"/>Recursion Depth Limits <text:s text:c="12"/>|</text:span></text:p>
      <text:p text:style-name="Preformatted_20_Text"><text:span text:style-name="Source_20_Text"><text:s text:c="9"/>+-----------------------------------------------+</text:span></text:p>
      <text:p text:style-name="Preformatted_20_Text"><text:span text:style-name="Source_20_Text"><text:s text:c="30"/>|</text:span></text:p>
      <text:p text:style-name="Preformatted_20_Text"><text:span text:style-name="Source_20_Text"><text:s text:c="30"/>v</text:span></text:p>
      <text:p text:style-name="Preformatted_20_Text"><text:span text:style-name="Source_20_Text"><text:s text:c="9"/>+-----------------------------------------------+</text:span></text:p>
      <text:p text:style-name="Preformatted_20_Text"><text:span text:style-name="Source_20_Text"><text:s text:c="9"/>| <text:s text:c="8"/>Directory Isolation Rules <text:s text:c="12"/>|</text:span></text:p>
      <text:p text:style-name="P1"><text:span text:style-name="Source_20_Text"><text:s text:c="9"/>+-----------------------------------------------+</text:span></text:p>
      <text:p text:style-name="Text_20_body">This diagram visualizes the <text:a xlink:type="simple" xlink:href="guide://action?prefill=Tell%20me%20more%20about%3A%20forensic%20safety%20guarantees" text:style-name="Internet_20_link" text:visited-style-name="Visited_20_Internet_20_Link"><text:span text:style-name="Strong_20_Emphasis">forensic safety guarantees</text:span></text:a> built into Opus.</text:p>
      <text:h text:style-name="Heading_20_1" text:outline-level="1">====================================</text:h>
      <text:h text:style-name="Heading_20_1" text:outline-level="1"><text:span text:style-name="Strong_20_Emphasis">CHAPTER 10 — TECHNICAL APPENDIX</text:span></text:h>
      <text:h text:style-name="Heading_20_1" text:outline-level="1">====================================</text:h>
      <text:p text:style-name="Text_20_body">The Technical Appendix provides the mathematical, statistical, and algorithmic foundations underlying Opus’s forensic and cryptanalytic subsystems. While earlier chapters focused on architecture, workflows, and user‑facing behavior, this chapter dives into the <text:span text:style-name="Strong_20_Emphasis">theory</text:span> behind Opus — the formulas, heuristics, scoring systems, and structural rules that govern its internal logic.</text:p>
      <text:p text:style-name="Text_20_body">This chapter is intentionally exhaustive. It is designed to serve as a reference for analysts who want to understand not only <text:span text:style-name="Emphasis">how</text:span> Opus works, but <text:span text:style-name="Emphasis">why</text:span> it works the way it does. It is also a valuable resource for developers extending Opus or integrating its logic into other forensic systems.</text:p>
      <text:p text:style-name="Horizontal_20_Line"/>
      <text:h text:style-name="Heading_20_1" text:outline-level="1"><text:soft-page-break/>====================================</text:h>
      <text:h text:style-name="Heading_20_1" text:outline-level="1"><text:span text:style-name="Strong_20_Emphasis">10.1 ENTROPY MATH</text:span></text:h>
      <text:h text:style-name="Heading_20_1" text:outline-level="1">====================================</text:h>
      <text:p text:style-name="Text_20_body">Entropy is one of the most important statistical tools in digital forensics. Opus uses Shannon entropy to measure the randomness of data, helping analysts distinguish between structured content, compressed data, encrypted data, and steganographically modified content.</text:p>
      <text:p text:style-name="Horizontal_20_Line"/>
      <text:h text:style-name="Heading_20_2" text:outline-level="2"><text:span text:style-name="Strong_20_Emphasis">10.1.1 Shannon Entropy Formula</text:span></text:h>
      <text:p text:style-name="Text_20_body">For a byte distribution ( p(x) ), entropy is defined as:</text:p>
      <text:p text:style-name="Text_20_body">[ H = -\sum_{x=0}^{255} p(x) \log_2 p(x) ]</text:p>
      <text:p text:style-name="Text_20_body">Where:</text:p>
      <text:list xml:id="list1005411869" text:style-name="L154">
        <text:list-item>
          <text:p text:style-name="P87">( p(x) ) is the probability of byte value ( x ) </text:p>
        </text:list-item>
        <text:list-item>
          <text:p text:style-name="P87">entropy is measured in bits per byte </text:p>
        </text:list-item>
        <text:list-item>
          <text:p text:style-name="P86">maximum entropy is 8.0 bits/byte </text:p>
        </text:list-item>
      </text:list>
      <text:p text:style-name="Horizontal_20_Line"/>
      <text:h text:style-name="Heading_20_2" text:outline-level="2"><text:span text:style-name="Strong_20_Emphasis">10.1.2 Interpretation Ranges</text:span></text:h>
      <text:p text:style-name="Text_20_body">Opus uses the following heuristic ranges:</text:p>
      <text:list xml:id="list2842912583" text:style-name="L155">
        <text:list-item>
          <text:p text:style-name="P89"><text:span text:style-name="Strong_20_Emphasis">0.0–3.0</text:span> → highly structured </text:p>
        </text:list-item>
        <text:list-item>
          <text:p text:style-name="P89"><text:span text:style-name="Strong_20_Emphasis">3.0–5.0</text:span> → partially structured </text:p>
        </text:list-item>
        <text:list-item>
          <text:p text:style-name="P89"><text:span text:style-name="Strong_20_Emphasis">5.0–7.0</text:span> → mixed content </text:p>
        </text:list-item>
        <text:list-item>
          <text:p text:style-name="P88"><text:span text:style-name="Strong_20_Emphasis">7.0–8.0</text:span> → compressed or encrypted </text:p>
        </text:list-item>
      </text:list>
      <text:p text:style-name="Text_20_body">These ranges are used throughout Opus’s <text:span text:style-name="Strong_20_Emphasis">entropy interpretation</text:span> subsystem.</text:p>
      <text:p text:style-name="Horizontal_20_Line"/>
      <text:h text:style-name="Heading_20_2" text:outline-level="2"><text:span text:style-name="Strong_20_Emphasis">10.1.3 Block‑Level Entropy</text:span></text:h>
      <text:p text:style-name="Text_20_body">Opus divides files into blocks (default: 4096 bytes) and computes entropy per block. This produces a <text:span text:style-name="Strong_20_Emphasis">heatmap</text:span> that reveals:</text:p>
      <text:list xml:id="list1319049690" text:style-name="L156">
        <text:list-item>
          <text:p text:style-name="P91">compressed segments </text:p>
        </text:list-item>
        <text:list-item>
          <text:p text:style-name="P91">encrypted payloads </text:p>
        </text:list-item>
        <text:list-item>
          <text:p text:style-name="P91">embedded archives </text:p>
        </text:list-item>
        <text:list-item>
          <text:p text:style-name="P90"><text:soft-page-break/>steganographic anomalies </text:p>
        </text:list-item>
      </text:list>
      <text:p text:style-name="Text_20_body">Block‑level entropy is essential for identifying <text:span text:style-name="Strong_20_Emphasis">localized irregularities</text:span>.</text:p>
      <text:p text:style-name="Horizontal_20_Line"/>
      <text:h text:style-name="Heading_20_2" text:outline-level="2"><text:span text:style-name="Strong_20_Emphasis">10.1.4 LSB Entropy</text:span></text:h>
      <text:p text:style-name="Text_20_body">For steganalysis, Opus computes entropy of the least significant bits:</text:p>
      <text:p text:style-name="Text_20_body">[ H_{LSB} = -\sum_{b=0}^{1} p(b) \log_2 p(b) ]</text:p>
      <text:p text:style-name="Text_20_body">Uniform LSB distributions often indicate steganographic embedding.</text:p>
      <text:h text:style-name="Heading_20_1" text:outline-level="1">====================================</text:h>
      <text:h text:style-name="Heading_20_1" text:outline-level="1"><text:span text:style-name="Strong_20_Emphasis">10.2 QUADGRAM SCORING</text:span></text:h>
      <text:h text:style-name="Heading_20_1" text:outline-level="1">====================================</text:h>
      <text:p text:style-name="Text_20_body">Quadgram scoring is the backbone of Opus’s cryptanalysis engine. It provides a statistical measure of how “English‑like” a piece of text is, allowing Opus to evaluate plaintext candidates during hillclimbing.</text:p>
      <text:p text:style-name="Horizontal_20_Line"/>
      <text:h text:style-name="Heading_20_2" text:outline-level="2"><text:span text:style-name="Strong_20_Emphasis">10.2.1 Quadgram Probability Model</text:span></text:h>
      <text:p text:style-name="Text_20_body">A quadgram is a sequence of four letters. Opus uses a precomputed table of quadgram frequencies derived from large English corpora.</text:p>
      <text:p text:style-name="Text_20_body">The score of a text is:</text:p>
      <text:p text:style-name="Text_20_body">[ S = \sum_{i=0}^{n-4} \log_{10} P(q_i) ]</text:p>
      <text:p text:style-name="Text_20_body">Where:</text:p>
      <text:list xml:id="list2800950275" text:style-name="L157">
        <text:list-item>
          <text:p text:style-name="P93">( q_i ) is the quadgram at position ( i ) </text:p>
        </text:list-item>
        <text:list-item>
          <text:p text:style-name="P92">( P(q_i) ) is its probability </text:p>
        </text:list-item>
      </text:list>
      <text:p text:style-name="Horizontal_20_Line"/>
      <text:h text:style-name="Heading_20_2" text:outline-level="2"><text:span text:style-name="Strong_20_Emphasis">10.2.2 Why Quadgrams Work</text:span></text:h>
      <text:p text:style-name="Text_20_body">Quadgrams capture:</text:p>
      <text:list xml:id="list2841867206" text:style-name="L158">
        <text:list-item>
          <text:p text:style-name="P95">letter frequency </text:p>
        </text:list-item>
        <text:list-item>
          <text:p text:style-name="P95">digraph structure </text:p>
        </text:list-item>
        <text:list-item>
          <text:p text:style-name="P95"><text:soft-page-break/>trigraph flow </text:p>
        </text:list-item>
        <text:list-item>
          <text:p text:style-name="P94">contextual patterns </text:p>
        </text:list-item>
      </text:list>
      <text:p text:style-name="Text_20_body">This makes them far more effective than simple frequency analysis.</text:p>
      <text:p text:style-name="Horizontal_20_Line"/>
      <text:h text:style-name="Heading_20_2" text:outline-level="2"><text:span text:style-name="Strong_20_Emphasis">10.2.3 Hillclimb Integration</text:span></text:h>
      <text:p text:style-name="Text_20_body">During hillclimbing:</text:p>
      <text:list xml:id="list3204704350" text:style-name="L159">
        <text:list-item>
          <text:p text:style-name="P97">mutations are applied to the key </text:p>
        </text:list-item>
        <text:list-item>
          <text:p text:style-name="P97">the resulting plaintext is scored </text:p>
        </text:list-item>
        <text:list-item>
          <text:p text:style-name="P97">if the score improves, the mutation is accepted </text:p>
        </text:list-item>
        <text:list-item>
          <text:p text:style-name="P96">otherwise, it may be accepted probabilistically </text:p>
        </text:list-item>
      </text:list>
      <text:p text:style-name="Text_20_body">This allows Opus to escape local maxima.</text:p>
      <text:h text:style-name="Heading_20_1" text:outline-level="1">====================================</text:h>
      <text:h text:style-name="Heading_20_1" text:outline-level="1"><text:span text:style-name="Strong_20_Emphasis">10.3 INDEX OF COINCIDENCE (IC)</text:span></text:h>
      <text:h text:style-name="Heading_20_1" text:outline-level="1">====================================</text:h>
      <text:p text:style-name="Text_20_body">IC is used to estimate key length in Vigenère ciphers.</text:p>
      <text:p text:style-name="Horizontal_20_Line"/>
      <text:h text:style-name="Heading_20_2" text:outline-level="2"><text:span text:style-name="Strong_20_Emphasis">10.3.1 Formula</text:span></text:h>
      <text:p text:style-name="Text_20_body">[ IC = \frac{\sum_{i=0}^{25} f_i (f_i - 1)}{N (N - 1)} ]</text:p>
      <text:p text:style-name="Text_20_body">Where:</text:p>
      <text:list xml:id="list1375757356" text:style-name="L160">
        <text:list-item>
          <text:p text:style-name="P99">( f_i ) = frequency of letter ( i ) </text:p>
        </text:list-item>
        <text:list-item>
          <text:p text:style-name="P98">( N ) = total letters </text:p>
        </text:list-item>
      </text:list>
      <text:p text:style-name="Horizontal_20_Line"/>
      <text:h text:style-name="Heading_20_2" text:outline-level="2"><text:span text:style-name="Strong_20_Emphasis">10.3.2 Interpretation</text:span></text:h>
      <text:list xml:id="list613636261" text:style-name="L161">
        <text:list-item>
          <text:p text:style-name="P101">English plaintext: ~0.066 </text:p>
        </text:list-item>
        <text:list-item>
          <text:p text:style-name="P100">random text: ~0.038 </text:p>
        </text:list-item>
      </text:list>
      <text:p text:style-name="Text_20_body">Opus uses IC to detect periodicity in ciphertext.</text:p>
      <text:h text:style-name="Heading_20_1" text:outline-level="1"><text:soft-page-break/>====================================</text:h>
      <text:h text:style-name="Heading_20_1" text:outline-level="1"><text:span text:style-name="Strong_20_Emphasis">10.4 RS ANALYSIS MATH</text:span></text:h>
      <text:h text:style-name="Heading_20_1" text:outline-level="1">====================================</text:h>
      <text:p text:style-name="Text_20_body">RS analysis is a statistical method for detecting LSB steganography.</text:p>
      <text:p text:style-name="Horizontal_20_Line"/>
      <text:h text:style-name="Heading_20_2" text:outline-level="2"><text:span text:style-name="Strong_20_Emphasis">10.4.1 Group Partitioning</text:span></text:h>
      <text:p text:style-name="Text_20_body">Pixels are divided into groups of size ( n ). For each group:</text:p>
      <text:list xml:id="list2172007019" text:style-name="L162">
        <text:list-item>
          <text:p text:style-name="P103">compute smoothness </text:p>
        </text:list-item>
        <text:list-item>
          <text:p text:style-name="P103">flip LSBs </text:p>
        </text:list-item>
        <text:list-item>
          <text:p text:style-name="P102">recompute smoothness </text:p>
        </text:list-item>
      </text:list>
      <text:p text:style-name="Text_20_body">Groups are classified as:</text:p>
      <text:list xml:id="list854701022" text:style-name="L163">
        <text:list-item>
          <text:p text:style-name="P105"><text:span text:style-name="Strong_20_Emphasis">Regular (R)</text:span> </text:p>
        </text:list-item>
        <text:list-item>
          <text:p text:style-name="P105"><text:span text:style-name="Strong_20_Emphasis">Singular (S)</text:span> </text:p>
        </text:list-item>
        <text:list-item>
          <text:p text:style-name="P104"><text:span text:style-name="Strong_20_Emphasis">Unusable (U)</text:span> </text:p>
        </text:list-item>
      </text:list>
      <text:p text:style-name="Horizontal_20_Line"/>
      <text:h text:style-name="Heading_20_2" text:outline-level="2"><text:span text:style-name="Strong_20_Emphasis">10.4.2 Expected Behavior</text:span></text:h>
      <text:p text:style-name="Text_20_body">Natural images exhibit predictable R/S ratios.<text:line-break/>Stego images distort these ratios.</text:p>
      <text:h text:style-name="Heading_20_1" text:outline-level="1">====================================</text:h>
      <text:h text:style-name="Heading_20_1" text:outline-level="1"><text:span text:style-name="Strong_20_Emphasis">10.5 DCT COEFFICIENT INTERPRETATION</text:span></text:h>
      <text:h text:style-name="Heading_20_1" text:outline-level="1">====================================</text:h>
      <text:p text:style-name="Text_20_body">JPEG images store data in 8×8 DCT blocks.</text:p>
      <text:p text:style-name="Horizontal_20_Line"/>
      <text:h text:style-name="Heading_20_2" text:outline-level="2"><text:soft-page-break/><text:span text:style-name="Strong_20_Emphasis">10.5.1 Frequency Bands</text:span></text:h>
      <text:p text:style-name="Text_20_body">Low‑frequency coefficients represent structure.<text:line-break/>High‑frequency coefficients represent noise.</text:p>
      <text:p text:style-name="Text_20_body">Stego tools often modify:</text:p>
      <text:list xml:id="list2089224941" text:style-name="L164">
        <text:list-item>
          <text:p text:style-name="P107">high‑frequency bands </text:p>
        </text:list-item>
        <text:list-item>
          <text:p text:style-name="P106">mid‑frequency bands </text:p>
        </text:list-item>
      </text:list>
      <text:p text:style-name="Text_20_body">Opus profiles these distributions.</text:p>
      <text:p text:style-name="Horizontal_20_Line"/>
      <text:h text:style-name="Heading_20_2" text:outline-level="2"><text:span text:style-name="Strong_20_Emphasis">10.5.2 Histogram Deviations</text:span></text:h>
      <text:p text:style-name="Text_20_body">Opus compares observed DCT histograms to expected natural‑image distributions.</text:p>
      <text:p text:style-name="Text_20_body">Large deviations → possible stego.</text:p>
      <text:h text:style-name="Heading_20_1" text:outline-level="1">====================================</text:h>
      <text:h text:style-name="Heading_20_1" text:outline-level="1"><text:span text:style-name="Strong_20_Emphasis">10.6 CARVING HEURISTICS</text:span></text:h>
      <text:h text:style-name="Heading_20_1" text:outline-level="1">====================================</text:h>
      <text:p text:style-name="Text_20_body">File carving relies on:</text:p>
      <text:list xml:id="list2005309360" text:style-name="L165">
        <text:list-item>
          <text:p text:style-name="P109"><text:span text:style-name="Strong_20_Emphasis">magic bytes</text:span> </text:p>
        </text:list-item>
        <text:list-item>
          <text:p text:style-name="P109"><text:span text:style-name="Strong_20_Emphasis">boundary inference</text:span> </text:p>
        </text:list-item>
        <text:list-item>
          <text:p text:style-name="P109"><text:span text:style-name="Strong_20_Emphasis">entropy shifts</text:span> </text:p>
        </text:list-item>
        <text:list-item>
          <text:p text:style-name="P108"><text:span text:style-name="Strong_20_Emphasis">structural heuristics</text:span> </text:p>
        </text:list-item>
      </text:list>
      <text:p text:style-name="Horizontal_20_Line"/>
      <text:h text:style-name="Heading_20_2" text:outline-level="2"><text:span text:style-name="Strong_20_Emphasis">10.6.1 Boundary Estimation</text:span></text:h>
      <text:p text:style-name="Text_20_body">Opus uses:</text:p>
      <text:list xml:id="list1327777048" text:style-name="L166">
        <text:list-item>
          <text:p text:style-name="P111">signature offsets </text:p>
        </text:list-item>
        <text:list-item>
          <text:p text:style-name="P111">known footer patterns </text:p>
        </text:list-item>
        <text:list-item>
          <text:p text:style-name="P111">entropy transitions </text:p>
        </text:list-item>
        <text:list-item>
          <text:p text:style-name="P110">alignment heuristics </text:p>
        </text:list-item>
      </text:list>
      <text:p text:style-name="Horizontal_20_Line"/>
      <text:h text:style-name="Heading_20_2" text:outline-level="2"><text:soft-page-break/><text:span text:style-name="Strong_20_Emphasis">10.6.2 Conservative Extraction</text:span></text:h>
      <text:p text:style-name="Text_20_body">If boundaries are uncertain, Opus extracts conservatively to avoid truncation.</text:p>
      <text:h text:style-name="Heading_20_1" text:outline-level="1">====================================</text:h>
      <text:h text:style-name="Heading_20_1" text:outline-level="1"><text:span text:style-name="Strong_20_Emphasis">10.7 RECURSION GUARD LOGIC</text:span></text:h>
      <text:h text:style-name="Heading_20_1" text:outline-level="1">====================================</text:h>
      <text:p text:style-name="Text_20_body">Recursive extraction can lead to infinite loops.<text:line-break/>Opus prevents this using:</text:p>
      <text:list xml:id="list70993520" text:style-name="L167">
        <text:list-item>
          <text:p text:style-name="P113"><text:span text:style-name="Strong_20_Emphasis">maximum depth</text:span> </text:p>
        </text:list-item>
        <text:list-item>
          <text:p text:style-name="P113"><text:span text:style-name="Strong_20_Emphasis">duplicate‑content detection</text:span> </text:p>
        </text:list-item>
        <text:list-item>
          <text:p text:style-name="P112"><text:span text:style-name="Strong_20_Emphasis">suffix‑based cycle detection</text:span> </text:p>
        </text:list-item>
      </text:list>
      <text:p text:style-name="Horizontal_20_Line"/>
      <text:h text:style-name="Heading_20_2" text:outline-level="2"><text:span text:style-name="Strong_20_Emphasis">10.7.1 Maximum Depth</text:span></text:h>
      <text:p text:style-name="Text_20_body">Default: 32 layers.</text:p>
      <text:p text:style-name="Horizontal_20_Line"/>
      <text:h text:style-name="Heading_20_2" text:outline-level="2"><text:span text:style-name="Strong_20_Emphasis">10.7.2 Duplicate Detection</text:span></text:h>
      <text:p text:style-name="Text_20_body">Opus hashes extracted files to detect cycles.</text:p>
      <text:p text:style-name="Horizontal_20_Line"/>
      <text:h text:style-name="Heading_20_2" text:outline-level="2"><text:span text:style-name="Strong_20_Emphasis">10.7.3 Suffix Cycles</text:span></text:h>
      <text:p text:style-name="Text_20_body">If suffixes repeat in a suspicious pattern, recursion halts.</text:p>
      <text:p text:style-name="Horizontal_20_Line"/>
      <text:p text:style-name="Text_20_body"/>
      <text:h text:style-name="Heading_20_1" text:outline-level="1"><text:soft-page-break/>====================================</text:h>
      <text:h text:style-name="Heading_20_1" text:outline-level="1"><text:span text:style-name="Strong_20_Emphasis">CHAPTER 11 — GLOSSARY</text:span></text:h>
      <text:h text:style-name="Heading_20_1" text:outline-level="1">====================================</text:h>
      <text:p text:style-name="Text_20_body">The Glossary provides authoritative definitions for all major terms used throughout the Opus Unified Manual. It is designed to serve as a quick‑reference index for analysts, developers, and investigators who need precise, unambiguous explanations of forensic, cryptanalytic, and architectural concepts.</text:p>
      <text:p text:style-name="Text_20_body">Each entry is written in a formal, technical style, with emphasis on clarity, rigor, and contextual relevance. This glossary is intentionally exhaustive — it includes not only Opus‑specific terminology but also foundational concepts from digital forensics, steganalysis, cryptanalysis, and binary inspection.</text:p>
      <text:h text:style-name="Heading_20_1" text:outline-level="1">====================================</text:h>
      <text:h text:style-name="Heading_20_1" text:outline-level="1"><text:span text:style-name="Strong_20_Emphasis">A–C</text:span></text:h>
      <text:h text:style-name="Heading_20_1" text:outline-level="1">====================================</text:h>
      <text:h text:style-name="Heading_20_3" text:outline-level="3"><text:span text:style-name="Strong_20_Emphasis">ASCII</text:span></text:h>
      <text:p text:style-name="Text_20_body">A 7‑bit character encoding standard used for representing text. In Opus, ASCII detection is part of the <text:span text:style-name="Strong_20_Emphasis">String Intelligence Engine</text:span>.</text:p>
      <text:h text:style-name="Heading_20_3" text:outline-level="3"><text:span text:style-name="Strong_20_Emphasis">ASLR (Address Space Layout Randomization)</text:span></text:h>
      <text:p text:style-name="Text_20_body">A security mechanism that randomizes memory layout to prevent predictable exploitation. Relevant to <text:span text:style-name="Strong_20_Emphasis">PIECALC</text:span>.</text:p>
      <text:h text:style-name="Heading_20_3" text:outline-level="3"><text:span text:style-name="Strong_20_Emphasis">Base64</text:span></text:h>
      <text:p text:style-name="Text_20_body">A binary‑to‑text encoding scheme. Opus detects base64 candidates during <text:span text:style-name="Strong_20_Emphasis">string intelligence</text:span>.</text:p>
      <text:h text:style-name="Heading_20_3" text:outline-level="3"><text:span text:style-name="Strong_20_Emphasis">Block‑Level Entropy</text:span></text:h>
      <text:p text:style-name="Text_20_body">Entropy computed over fixed‑size blocks to reveal localized randomness anomalies.</text:p>
      <text:h text:style-name="Heading_20_3" text:outline-level="3"><text:span text:style-name="Strong_20_Emphasis">Carving</text:span></text:h>
      <text:p text:style-name="Text_20_body">The process of extracting embedded files based on signatures and structural heuristics. Implemented in the <text:span text:style-name="Strong_20_Emphasis">File Carver</text:span> subsystem.</text:p>
      <text:h text:style-name="Heading_20_3" text:outline-level="3"><text:soft-page-break/><text:span text:style-name="Strong_20_Emphasis">Chi‑Square Test</text:span></text:h>
      <text:p text:style-name="Text_20_body">A statistical test used in JPEG steganalysis to detect deviations from expected pixel distributions.</text:p>
      <text:h text:style-name="Heading_20_3" text:outline-level="3"><text:span text:style-name="Strong_20_Emphasis">CRT Parameters (Chinese Remainder Theorem)</text:span></text:h>
      <text:p text:style-name="Text_20_body">RSA private‑key parameters that accelerate decryption. Validated by <text:span text:style-name="Strong_20_Emphasis">RSACRT</text:span>.</text:p>
      <text:h text:style-name="Heading_20_1" text:outline-level="1">====================================</text:h>
      <text:h text:style-name="Heading_20_1" text:outline-level="1"><text:span text:style-name="Strong_20_Emphasis">D–F</text:span></text:h>
      <text:h text:style-name="Heading_20_1" text:outline-level="1">====================================</text:h>
      <text:h text:style-name="Heading_20_3" text:outline-level="3"><text:span text:style-name="Strong_20_Emphasis">DCT (Discrete Cosine Transform)</text:span></text:h>
      <text:p text:style-name="Text_20_body">The mathematical transform used in JPEG compression. Analyzed by <text:span text:style-name="Strong_20_Emphasis">JDCT</text:span>.</text:p>
      <text:h text:style-name="Heading_20_3" text:outline-level="3"><text:span text:style-name="Strong_20_Emphasis">Designation Block</text:span></text:h>
      <text:p text:style-name="Text_20_body">A structured metadata container used internally by Opus. Parsed by <text:span text:style-name="Strong_20_Emphasis">DESIG</text:span>, <text:span text:style-name="Strong_20_Emphasis">DESIGRAW</text:span>, and <text:span text:style-name="Strong_20_Emphasis">DESIGCHK</text:span>.</text:p>
      <text:h text:style-name="Heading_20_3" text:outline-level="3"><text:span text:style-name="Strong_20_Emphasis">Difference‑of‑Squares</text:span></text:h>
      <text:p text:style-name="Text_20_body">A factorization technique used in RSA analysis when primes are close.</text:p>
      <text:h text:style-name="Heading_20_3" text:outline-level="3"><text:span text:style-name="Strong_20_Emphasis">Entropy</text:span></text:h>
      <text:p text:style-name="Text_20_body">A measure of randomness. Used extensively in forensic analysis.</text:p>
      <text:h text:style-name="Heading_20_3" text:outline-level="3"><text:span text:style-name="Strong_20_Emphasis">Extraction Engine</text:span></text:h>
      <text:p text:style-name="Text_20_body">The recursive subsystem responsible for multi‑layer unwrapping of files.</text:p>
      <text:h text:style-name="Heading_20_3" text:outline-level="3"><text:span text:style-name="Strong_20_Emphasis">Fermat Factorization</text:span></text:h>
      <text:p text:style-name="Text_20_body">A method for factoring numbers where primes are close together.</text:p>
      <text:h text:style-name="Heading_20_3" text:outline-level="3"><text:span text:style-name="Strong_20_Emphasis">Frequency Analysis</text:span></text:h>
      <text:p text:style-name="Text_20_body">A classical cryptanalytic technique used in substitution cipher solving.</text:p>
      <text:h text:style-name="Heading_20_1" text:outline-level="1"><text:soft-page-break/>====================================</text:h>
      <text:h text:style-name="Heading_20_1" text:outline-level="1"><text:span text:style-name="Strong_20_Emphasis">G–L</text:span></text:h>
      <text:h text:style-name="Heading_20_1" text:outline-level="1">====================================</text:h>
      <text:h text:style-name="Heading_20_3" text:outline-level="3"><text:span text:style-name="Strong_20_Emphasis">GMP (GNU Multiple Precision Library)</text:span></text:h>
      <text:p text:style-name="Text_20_body">A high‑precision arithmetic library used by Opus for RSA operations.</text:p>
      <text:h text:style-name="Heading_20_3" text:outline-level="3"><text:span text:style-name="Strong_20_Emphasis">Heatmap (Entropy)</text:span></text:h>
      <text:p text:style-name="Text_20_body">A visual representation of block‑level entropy values.</text:p>
      <text:h text:style-name="Heading_20_3" text:outline-level="3"><text:span text:style-name="Strong_20_Emphasis">Hillclimbing</text:span></text:h>
      <text:p text:style-name="Text_20_body">An optimization technique used in cryptanalysis to refine keys.</text:p>
      <text:h text:style-name="Heading_20_3" text:outline-level="3"><text:span text:style-name="Strong_20_Emphasis">Huffman Table</text:span></text:h>
      <text:p text:style-name="Text_20_body">A component of JPEG encoding. Analyzed by <text:span text:style-name="Strong_20_Emphasis">JHUF</text:span>.</text:p>
      <text:h text:style-name="Heading_20_3" text:outline-level="3"><text:span text:style-name="Strong_20_Emphasis">IC (Index of Coincidence)</text:span></text:h>
      <text:p text:style-name="Text_20_body">A statistical measure used to estimate Vigenère key length.</text:p>
      <text:h text:style-name="Heading_20_3" text:outline-level="3"><text:span text:style-name="Strong_20_Emphasis">JPEG Stego Engine</text:span></text:h>
      <text:p text:style-name="Text_20_body">The subsystem responsible for JPEG steganalysis.</text:p>
      <text:h text:style-name="Heading_20_3" text:outline-level="3"><text:span text:style-name="Strong_20_Emphasis">Key Length Estimation</text:span></text:h>
      <text:p text:style-name="Text_20_body">The process of determining likely Vigenère key lengths using IC and Kasiski.</text:p>
      <text:h text:style-name="Heading_20_1" text:outline-level="1">====================================</text:h>
      <text:h text:style-name="Heading_20_1" text:outline-level="1"><text:span text:style-name="Strong_20_Emphasis">M–P</text:span></text:h>
      <text:h text:style-name="Heading_20_1" text:outline-level="1">====================================</text:h>
      <text:h text:style-name="Heading_20_3" text:outline-level="3"><text:span text:style-name="Strong_20_Emphasis">Magic Bytes</text:span></text:h>
      <text:p text:style-name="Text_20_body">Signature bytes used to identify file formats.</text:p>
      <text:h text:style-name="Heading_20_3" text:outline-level="3"><text:soft-page-break/><text:span text:style-name="Strong_20_Emphasis">Mutation Cycle</text:span></text:h>
      <text:p text:style-name="Text_20_body">A cryptanalytic process where keys are perturbed to explore the search space.</text:p>
      <text:h text:style-name="Heading_20_3" text:outline-level="3"><text:span text:style-name="Strong_20_Emphasis">Opus Safety Model</text:span></text:h>
      <text:p text:style-name="Text_20_body">The set of rules that prevent unsafe operations, including no‑overwrite guarantees and recursion guards.</text:p>
      <text:h text:style-name="Heading_20_3" text:outline-level="3"><text:span text:style-name="Strong_20_Emphasis">PIE (Position‑Independent Executable)</text:span></text:h>
      <text:p text:style-name="Text_20_body">A binary that can be loaded at any memory address. Analyzed by <text:span text:style-name="Strong_20_Emphasis">PIECALC</text:span>.</text:p>
      <text:h text:style-name="Heading_20_3" text:outline-level="3"><text:span text:style-name="Strong_20_Emphasis">Plaintext</text:span></text:h>
      <text:p text:style-name="Text_20_body">The decoded or decrypted form of a ciphertext.</text:p>
      <text:h text:style-name="Heading_20_3" text:outline-level="3"><text:span text:style-name="Strong_20_Emphasis">Probability Model (Quadgrams)</text:span></text:h>
      <text:p text:style-name="Text_20_body">The statistical model used to score plaintext candidates.</text:p>
      <text:h text:style-name="Heading_20_1" text:outline-level="1">====================================</text:h>
      <text:h text:style-name="Heading_20_1" text:outline-level="1"><text:span text:style-name="Strong_20_Emphasis">Q–S</text:span></text:h>
      <text:h text:style-name="Heading_20_1" text:outline-level="1">====================================</text:h>
      <text:h text:style-name="Heading_20_3" text:outline-level="3"><text:span text:style-name="Strong_20_Emphasis">Quadgram</text:span></text:h>
      <text:p text:style-name="Text_20_body">A sequence of four letters used in statistical scoring.</text:p>
      <text:h text:style-name="Heading_20_3" text:outline-level="3"><text:span text:style-name="Strong_20_Emphasis">Recursion Guard</text:span></text:h>
      <text:p text:style-name="Text_20_body">A safety mechanism that prevents infinite extraction loops.</text:p>
      <text:h text:style-name="Heading_20_3" text:outline-level="3"><text:span text:style-name="Strong_20_Emphasis">Regular/Singular (RS) Analysis</text:span></text:h>
      <text:p text:style-name="Text_20_body">A steganalysis technique that detects LSB embedding.</text:p>
      <text:h text:style-name="Heading_20_3" text:outline-level="3"><text:span text:style-name="Strong_20_Emphasis">Return Address</text:span></text:h>
      <text:p text:style-name="Text_20_body">A memory address used in binary exploitation. Analyzed by <text:span text:style-name="Strong_20_Emphasis">RETTIME</text:span> and <text:span text:style-name="Strong_20_Emphasis">PIECALC</text:span>.</text:p>
      <text:h text:style-name="Heading_20_3" text:outline-level="3"><text:span text:style-name="Strong_20_Emphasis">RSA</text:span></text:h>
      <text:p text:style-name="Text_20_body">A public‑key cryptosystem based on integer factorization.</text:p>
      <text:h text:style-name="Heading_20_3" text:outline-level="3"><text:soft-page-break/><text:span text:style-name="Strong_20_Emphasis">Shannon Entropy</text:span></text:h>
      <text:p text:style-name="Text_20_body">The mathematical measure of randomness used throughout Opus.</text:p>
      <text:h text:style-name="Heading_20_3" text:outline-level="3"><text:span text:style-name="Strong_20_Emphasis">String Intelligence</text:span></text:h>
      <text:p text:style-name="Text_20_body">The subsystem responsible for extracting ASCII, UTF‑8, base64, URLs, and emails.</text:p>
      <text:h text:style-name="Heading_20_1" text:outline-level="1">====================================</text:h>
      <text:h text:style-name="Heading_20_1" text:outline-level="1"><text:span text:style-name="Strong_20_Emphasis">T–Z</text:span></text:h>
      <text:h text:style-name="Heading_20_1" text:outline-level="1">====================================</text:h>
      <text:h text:style-name="Heading_20_3" text:outline-level="3"><text:span text:style-name="Strong_20_Emphasis">Thread Pool</text:span></text:h>
      <text:p text:style-name="Text_20_body">The subsystem that manages background tasks and solver threads.</text:p>
      <text:h text:style-name="Heading_20_3" text:outline-level="3"><text:span text:style-name="Strong_20_Emphasis">UTF‑8</text:span></text:h>
      <text:p text:style-name="Text_20_body">A variable‑length character encoding standard. Detected by the String Intelligence Engine.</text:p>
      <text:h text:style-name="Heading_20_3" text:outline-level="3"><text:span text:style-name="Strong_20_Emphasis">Vigenère Cipher</text:span></text:h>
      <text:p text:style-name="Text_20_body">A polyalphabetic substitution cipher solved by <text:span text:style-name="Strong_20_Emphasis">VIG</text:span>.</text:p>
      <text:h text:style-name="Heading_20_3" text:outline-level="3"><text:span text:style-name="Strong_20_Emphasis">Zip Archive</text:span></text:h>
      <text:p text:style-name="Text_20_body">A compressed archive format commonly encountered in multi‑layer extraction workflows.</text:p>
      <text:h text:style-name="Heading_20_1" text:outline-level="1">====================================</text:h>
      <text:h text:style-name="Heading_20_1" text:outline-level="1"><text:span text:style-name="Strong_20_Emphasis">CHAPTER 12 — CREDITS</text:span></text:h>
      <text:h text:style-name="Heading_20_1" text:outline-level="1">====================================</text:h>
      <text:p text:style-name="Text_20_body">The Opus Unified Manual represents the culmination of a long, deliberate, and deeply technical journey — a journey that spans architecture, forensic methodology, cryptanalysis theory, subsystem engineering, and practical workflows. This chapter acknowledges the authorship, intent, and guiding philosophy behind Opus and its documentation.</text:p>
      <text:p text:style-name="Text_20_body"><text:soft-page-break/>This manual is not merely a reference.<text:line-break/>It is a <text:span text:style-name="Strong_20_Emphasis">statement of design</text:span>, a <text:span text:style-name="Strong_20_Emphasis">record of engineering intent</text:span>, and a <text:span text:style-name="Strong_20_Emphasis">guide for future analysts</text:span> who will build upon the foundations established here.</text:p>
      <text:p text:style-name="Horizontal_20_Line"/>
      <text:h text:style-name="Heading_20_1" text:outline-level="1"><text:span text:style-name="Strong_20_Emphasis"><text:span text:style-name="T5">12.1 Author</text:span></text:span></text:h>
      <text:p text:style-name="Text_20_body"><text:span text:style-name="Strong_20_Emphasis"><text:span text:style-name="T5">Greg</text:span></text:span><text:span text:style-name="Strong_20_Emphasis"><text:span text:style-name="T6">ory Novak </text:span></text:span><text:span text:style-name="T5"><text:line-break/>Creator of Opus<text:line-break/>Architect of the extraction engine, cryptanalysis modules, steganalysis subsystems, and the overarching philosophy that defines Opus as a forensic environment.</text:span></text:p>
      <text:p text:style-name="P7">Greg’s work reflects:</text:p>
      <text:list xml:id="list3007879148" text:style-name="L168">
        <text:list-item>
          <text:p text:style-name="P115"><text:a xlink:type="simple" xlink:href="guide://action?prefill=Tell%20me%20more%20about%3A%20precision‑driven%20engineering" text:style-name="Internet_20_link" text:visited-style-name="Visited_20_Internet_20_Link"><text:span text:style-name="Strong_20_Emphasis"><text:span text:style-name="T5">precision‑driven engineering</text:span></text:span></text:a><text:span text:style-name="T5"> </text:span></text:p>
        </text:list-item>
        <text:list-item>
          <text:p text:style-name="P115"><text:a xlink:type="simple" xlink:href="guide://action?prefill=Tell%20me%20more%20about%3A%20modular%20system%20design" text:style-name="Internet_20_link" text:visited-style-name="Visited_20_Internet_20_Link"><text:span text:style-name="Strong_20_Emphasis"><text:span text:style-name="T5">modular system design</text:span></text:span></text:a><text:span text:style-name="T5"> </text:span></text:p>
        </text:list-item>
        <text:list-item>
          <text:p text:style-name="P115"><text:a xlink:type="simple" xlink:href="guide://action?prefill=Tell%20me%20more%20about%3A%20forensic%20safety%20principles" text:style-name="Internet_20_link" text:visited-style-name="Visited_20_Internet_20_Link"><text:span text:style-name="Strong_20_Emphasis"><text:span text:style-name="T5">forensic safety principles</text:span></text:span></text:a><text:span text:style-name="T5"> </text:span></text:p>
        </text:list-item>
        <text:list-item>
          <text:p text:style-name="P115"><text:a xlink:type="simple" xlink:href="guide://action?prefill=Tell%20me%20more%20about%3A%20cryptanalytic%20rigor" text:style-name="Internet_20_link" text:visited-style-name="Visited_20_Internet_20_Link"><text:span text:style-name="Strong_20_Emphasis"><text:span text:style-name="T5">cryptanalytic rigor</text:span></text:span></text:a><text:span text:style-name="T5"> </text:span></text:p>
        </text:list-item>
        <text:list-item>
          <text:p text:style-name="P114"><text:a xlink:type="simple" xlink:href="guide://action?prefill=Tell%20me%20more%20about%3A%20a%20commitment%20to%20transparency%20and%20reproducibility" text:style-name="Internet_20_link" text:visited-style-name="Visited_20_Internet_20_Link"><text:span text:style-name="Strong_20_Emphasis"><text:span text:style-name="T5">a commitment to transparency and reproducibility</text:span></text:span></text:a><text:span text:style-name="T5"> </text:span></text:p>
        </text:list-item>
      </text:list>
      <text:p text:style-name="P7">Opus exists because of Greg’s vision: a toolkit that is powerful, extensible, and deeply respectful of the analytical process.</text:p>
      <text:p text:style-name="P6"/>
      <text:h text:style-name="Heading_20_1" text:outline-level="1"><text:span text:style-name="Strong_20_Emphasis"><text:span text:style-name="T5">12.2 Documentation</text:span></text:span></text:h>
      <text:p text:style-name="P7">The Opus Unified Manual was developed collaboratively, with Greg providing:</text:p>
      <text:list xml:id="list3628709306" text:style-name="L169">
        <text:list-item>
          <text:p text:style-name="P117"><text:a xlink:type="simple" xlink:href="guide://action?prefill=Tell%20me%20more%20about%3A%20architectural%20direction" text:style-name="Internet_20_link" text:visited-style-name="Visited_20_Internet_20_Link"><text:span text:style-name="Strong_20_Emphasis"><text:span text:style-name="T5">architectural direction</text:span></text:span></text:a><text:span text:style-name="T5"> </text:span></text:p>
        </text:list-item>
        <text:list-item>
          <text:p text:style-name="P117"><text:a xlink:type="simple" xlink:href="guide://action?prefill=Tell%20me%20more%20about%3A%20technical%20specifications" text:style-name="Internet_20_link" text:visited-style-name="Visited_20_Internet_20_Link"><text:span text:style-name="Strong_20_Emphasis"><text:span text:style-name="T5">technical specifications</text:span></text:span></text:a><text:span text:style-name="T5"> </text:span></text:p>
        </text:list-item>
        <text:list-item>
          <text:p text:style-name="P117"><text:a xlink:type="simple" xlink:href="guide://action?prefill=Tell%20me%20more%20about%3A%20workflow%20design" text:style-name="Internet_20_link" text:visited-style-name="Visited_20_Internet_20_Link"><text:span text:style-name="Strong_20_Emphasis"><text:span text:style-name="T5">workflow design</text:span></text:span></text:a><text:span text:style-name="T5"> </text:span></text:p>
        </text:list-item>
        <text:list-item>
          <text:p text:style-name="P117"><text:a xlink:type="simple" xlink:href="guide://action?prefill=Tell%20me%20more%20about%3A%20subsystem%20rationale" text:style-name="Internet_20_link" text:visited-style-name="Visited_20_Internet_20_Link"><text:span text:style-name="Strong_20_Emphasis"><text:span text:style-name="T5">subsystem rationale</text:span></text:span></text:a><text:span text:style-name="T5"> </text:span></text:p>
        </text:list-item>
        <text:list-item>
          <text:p text:style-name="P116"><text:a xlink:type="simple" xlink:href="guide://action?prefill=Tell%20me%20more%20about%3A%20forensic%20methodology" text:style-name="Internet_20_link" text:visited-style-name="Visited_20_Internet_20_Link"><text:span text:style-name="Strong_20_Emphasis"><text:span text:style-name="T5">forensic methodology</text:span></text:span></text:a><text:span text:style-name="T5"> </text:span></text:p>
        </text:list-item>
      </text:list>
      <text:p text:style-name="P7">The manual’s structure — from the exhaustive command reference to the subsystem deep dives — reflects Greg’s insistence on clarity, completeness, and professional‑grade documentation.</text:p>
      <text:p text:style-name="P6"/>
      <text:h text:style-name="Heading_20_1" text:outline-level="1"><text:span text:style-name="Strong_20_Emphasis"><text:span text:style-name="T5">12.3 Philosophy</text:span></text:span></text:h>
      <text:p text:style-name="P7">Opus is guided by a set of core principles:</text:p>
      <text:list xml:id="list921656852" text:style-name="L170">
        <text:list-item>
          <text:p text:style-name="P119"><text:a xlink:type="simple" xlink:href="guide://action?prefill=Tell%20me%20more%20about%3A%20modularity" text:style-name="Internet_20_link" text:visited-style-name="Visited_20_Internet_20_Link"><text:span text:style-name="Strong_20_Emphasis"><text:span text:style-name="T5">modularity</text:span></text:span></text:a><text:span text:style-name="T5"> </text:span></text:p>
        </text:list-item>
        <text:list-item>
          <text:p text:style-name="P119"><text:a xlink:type="simple" xlink:href="guide://action?prefill=Tell%20me%20more%20about%3A%20transparency" text:style-name="Internet_20_link" text:visited-style-name="Visited_20_Internet_20_Link"><text:span text:style-name="Strong_20_Emphasis"><text:span text:style-name="T5">transparency</text:span></text:span></text:a><text:span text:style-name="T5"> </text:span></text:p>
        </text:list-item>
        <text:list-item>
          <text:p text:style-name="P119"><text:soft-page-break/><text:a xlink:type="simple" xlink:href="guide://action?prefill=Tell%20me%20more%20about%3A%20safety" text:style-name="Internet_20_link" text:visited-style-name="Visited_20_Internet_20_Link"><text:span text:style-name="Strong_20_Emphasis"><text:span text:style-name="T5">safety</text:span></text:span></text:a><text:span text:style-name="T5"> </text:span></text:p>
        </text:list-item>
        <text:list-item>
          <text:p text:style-name="P119"><text:a xlink:type="simple" xlink:href="guide://action?prefill=Tell%20me%20more%20about%3A%20recursion%20as%20a%20first‑class%20concept" text:style-name="Internet_20_link" text:visited-style-name="Visited_20_Internet_20_Link"><text:span text:style-name="Strong_20_Emphasis"><text:span text:style-name="T5">recursion as a first‑class concept</text:span></text:span></text:a><text:span text:style-name="T5"> </text:span></text:p>
        </text:list-item>
        <text:list-item>
          <text:p text:style-name="P118"><text:a xlink:type="simple" xlink:href="guide://action?prefill=Tell%20me%20more%20about%3A%20extensibility" text:style-name="Internet_20_link" text:visited-style-name="Visited_20_Internet_20_Link"><text:span text:style-name="Strong_20_Emphasis"><text:span text:style-name="T5">extensibility</text:span></text:span></text:a><text:span text:style-name="T5"> </text:span></text:p>
        </text:list-item>
      </text:list>
      <text:p text:style-name="P7">These principles shape every subsystem, every command, and every workflow documented in this manual.</text:p>
      <text:p text:style-name="P6"/>
      <text:h text:style-name="Heading_20_1" text:outline-level="1"><text:span text:style-name="Strong_20_Emphasis"><text:span text:style-name="T5">12.4 Intent</text:span></text:span></text:h>
      <text:p text:style-name="P7">The intent of Opus is to serve as:</text:p>
      <text:list xml:id="list4231959564" text:style-name="L171">
        <text:list-item>
          <text:p text:style-name="P121"><text:a xlink:type="simple" xlink:href="guide://action?prefill=Tell%20me%20more%20about%3A%20a%20forensic%20companion" text:style-name="Internet_20_link" text:visited-style-name="Visited_20_Internet_20_Link"><text:span text:style-name="Strong_20_Emphasis"><text:span text:style-name="T5">a forensic companion</text:span></text:span></text:a><text:span text:style-name="T5"> </text:span></text:p>
        </text:list-item>
        <text:list-item>
          <text:p text:style-name="P121"><text:a xlink:type="simple" xlink:href="guide://action?prefill=Tell%20me%20more%20about%3A%20a%20cryptanalysis%20laboratory" text:style-name="Internet_20_link" text:visited-style-name="Visited_20_Internet_20_Link"><text:span text:style-name="Strong_20_Emphasis"><text:span text:style-name="T5">a cryptanalysis laboratory</text:span></text:span></text:a><text:span text:style-name="T5"> </text:span></text:p>
        </text:list-item>
        <text:list-item>
          <text:p text:style-name="P121"><text:a xlink:type="simple" xlink:href="guide://action?prefill=Tell%20me%20more%20about%3A%20a%20steganalysis%20workstation" text:style-name="Internet_20_link" text:visited-style-name="Visited_20_Internet_20_Link"><text:span text:style-name="Strong_20_Emphasis"><text:span text:style-name="T5">a steganalysis workstation</text:span></text:span></text:a><text:span text:style-name="T5"> </text:span></text:p>
        </text:list-item>
        <text:list-item>
          <text:p text:style-name="P121"><text:a xlink:type="simple" xlink:href="guide://action?prefill=Tell%20me%20more%20about%3A%20a%20recursive%20extraction%20engine" text:style-name="Internet_20_link" text:visited-style-name="Visited_20_Internet_20_Link"><text:span text:style-name="Strong_20_Emphasis"><text:span text:style-name="T5">a recursive extraction engine</text:span></text:span></text:a><text:span text:style-name="T5"> </text:span></text:p>
        </text:list-item>
        <text:list-item>
          <text:p text:style-name="P120"><text:a xlink:type="simple" xlink:href="guide://action?prefill=Tell%20me%20more%20about%3A%20a%20teaching%20tool%20for%20analysts" text:style-name="Internet_20_link" text:visited-style-name="Visited_20_Internet_20_Link"><text:span text:style-name="Strong_20_Emphasis"><text:span text:style-name="T5">a teaching tool for analysts</text:span></text:span></text:a><text:span text:style-name="T5"> </text:span></text:p>
        </text:list-item>
      </text:list>
      <text:p text:style-name="Text_20_body"><text:span text:style-name="T5">Opus is not designed to hide complexity — it is designed to </text:span><text:span text:style-name="Strong_20_Emphasis"><text:span text:style-name="T5">reveal it</text:span></text:span><text:span text:style-name="T5">, to make the invisible visible, and to give analysts the tools they need to navigate layered, obfuscated, or adversarial data.</text:span></text:p>
      <text:p text:style-name="P6"/>
      <text:h text:style-name="Heading_20_1" text:outline-level="1"><text:span text:style-name="Strong_20_Emphasis"><text:span text:style-name="T5">12.5 Future Work</text:span></text:span></text:h>
      <text:p text:style-name="P7">Opus is built to grow.<text:line-break/>Future expansions may include:</text:p>
      <text:list xml:id="list757202759" text:style-name="L172">
        <text:list-item>
          <text:p text:style-name="P123"><text:a xlink:type="simple" xlink:href="guide://action?prefill=Tell%20me%20more%20about%3A%20additional%20stego%20engines" text:style-name="Internet_20_link" text:visited-style-name="Visited_20_Internet_20_Link"><text:span text:style-name="Strong_20_Emphasis"><text:span text:style-name="T5">additional stego engines</text:span></text:span></text:a><text:span text:style-name="T5"> </text:span></text:p>
        </text:list-item>
        <text:list-item>
          <text:p text:style-name="P123"><text:a xlink:type="simple" xlink:href="guide://action?prefill=Tell%20me%20more%20about%3A%20new%20cryptanalysis%20modules" text:style-name="Internet_20_link" text:visited-style-name="Visited_20_Internet_20_Link"><text:span text:style-name="Strong_20_Emphasis"><text:span text:style-name="T5">new cryptanalysis modules</text:span></text:span></text:a><text:span text:style-name="T5"> </text:span></text:p>
        </text:list-item>
        <text:list-item>
          <text:p text:style-name="P123"><text:a xlink:type="simple" xlink:href="guide://action?prefill=Tell%20me%20more%20about%3A%20expanded%20carving%20heuristics" text:style-name="Internet_20_link" text:visited-style-name="Visited_20_Internet_20_Link"><text:span text:style-name="Strong_20_Emphasis"><text:span text:style-name="T5">expanded carving heuristics</text:span></text:span></text:a><text:span text:style-name="T5"> </text:span></text:p>
        </text:list-item>
        <text:list-item>
          <text:p text:style-name="P123"><text:a xlink:type="simple" xlink:href="guide://action?prefill=Tell%20me%20more%20about%3A%20format‑specific%20extraction%20pipelines" text:style-name="Internet_20_link" text:visited-style-name="Visited_20_Internet_20_Link"><text:span text:style-name="Strong_20_Emphasis"><text:span text:style-name="T5">format‑specific extraction pipelines</text:span></text:span></text:a><text:span text:style-name="T5"> </text:span></text:p>
        </text:list-item>
        <text:list-item>
          <text:p text:style-name="P122"><text:a xlink:type="simple" xlink:href="guide://action?prefill=Tell%20me%20more%20about%3A%20interactive%20training%20workflows" text:style-name="Internet_20_link" text:visited-style-name="Visited_20_Internet_20_Link"><text:span text:style-name="Strong_20_Emphasis"><text:span text:style-name="T5">interactive training workflows</text:span></text:span></text:a><text:span text:style-name="T5"> </text:span></text:p>
        </text:list-item>
      </text:list>
      <text:p text:style-name="P7">The architecture documented in this manual is intentionally extensible, ensuring that Opus can evolve without compromising its core principles.</text:p>
      <text:p text:style-name="P6"/>
      <text:h text:style-name="Heading_20_1" text:outline-level="1"><text:span text:style-name="Strong_20_Emphasis"><text:span text:style-name="T5">12.6 Closing Statement</text:span></text:span></text:h>
      <text:p text:style-name="P7">Opus is more than a toolkit.<text:line-break/>It is a philosophy of analysis — a belief that forensic work should be:</text:p>
      <text:list xml:id="list3496903599" text:style-name="L173">
        <text:list-item>
          <text:p text:style-name="P125"><text:span text:style-name="Strong_20_Emphasis"><text:span text:style-name="T5">methodical</text:span></text:span><text:span text:style-name="T5"> </text:span></text:p>
        </text:list-item>
        <text:list-item>
          <text:p text:style-name="P125"><text:span text:style-name="Strong_20_Emphasis"><text:span text:style-name="T5">transparent</text:span></text:span><text:span text:style-name="T5"> </text:span></text:p>
        </text:list-item>
        <text:list-item>
          <text:p text:style-name="P125"><text:soft-page-break/><text:span text:style-name="Strong_20_Emphasis"><text:span text:style-name="T5">reproducible</text:span></text:span><text:span text:style-name="T5"> </text:span></text:p>
        </text:list-item>
        <text:list-item>
          <text:p text:style-name="P124"><text:span text:style-name="Strong_20_Emphasis"><text:span text:style-name="T5">deeply understood</text:span></text:span><text:span text:style-name="T5"> </text:span></text:p>
        </text:list-item>
      </text:list>
      <text:p text:style-name="P7">This manual stands as both a reference and a testament to that philosophy.</text:p>
      <text:p text:style-name="P6"/>
      <text:h text:style-name="Heading_20_1" text:outline-level="1"><text:span text:style-name="Strong_20_Emphasis"><text:span text:style-name="T5"/></text:span></text:h>
      <text:p text:style-name="Text_20_body"><text:span text:style-name="Strong_20_Emphasis"/></text:p>
      <text:p text:style-name="Text_20_body"><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8T18:22:42.908280407</meta:creation-date>
    <dc:date>2026-01-17T11:13:24.476270680</dc:date>
    <meta:editing-duration>PT14H47M37S</meta:editing-duration>
    <meta:editing-cycles>30</meta:editing-cycles>
    <meta:generator>LibreOffice/7.3.7.2$Linux_X86_64 LibreOffice_project/30$Build-2</meta:generator>
    <meta:document-statistic meta:table-count="0" meta:image-count="0" meta:object-count="0" meta:page-count="101" meta:paragraph-count="2273" meta:word-count="16825" meta:character-count="124089" meta:non-whitespace-character-count="104458"/>
  </office:meta>
</office:document-meta>
</file>