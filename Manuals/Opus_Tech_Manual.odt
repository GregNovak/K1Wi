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📙 <text:span text:style-name="Strong_20_Emphasis">OPUS TECHNICAL MANUAL</text:span></text:h>
      <text:p text:style-name="Text_20_body"><text:span text:style-name="Emphasis">Modular Cryptanalysis &amp; Forensic Toolkit — Internal Architecture Guide</text:span> <text:line-break/>Version 1.0<text:line-break/>Author: Greg</text:p>
      <text:p text:style-name="Text_20_body">============================================================<text:line-break/><text:span text:style-name="Strong_20_Emphasis">TITLE PAGE</text:span> <text:line-break/>============================================================</text:p>
      <text:p text:style-name="Text_20_body">OPUS TECHNICAL MANUAL<text:line-break/>Internal Architecture &amp; Developer Guide<text:line-break/>Version 1.0<text:line-break/>Author: Greg<text:line-break/>Location: Wallkill, NY</text:p>
      <text:p text:style-name="Text_20_body">============================================================</text:p>
      <text:p text:style-name="Text_20_body">============================================================<text:line-break/><text:span text:style-name="Strong_20_Emphasis">TABLE OF CONTENTS</text:span> <text:line-break/>============================================================</text:p>
      <text:list xml:id="list2077275893" text:style-name="L2">
        <text:list-item>
          <text:p text:style-name="P5">Introduction </text:p>
        </text:list-item>
        <text:list-item>
          <text:p text:style-name="P5">System Architecture </text:p>
        </text:list-item>
        <text:list-item>
          <text:p text:style-name="P5">Build &amp; Installation </text:p>
        </text:list-item>
        <text:list-item>
          <text:p text:style-name="P5">Core Components </text:p>
        </text:list-item>
        <text:list-item>
          <text:p text:style-name="P5">Subsystems </text:p>
        </text:list-item>
        <text:list-item>
          <text:p text:style-name="P5">Thread Pool </text:p>
        </text:list-item>
        <text:list-item>
          <text:p text:style-name="P5">Logging &amp; Progress Callbacks </text:p>
        </text:list-item>
        <text:list-item>
          <text:p text:style-name="P5">Data Flow &amp; Pipelines </text:p>
        </text:list-item>
        <text:list-item>
          <text:p text:style-name="P5">File Outputs </text:p>
        </text:list-item>
        <text:list-item>
          <text:p text:style-name="P5">Extending Opus </text:p>
        </text:list-item>
        <text:list-item>
          <text:p text:style-name="P5">Directory Layout </text:p>
        </text:list-item>
        <text:list-item>
          <text:p text:style-name="P5">Developer Notes </text:p>
        </text:list-item>
        <text:list-item>
          <text:p text:style-name="P5">Glossary </text:p>
        </text:list-item>
        <text:list-item>
          <text:p text:style-name="P5">License </text:p>
        </text:list-item>
        <text:list-item>
          <text:p text:style-name="P4">Author </text:p>
        </text:list-item>
      </text:list>
      <text:p text:style-name="Text_20_body">============================================================</text:p>
      <text:h text:style-name="Heading_20_1" text:outline-level="1"><text:span text:style-name="Strong_20_Emphasis">1. Introduction</text:span></text:h>
      <text:p text:style-name="Text_20_body">Opus is a modular cryptanalysis and forensic extraction suite designed for extensibility, safety, and high‑performance analysis.<text:line-break/><text:soft-page-break/>This Technical Manual documents the internal architecture, subsystems, pipelines, and development patterns used throughout Opus.</text:p>
      <text:p text:style-name="Text_20_body">This document is intended for:</text:p>
      <text:p text:style-name="Text_20_body">• Developers extending Opus<text:line-break/>• Contributors adding new modules<text:line-break/>• Researchers studying the architecture<text:line-break/>• Anyone modifying internal components</text:p>
      <text:p text:style-name="Text_20_body">The User Manual covers usage.<text:line-break/>This manual covers <text:span text:style-name="Emphasis">how Opus works internally</text:span>.</text:p>
      <text:h text:style-name="Heading_20_1" text:outline-level="1"><text:span text:style-name="Strong_20_Emphasis">2. System Architecture</text:span></text:h>
      <text:p text:style-name="Text_20_body">Opus is structured as a collection of modular engines connected through a unified command interface.</text:p>
      <text:p text:style-name="Preformatted_20_Text"><text:span text:style-name="Source_20_Text">+-------------------+</text:span></text:p>
      <text:p text:style-name="Preformatted_20_Text"><text:span text:style-name="Source_20_Text">| <text:s text:c="4"/>Input File <text:s text:c="3"/>|</text:span></text:p>
      <text:p text:style-name="Preformatted_20_Text"><text:span text:style-name="Source_20_Text">+-------------------+</text:span></text:p>
      <text:p text:style-name="Preformatted_20_Text"><text:span text:style-name="Source_20_Text"><text:s text:c="10"/>|</text:span></text:p>
      <text:p text:style-name="Preformatted_20_Text"><text:span text:style-name="Source_20_Text"><text:s text:c="10"/>v</text:span></text:p>
      <text:p text:style-name="Preformatted_20_Text"><text:span text:style-name="Source_20_Text">+-------------------+</text:span></text:p>
      <text:p text:style-name="Preformatted_20_Text"><text:span text:style-name="Source_20_Text">| Extraction Engine |</text:span></text:p>
      <text:p text:style-name="Preformatted_20_Text"><text:span text:style-name="Source_20_Text">+-------------------+</text:span></text:p>
      <text:p text:style-name="Preformatted_20_Text"><text:span text:style-name="Source_20_Text"><text:s text:c="3"/>| <text:s text:c="8"/>| <text:s text:c="5"/></text:span></text:p>
      <text:p text:style-name="Preformatted_20_Text"><text:span text:style-name="Source_20_Text"><text:s text:c="3"/>v <text:s text:c="8"/>v</text:span></text:p>
      <text:p text:style-name="Preformatted_20_Text"><text:span text:style-name="Source_20_Text">Raw Layers <text:s/>Designation Blocks</text:span></text:p>
      <text:p text:style-name="Preformatted_20_Text"><text:span text:style-name="Source_20_Text"><text:s text:c="3"/>| <text:s text:c="8"/>|</text:span></text:p>
      <text:p text:style-name="Preformatted_20_Text"><text:span text:style-name="Source_20_Text"><text:s text:c="3"/>v <text:s text:c="8"/>v</text:span></text:p>
      <text:p text:style-name="Preformatted_20_Text"><text:span text:style-name="Source_20_Text">+-------------------+</text:span></text:p>
      <text:p text:style-name="Preformatted_20_Text"><text:span text:style-name="Source_20_Text">| Designation Engine|</text:span></text:p>
      <text:p text:style-name="Preformatted_20_Text"><text:span text:style-name="Source_20_Text">+-------------------+</text:span></text:p>
      <text:p text:style-name="Preformatted_20_Text"><text:span text:style-name="Source_20_Text"><text:s text:c="10"/>|</text:span></text:p>
      <text:p text:style-name="Preformatted_20_Text"><text:span text:style-name="Source_20_Text"><text:s text:c="10"/>v</text:span></text:p>
      <text:p text:style-name="Preformatted_20_Text"><text:span text:style-name="Source_20_Text">Decoded Metadata</text:span></text:p>
      <text:p text:style-name="Preformatted_20_Text"><text:span text:style-name="Source_20_Text"><text:s text:c="10"/>|</text:span></text:p>
      <text:p text:style-name="Preformatted_20_Text"><text:span text:style-name="Source_20_Text"><text:s text:c="10"/>v</text:span></text:p>
      <text:p text:style-name="Preformatted_20_Text"><text:span text:style-name="Source_20_Text">+-------------------+</text:span></text:p>
      <text:p text:style-name="Preformatted_20_Text"><text:span text:style-name="Source_20_Text">| <text:s text:c="3"/>SOLVE Engine <text:s text:c="2"/>|</text:span></text:p>
      <text:p text:style-name="Preformatted_20_Text"><text:span text:style-name="Source_20_Text">+-------------------+</text:span></text:p>
      <text:p text:style-name="Preformatted_20_Text"><text:span text:style-name="Source_20_Text"><text:s text:c="10"/>|</text:span></text:p>
      <text:p text:style-name="Preformatted_20_Text"><text:span text:style-name="Source_20_Text"><text:s text:c="10"/>v</text:span></text:p>
      <text:p text:style-name="P1"><text:span text:style-name="Source_20_Text">Final Plaintext</text:span></text:p>
      <text:p text:style-name="Text_20_body">Key architectural principles:</text:p>
      <text:p text:style-name="Text_20_body">• <text:span text:style-name="Strong_20_Emphasis">Modularity</text:span> — each subsystem is isolated<text:line-break/>• <text:span text:style-name="Strong_20_Emphasis">Safety</text:span> — explicit destructive operations<text:line-break/>• <text:span text:style-name="Strong_20_Emphasis">Extensibility</text:span> — new engines can be added easily<text:line-break/>• <text:span text:style-name="Strong_20_Emphasis">Determinism</text:span> — reproducible solver behavior<text:line-break/>• <text:span text:style-name="Strong_20_Emphasis">Parallelism</text:span> — thread pool for long-running tasks</text:p>
      <text:h text:style-name="Heading_20_1" text:outline-level="1"><text:soft-page-break/><text:span text:style-name="Strong_20_Emphasis">3. Build &amp; Installation</text:span></text:h>
      <text:h text:style-name="Heading_20_2" text:outline-level="2">3.1 Requirements</text:h>
      <text:p text:style-name="Text_20_body">• GCC or Clang<text:line-break/>• POSIX environment (Linux, macOS, WSL)<text:line-break/>• pthreads<text:line-break/>• math library (<text:span text:style-name="Source_20_Text">-lm</text:span>)</text:p>
      <text:h text:style-name="Heading_20_2" text:outline-level="2">3.2 Build Command</text:h>
      <text:p text:style-name="P1"><text:span text:style-name="Source_20_Text">gcc -std=c11 -O3 -Wall -Wextra -lpthread -lm -o Opus *.c</text:span></text:p>
      <text:h text:style-name="Heading_20_2" text:outline-level="2">3.3 Optional Components</text:h>
      <text:p text:style-name="Text_20_body">• ncurses (for TUI mode)<text:line-break/>• GMP (for RSA modules, if enabled)</text:p>
      <text:h text:style-name="Heading_20_1" text:outline-level="1"><text:span text:style-name="Strong_20_Emphasis">4. Core Components</text:span></text:h>
      <text:p text:style-name="Text_20_body">Opus is composed of several major modules:</text:p>
      <text:p text:style-name="Text_20_body">• <text:span text:style-name="Source_20_Text">Opus.c</text:span> — entry point, REPL, command dispatch<text:line-break/>• <text:span text:style-name="Source_20_Text">task_pool.c</text:span> — thread pool<text:line-break/>• <text:span text:style-name="Source_20_Text">solve.c</text:span> — modern substitution solver<text:line-break/>• <text:span text:style-name="Source_20_Text">solver.c</text:span> — legacy hillclimber<text:line-break/>• <text:span text:style-name="Source_20_Text">opus_extract.c</text:span> — layer extraction<text:line-break/>• <text:span text:style-name="Source_20_Text">opus_extract_designations.c</text:span> — designation extraction<text:line-break/>• <text:span text:style-name="Source_20_Text">opus_designation_*</text:span> — designation decoding and analysis<text:line-break/>• <text:span text:style-name="Source_20_Text">mutation.c</text:span> — key mutation logic<text:line-break/>• <text:span text:style-name="Source_20_Text">score.c</text:span> — quadgram scoring<text:line-break/>• <text:span text:style-name="Source_20_Text">state.c</text:span> — solver state management<text:line-break/>• <text:span text:style-name="Source_20_Text">logging.c</text:span> — progress callbacks<text:line-break/>• <text:span text:style-name="Source_20_Text">rng.c</text:span> — deterministic random number generator</text:p>
      <text:h text:style-name="Heading_20_1" text:outline-level="1"><text:span text:style-name="Strong_20_Emphasis">5. Subsystems</text:span></text:h>
      <text:h text:style-name="Heading_20_2" text:outline-level="2">5.1 Extraction Engine</text:h>
      <text:p text:style-name="Text_20_body">Files:</text:p>
      <text:p text:style-name="Text_20_body"><text:soft-page-break/>• <text:span text:style-name="Source_20_Text">opus_extract.c</text:span> <text:line-break/>• <text:span text:style-name="Source_20_Text">opus_extract_designations.c</text:span></text:p>
      <text:p text:style-name="Text_20_body">Responsibilities:</text:p>
      <text:p text:style-name="Text_20_body">• Scan input files for embedded layers<text:line-break/>• Extract raw binary blocks<text:line-break/>• Identify designation structures<text:line-break/>• Produce intermediate artifacts</text:p>
      <text:p text:style-name="Text_20_body">Pipeline:</text:p>
      <text:p text:style-name="P1"><text:span text:style-name="Source_20_Text">Input → Layer Scanner → Layer Extractor → Output Layers</text:span></text:p>
      <text:h text:style-name="Heading_20_2" text:outline-level="2">5.2 Designation Engine</text:h>
      <text:p text:style-name="Text_20_body">Files:</text:p>
      <text:p text:style-name="Text_20_body">• <text:span text:style-name="Source_20_Text">opus_designation_solve.c</text:span> <text:line-break/>• <text:span text:style-name="Source_20_Text">opus_designation_decoder.c</text:span> <text:line-break/>• <text:span text:style-name="Source_20_Text">opus_designation_analyze.c</text:span></text:p>
      <text:p text:style-name="Text_20_body">Responsibilities:</text:p>
      <text:p text:style-name="Text_20_body">• Decode structured metadata<text:line-break/>• Solve designation puzzles<text:line-break/>• Produce human-readable summaries</text:p>
      <text:p text:style-name="Text_20_body">Pipeline:</text:p>
      <text:p text:style-name="P1"><text:span text:style-name="Source_20_Text">Designation Block → Decoder → Analyzer → Output</text:span></text:p>
      <text:h text:style-name="Heading_20_2" text:outline-level="2">5.3 SOLVE Engine (Modern Solver)</text:h>
      <text:p text:style-name="Text_20_body">Files:</text:p>
      <text:p text:style-name="Text_20_body">• <text:span text:style-name="Source_20_Text">solve.c</text:span> <text:line-break/>• <text:span text:style-name="Source_20_Text">mutation.c</text:span> <text:line-break/>• <text:span text:style-name="Source_20_Text">score.c</text:span> <text:line-break/>• <text:span text:style-name="Source_20_Text">logging.c</text:span> <text:line-break/>• <text:span text:style-name="Source_20_Text">state.c</text:span> <text:line-break/>• <text:span text:style-name="Source_20_Text">rng.c</text:span></text:p>
      <text:p text:style-name="Text_20_body">Responsibilities:</text:p>
      <text:p text:style-name="Text_20_body">• Mutation-based key search<text:line-break/>• Quadgram scoring<text:line-break/>• Deterministic RNG<text:line-break/><text:soft-page-break/>• Logging and progress callbacks<text:line-break/>• Multi-threaded execution</text:p>
      <text:p text:style-name="Text_20_body">Pipeline:</text:p>
      <text:p text:style-name="P1"><text:span text:style-name="Source_20_Text">Ciphertext → Key Generator → Mutation Loop → Scoring → Best Key → Plaintext</text:span></text:p>
      <text:h text:style-name="Heading_20_2" text:outline-level="2">5.4 Legacy Hillclimber</text:h>
      <text:p text:style-name="Text_20_body">File:</text:p>
      <text:p text:style-name="Text_20_body">• <text:span text:style-name="Source_20_Text">solver.c</text:span></text:p>
      <text:p text:style-name="Text_20_body">A standalone quadgram hillclimber with simulated annealing.</text:p>
      <text:p text:style-name="Text_20_body">Used for:</text:p>
      <text:p text:style-name="Text_20_body">• Quick testing<text:line-break/>• Comparison against the modern solver<text:line-break/>• Simple monoalphabetic ciphers</text:p>
      <text:h text:style-name="Heading_20_1" text:outline-level="1"><text:span text:style-name="Strong_20_Emphasis">6. Thread Pool</text:span></text:h>
      <text:p text:style-name="Text_20_body">File:</text:p>
      <text:p text:style-name="Text_20_body">• <text:span text:style-name="Source_20_Text">task_pool.c</text:span></text:p>
      <text:p text:style-name="Text_20_body">Responsibilities:</text:p>
      <text:p text:style-name="Text_20_body">• Parallel task execution<text:line-break/>• Graceful cancellation<text:line-break/>• Shutdown coordination<text:line-break/>• Non-blocking solver operations</text:p>
      <text:p text:style-name="Text_20_body">Pipeline:</text:p>
      <text:p text:style-name="P1"><text:span text:style-name="Source_20_Text">Tasks → Queue → Worker Threads → Results</text:span></text:p>
      <text:h text:style-name="Heading_20_1" text:outline-level="1"><text:span text:style-name="Strong_20_Emphasis">7. Logging &amp; Progress Callbacks</text:span></text:h>
      <text:p text:style-name="Text_20_body">Opus supports UI callbacks for real-time solver updates.</text:p>
      <text:p text:style-name="Text_20_body">Callback registration:</text:p>
      <text:p text:style-name="P1"><text:span text:style-name="Source_20_Text">solver_set_progress_cb(cb, user);</text:span></text:p>
      <text:p text:style-name="Text_20_body">Progress messages include:</text:p>
      <text:p text:style-name="Text_20_body">• iteration<text:line-break/>• score<text:line-break/><text:soft-page-break/>• best score<text:line-break/>• key preview<text:line-break/>• plaintext preview</text:p>
      <text:p text:style-name="Text_20_body">These messages are consumed by:</text:p>
      <text:p text:style-name="Text_20_body">• CLI REPL<text:line-break/>• TUI (optional)<text:line-break/>• External integrations</text:p>
      <text:h text:style-name="Heading_20_1" text:outline-level="1"><text:span text:style-name="Strong_20_Emphasis">8. Data Flow &amp; Pipelines</text:span></text:h>
      <text:h text:style-name="Heading_20_2" text:outline-level="2">8.1 Full Pipeline</text:h>
      <text:p text:style-name="Preformatted_20_Text"><text:span text:style-name="Source_20_Text">Input File</text:span></text:p>
      <text:p text:style-name="Preformatted_20_Text"><text:span text:style-name="Source_20_Text"><text:s text:c="3"/>|</text:span></text:p>
      <text:p text:style-name="Preformatted_20_Text"><text:span text:style-name="Source_20_Text"><text:s text:c="3"/>v</text:span></text:p>
      <text:p text:style-name="Preformatted_20_Text"><text:span text:style-name="Source_20_Text">Extraction Engine</text:span></text:p>
      <text:p text:style-name="Preformatted_20_Text"><text:span text:style-name="Source_20_Text"><text:s text:c="3"/>|</text:span></text:p>
      <text:p text:style-name="Preformatted_20_Text"><text:span text:style-name="Source_20_Text"><text:s text:c="3"/>+--&gt; Raw Layers</text:span></text:p>
      <text:p text:style-name="Preformatted_20_Text"><text:span text:style-name="Source_20_Text"><text:s text:c="3"/>|</text:span></text:p>
      <text:p text:style-name="Preformatted_20_Text"><text:span text:style-name="Source_20_Text"><text:s text:c="3"/>+--&gt; Designation Blocks</text:span></text:p>
      <text:p text:style-name="Preformatted_20_Text"><text:span text:style-name="Source_20_Text"><text:s text:c="13"/>|</text:span></text:p>
      <text:p text:style-name="Preformatted_20_Text"><text:span text:style-name="Source_20_Text"><text:s text:c="13"/>v</text:span></text:p>
      <text:p text:style-name="Preformatted_20_Text"><text:span text:style-name="Source_20_Text"><text:s text:c="6"/>Designation Engine</text:span></text:p>
      <text:p text:style-name="Preformatted_20_Text"><text:span text:style-name="Source_20_Text"><text:s text:c="13"/>|</text:span></text:p>
      <text:p text:style-name="Preformatted_20_Text"><text:span text:style-name="Source_20_Text"><text:s text:c="13"/>v</text:span></text:p>
      <text:p text:style-name="Preformatted_20_Text"><text:span text:style-name="Source_20_Text"><text:s text:c="8"/>Decoded Metadata</text:span></text:p>
      <text:p text:style-name="Preformatted_20_Text"><text:span text:style-name="Source_20_Text"><text:s text:c="13"/>|</text:span></text:p>
      <text:p text:style-name="Preformatted_20_Text"><text:span text:style-name="Source_20_Text"><text:s text:c="13"/>v</text:span></text:p>
      <text:p text:style-name="Preformatted_20_Text"><text:span text:style-name="Source_20_Text"><text:s text:c="10"/>SOLVE Engine</text:span></text:p>
      <text:p text:style-name="Preformatted_20_Text"><text:span text:style-name="Source_20_Text"><text:s text:c="13"/>|</text:span></text:p>
      <text:p text:style-name="Preformatted_20_Text"><text:span text:style-name="Source_20_Text"><text:s text:c="13"/>v</text:span></text:p>
      <text:p text:style-name="P1"><text:span text:style-name="Source_20_Text"><text:s text:c="8"/>Final Plaintext</text:span></text:p>
      <text:h text:style-name="Heading_20_2" text:outline-level="2">8.2 Solver Pipeline</text:h>
      <text:p text:style-name="Preformatted_20_Text"><text:span text:style-name="Source_20_Text">Ciphertext</text:span></text:p>
      <text:p text:style-name="Preformatted_20_Text"><text:span text:style-name="Source_20_Text"><text:s text:c="3"/>|</text:span></text:p>
      <text:p text:style-name="Preformatted_20_Text"><text:span text:style-name="Source_20_Text"><text:s text:c="3"/>v</text:span></text:p>
      <text:p text:style-name="P1"><text:span text:style-name="Source_20_Text">Initial Key → Mutation → Scoring → Acceptance → Best Key</text:span></text:p>
      <text:h text:style-name="Heading_20_2" text:outline-level="2">8.3 Designation Pipeline</text:h>
      <text:p text:style-name="P1"><text:span text:style-name="Source_20_Text">Designation Block → Decoder → Analyzer → Output</text:span></text:p>
      <text:h text:style-name="Heading_20_1" text:outline-level="1"><text:soft-page-break/><text:span text:style-name="Strong_20_Emphasis">9. File Outputs</text:span></text:h>
      <text:p text:style-name="Text_20_body">+---------------------------+----------------------------------+<text:line-break/>| File | Description |<text:line-break/>+---------------------------+----------------------------------+<text:line-break/>| solved.txt | Final plaintext output |<text:line-break/>| solved_preview.txt | Preview after each restart |<text:line-break/>| cipher.txt | Ciphertext input |<text:line-break/>| english_quadgrams.txt | Quadgram scoring model |<text:line-break/>+---------------------------+----------------------------------+</text:p>
      <text:h text:style-name="Heading_20_1" text:outline-level="1"><text:span text:style-name="Strong_20_Emphasis">10. Extending Opus</text:span></text:h>
      <text:h text:style-name="Heading_20_2" text:outline-level="2">10.1 Adding New Solvers</text:h>
      <text:p text:style-name="Text_20_body">Extend:</text:p>
      <text:p text:style-name="Text_20_body">• <text:span text:style-name="Source_20_Text">solve.c</text:span> <text:line-break/>• <text:span text:style-name="Source_20_Text">mutation.c</text:span> <text:line-break/>• <text:span text:style-name="Source_20_Text">score.c</text:span></text:p>
      <text:p text:style-name="Text_20_body">Steps:</text:p>
      <text:list xml:id="list3590901914" text:style-name="L3">
        <text:list-item>
          <text:p text:style-name="P7">Implement new mutation or scoring logic </text:p>
        </text:list-item>
        <text:list-item>
          <text:p text:style-name="P7">Register solver in command dispatch </text:p>
        </text:list-item>
        <text:list-item>
          <text:p text:style-name="P7">Add progress callbacks </text:p>
        </text:list-item>
        <text:list-item>
          <text:p text:style-name="P6">Document in the manual </text:p>
        </text:list-item>
      </text:list>
      <text:h text:style-name="Heading_20_2" text:outline-level="2">10.2 Adding New Extraction Formats</text:h>
      <text:p text:style-name="Text_20_body">Extend:</text:p>
      <text:p text:style-name="Text_20_body">• <text:span text:style-name="Source_20_Text">opus_extract.c</text:span> <text:line-break/>• <text:span text:style-name="Source_20_Text">opus_extract_designations.c</text:span></text:p>
      <text:h text:style-name="Heading_20_2" text:outline-level="2">10.3 Adding New Designation Types</text:h>
      <text:p text:style-name="Text_20_body">Extend:</text:p>
      <text:p text:style-name="Text_20_body">• <text:span text:style-name="Source_20_Text">opus_designation_decoder.c</text:span> <text:line-break/>• <text:span text:style-name="Source_20_Text">opus_designation_analyze.c</text:span></text:p>
      <text:h text:style-name="Heading_20_1" text:outline-level="1"><text:soft-page-break/><text:span text:style-name="Strong_20_Emphasis">11. Directory Layout</text:span></text:h>
      <text:p text:style-name="Text_20_body">Recommended structure:</text:p>
      <text:p text:style-name="Preformatted_20_Text"><text:span text:style-name="Source_20_Text">/src</text:span></text:p>
      <text:p text:style-name="Preformatted_20_Text"><text:span text:style-name="Source_20_Text"><text:s text:c="4"/>Opus.c</text:span></text:p>
      <text:p text:style-name="Preformatted_20_Text"><text:span text:style-name="Source_20_Text"><text:s text:c="4"/>solve.c</text:span></text:p>
      <text:p text:style-name="Preformatted_20_Text"><text:span text:style-name="Source_20_Text"><text:s text:c="4"/>solver.c</text:span></text:p>
      <text:p text:style-name="Preformatted_20_Text"><text:span text:style-name="Source_20_Text"><text:s text:c="4"/>mutation.c</text:span></text:p>
      <text:p text:style-name="Preformatted_20_Text"><text:span text:style-name="Source_20_Text"><text:s text:c="4"/>score.c</text:span></text:p>
      <text:p text:style-name="Preformatted_20_Text"><text:span text:style-name="Source_20_Text"><text:s text:c="4"/>logging.c</text:span></text:p>
      <text:p text:style-name="Preformatted_20_Text"><text:span text:style-name="Source_20_Text"><text:s text:c="4"/>state.c</text:span></text:p>
      <text:p text:style-name="Preformatted_20_Text"><text:span text:style-name="Source_20_Text"><text:s text:c="4"/>rng.c</text:span></text:p>
      <text:p text:style-name="Preformatted_20_Text"><text:span text:style-name="Source_20_Text"><text:s text:c="4"/>task_pool.c</text:span></text:p>
      <text:p text:style-name="Preformatted_20_Text"><text:span text:style-name="Source_20_Text"><text:s text:c="4"/>opus_extract.c</text:span></text:p>
      <text:p text:style-name="Preformatted_20_Text"><text:span text:style-name="Source_20_Text"><text:s text:c="4"/>opus_extract_designations.c</text:span></text:p>
      <text:p text:style-name="Preformatted_20_Text"><text:span text:style-name="Source_20_Text"><text:s text:c="4"/>opus_designation_solve.c</text:span></text:p>
      <text:p text:style-name="Preformatted_20_Text"><text:span text:style-name="Source_20_Text"><text:s text:c="4"/>opus_designation_decoder.c</text:span></text:p>
      <text:p text:style-name="P1"><text:span text:style-name="Source_20_Text"><text:s text:c="4"/>opus_designation_analyze.c</text:span></text:p>
      <text:p text:style-name="Text_20_body">Build script example:</text:p>
      <text:p text:style-name="Preformatted_20_Text"><text:span text:style-name="Source_20_Text">#!/bin/sh</text:span></text:p>
      <text:p text:style-name="P1"><text:span text:style-name="Source_20_Text">gcc -std=c11 -O3 -Wall -Wextra -lpthread -lm -o Opus *.c</text:span></text:p>
      <text:h text:style-name="Heading_20_1" text:outline-level="1"><text:span text:style-name="Strong_20_Emphasis">12. Developer Notes</text:span></text:h>
      <text:p text:style-name="Text_20_body">• Keep modules isolated<text:line-break/>• Avoid global state where possible<text:line-break/>• Maintain deterministic solver behavior<text:line-break/>• Use explicit error handling<text:line-break/>• Document new modules in this manual<text:line-break/>• Follow existing naming conventions</text:p>
      <text:h text:style-name="Heading_20_1" text:outline-level="1"><text:span text:style-name="Strong_20_Emphasis">13. Glossary</text:span></text:h>
      <text:p text:style-name="Text_20_body">+-----------+-------------------------------+<text:line-break/>| Term | Definition |<text:line-break/>+-----------+-------------------------------+<text:line-break/>| Layer | Extracted data block |<text:line-break/>| Designation | Structured metadata block |<text:line-break/>| Quadgram | Four-letter scoring unit |<text:line-break/>| Mutation | Key modification step |<text:line-break/>| Annealing | Acceptance of worse solutions |<text:line-break/>| Plaintext | Decoded output |<text:line-break/>+-----------+-------------------------------+</text:p>
      <text:h text:style-name="Heading_20_1" text:outline-level="1"><text:soft-page-break/><text:span text:style-name="Strong_20_Emphasis">14. License</text:span></text:h>
      <text:p text:style-name="Text_20_body">MIT License (or your preferred license).</text:p>
      <text:h text:style-name="Heading_20_1" text:outline-level="1"><text:span text:style-name="Strong_20_Emphasis">15. Author</text:span></text:h>
      <text:p text:style-name="Text_20_body">Greg — inventive cryptanalyst, systems builder, and creator of Opus.</text:p>
      <text:p text:style-name="Text_20_body">============================================================<text:line-break/><text:span text:style-name="Strong_20_Emphasis">END OF DOCUMENT</text:span> <text:line-break/>=============================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4T18:02:23.896431766</meta:creation-date>
    <dc:date>2025-12-24T18:04:12.542650198</dc:date>
    <meta:editing-duration>PT1M49S</meta:editing-duration>
    <meta:editing-cycles>1</meta:editing-cycles>
    <meta:document-statistic meta:table-count="0" meta:image-count="0" meta:object-count="0" meta:page-count="9" meta:paragraph-count="186" meta:word-count="933" meta:character-count="7261" meta:non-whitespace-character-count="6142"/>
    <meta:generator>LibreOffice/7.3.7.2$Linux_X86_64 LibreOffice_project/30$Build-2</meta:generator>
  </office:meta>
</office:document-meta>
</file>